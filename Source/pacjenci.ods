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1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30"/>
    <style:style style:name="ce11" style:family="table-cell" style:parent-style-name="Default" style:data-style-name="N36"/>
    <style:style style:name="ce12" style:family="table-cell" style:parent-style-name="Default" style:data-style-name="N1"/>
    <style:style style:name="ce13" style:family="table-cell" style:parent-style-name="Default" style:data-style-name="N0">
      <style:table-cell-properties fo:background-color="#ED7D31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able-cell-properties fo:background-color="#FFE699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1">
      <style:table-cell-properties fo:background-color="#F8CBAD"/>
    </style:style>
    <style:style style:name="ce18" style:family="table-cell" style:parent-style-name="Default" style:data-style-name="N0">
      <style:table-cell-properties fo:background-color="#FFC000"/>
    </style:style>
    <style:style style:name="ce19" style:family="table-cell" style:parent-style-name="Default" style:data-style-name="N0">
      <style:table-cell-properties fo:background-color="#4472C4"/>
    </style:style>
    <style:style style:name="ce20" style:family="table-cell" style:parent-style-name="Default" style:data-style-name="N0">
      <style:table-cell-properties fo:background-color="#E2EFDA"/>
    </style:style>
    <style:style style:name="ce21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1">
      <style:table-cell-properties fo:background-color="#D0CECE"/>
    </style:style>
    <style:style style:name="ce23" style:family="table-cell" style:parent-style-name="Default" style:data-style-name="N0">
      <style:table-cell-properties fo:background-color="#757171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1">
      <style:table-cell-properties fo:background-color="#D9D9D9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fo:background-color="#00B0F0"/>
    </style:style>
    <style:style style:name="ce30" style:family="table-cell" style:parent-style-name="Default" style:data-style-name="N0">
      <style:table-cell-properties fo:background-color="#00B0F0"/>
    </style:style>
    <style:style style:name="ce31" style:family="table-cell" style:parent-style-name="Default" style:data-style-name="N30">
      <style:table-cell-properties fo:background-color="#00B0F0"/>
    </style:style>
    <style:style style:name="ce32" style:family="table-cell" style:parent-style-name="Default" style:data-style-name="N36">
      <style:table-cell-properties fo:background-color="#00B0F0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fo:background-color="#00B0F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5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fo:background-color="#ED7D31"/>
    </style:style>
    <style:style style:name="ce37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E2EFDA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0" style:family="table-cell" style:parent-style-name="Default" style:data-style-name="N36">
      <style:table-cell-properties fo:background-color="#E2EFDA"/>
    </style:style>
    <style:style style:name="ce41" style:family="table-cell" style:parent-style-name="Default" style:data-style-name="N1">
      <style:table-cell-properties fo:background-color="#F8CBAD"/>
      <style:text-properties fo:font-size="12pt" style:font-size-asian="12pt" style:font-size-complex="12pt"/>
    </style:style>
    <style:style style:name="ce42" style:family="table-cell" style:parent-style-name="Default" style:data-style-name="N2"/>
    <style:style style:name="ce43" style:family="table-cell" style:parent-style-name="Default" style:data-style-name="N0">
      <style:table-cell-properties fo:background-color="#BDD7EE"/>
    </style:style>
    <style:style style:name="ce44" style:family="table-cell" style:parent-style-name="Default" style:data-style-name="N37"/>
    <style:style style:name="ce45" style:family="table-cell" style:parent-style-name="Default" style:data-style-name="N0">
      <style:table-cell-properties fo:background-color="#FFFF00"/>
    </style:style>
    <style:style style:name="ce46" style:family="table-cell" style:parent-style-name="Default" style:data-style-name="N0">
      <style:table-cell-properties fo:background-color="#92D050"/>
    </style:style>
    <style:style style:name="ce47" style:family="table-cell" style:parent-style-name="Default" style:data-style-name="N0">
      <style:table-cell-properties fo:border="2pt solid #AAAAAA" style:vertical-align="middle" fo:wrap-option="wrap" fo:background-color="#F9F9F9"/>
      <style:text-properties fo:color="#202122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Dane_32_wej_347_ciowe" style:data-style-name="N0">
      <style:table-cell-properties fo:border="thin solid #7F7F7F" fo:background-color="#FFCC99"/>
      <style:text-properties fo:color="#3F3F76"/>
    </style:style>
    <style:style style:name="ce52" style:family="table-cell" style:parent-style-name="Dobry" style:data-style-name="N0">
      <style:table-cell-properties fo:background-color="#C6EFCE"/>
      <style:text-properties fo:color="#006100"/>
    </style:style>
    <style:style style:name="ce53" style:family="table-cell" style:parent-style-name="Neutralny" style:data-style-name="N0">
      <style:table-cell-properties fo:background-color="#FFEB9C"/>
      <style:text-properties fo:color="#9C6500"/>
    </style:style>
    <style:style style:name="ce54" style:family="table-cell" style:parent-style-name="Dobry" style:data-style-name="N0">
      <style:table-cell-properties fo:border="thin solid #7F7F7F" fo:background-color="#C6EFCE"/>
      <style:text-properties fo:color="#006100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9.525cm" style:use-optimal-column-width="true"/>
    </style:style>
    <style:style style:name="co8" style:family="table-column">
      <style:table-column-properties fo:break-before="auto" style:column-width="4.63020833333333cm" style:use-optimal-column-width="true"/>
    </style:style>
    <style:style style:name="co9" style:family="table-column">
      <style:table-column-properties fo:break-before="auto" style:column-width="7.83166666666667cm"/>
    </style:style>
    <style:style style:name="co10" style:family="table-column">
      <style:table-column-properties fo:break-before="auto" style:column-width="14.605cm" style:use-optimal-column-width="true"/>
    </style:style>
    <style:style style:name="co11" style:family="table-column">
      <style:table-column-properties fo:break-before="auto" style:column-width="22.5689583333333cm" style:use-optimal-column-width="true"/>
    </style:style>
    <style:style style:name="co12" style:family="table-column">
      <style:table-column-properties fo:break-before="auto" style:column-width="17.3302083333333cm" style:use-optimal-column-width="true"/>
    </style:style>
    <style:style style:name="co13" style:family="table-column">
      <style:table-column-properties fo:break-before="auto" style:column-width="15.7691666666667cm" style:use-optimal-column-width="true"/>
    </style:style>
    <style:style style:name="co14" style:family="table-column">
      <style:table-column-properties fo:break-before="auto" style:column-width="19.685cm" style:use-optimal-column-width="true"/>
    </style:style>
    <style:style style:name="co15" style:family="table-column">
      <style:table-column-properties fo:break-before="auto" style:column-width="11.43cm" style:use-optimal-column-width="true"/>
    </style:style>
    <style:style style:name="co16" style:family="table-column">
      <style:table-column-properties fo:break-before="auto" style:column-width="12.8322916666667cm" style:use-optimal-column-width="true"/>
    </style:style>
    <style:style style:name="co17" style:family="table-column">
      <style:table-column-properties fo:break-before="auto" style:column-width="11.1389583333333cm" style:use-optimal-column-width="true"/>
    </style:style>
    <style:style style:name="co18" style:family="table-column">
      <style:table-column-properties fo:break-before="auto" style:column-width="9.55145833333333cm" style:use-optimal-column-width="true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4.28625cm" style:use-optimal-column-width="true"/>
    </style:style>
    <style:style style:name="co21" style:family="table-column">
      <style:table-column-properties fo:break-before="auto" style:column-width="3.78354166666667cm"/>
    </style:style>
    <style:style style:name="co22" style:family="table-column">
      <style:table-column-properties fo:break-before="auto" style:column-width="7.24958333333333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2.16958333333333cm" style:use-optimal-column-width="true"/>
    </style:style>
    <style:style style:name="co25" style:family="table-column">
      <style:table-column-properties fo:break-before="auto" style:column-width="5.02708333333333cm"/>
    </style:style>
    <style:style style:name="co26" style:family="table-column">
      <style:table-column-properties fo:break-before="auto" style:column-width="3.33375cm"/>
    </style:style>
    <style:style style:name="co27" style:family="table-column">
      <style:table-column-properties fo:break-before="auto" style:column-width="4.33916666666667cm"/>
    </style:style>
    <style:style style:name="co28" style:family="table-column">
      <style:table-column-properties fo:break-before="auto" style:column-width="2.27541666666667cm" style:use-optimal-column-width="true"/>
    </style:style>
    <style:style style:name="co29" style:family="table-column">
      <style:table-column-properties fo:break-before="auto" style:column-width="4.41854166666667cm"/>
    </style:style>
    <style:style style:name="co30" style:family="table-column">
      <style:table-column-properties fo:break-before="auto" style:column-width="2.619375cm"/>
    </style:style>
    <style:style style:name="co31" style:family="table-column">
      <style:table-column-properties fo:break-before="auto" style:column-width="3.43958333333333cm"/>
    </style:style>
    <style:style style:name="co32" style:family="table-column">
      <style:table-column-properties fo:break-before="auto" style:column-width="2.91041666666667cm"/>
    </style:style>
    <style:style style:name="co33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ykres1">
        <table:shapes>
          <draw:frame draw:z-index="1" draw:id="id0" draw:style-name="a0" draw:name="Wykres 1" svg:x="0in" svg:y="0in" svg:width="10.17531in" svg:height="6.6501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3" table:default-cell-style-name="ce1"/>
        <table:table-column table:style-name="co4" table:default-cell-style-name="ce10" table:visibility="collapse"/>
        <table:table-column table:style-name="co5" table:default-cell-style-name="ce11"/>
        <table:table-column table:style-name="co6" table:default-cell-style-name="ce12"/>
        <table:table-column table:style-name="co5" table:default-cell-style-name="ce12" table:visibility="collapse"/>
        <table:table-column table:style-name="co7" table:default-cell-style-name="ce1"/>
        <table:table-column table:style-name="co8" table:default-cell-style-name="ce1"/>
        <table:table-column table:style-name="co9" table:default-cell-style-name="ce1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16363" table:default-cell-style-name="ce1"/>
        <table:table-row table:style-name="ro1">
          <table:table-cell office:value-type="string" table:style-name="ce2">
            <text:p>LP</text:p>
          </table:table-cell>
          <table:table-cell office:value-type="string" table:style-name="ce3">
            <text:p>IMIE</text:p>
          </table:table-cell>
          <table:table-cell office:value-type="string" table:style-name="ce3">
            <text:p>NAZWISKO</text:p>
          </table:table-cell>
          <table:table-cell office:value-type="string" table:style-name="ce3">
            <text:p>płeć</text:p>
          </table:table-cell>
          <table:table-cell office:value-type="string" table:style-name="ce4">
            <text:p>PESEL</text:p>
          </table:table-cell>
          <table:table-cell office:value-type="string" table:style-name="ce5">
            <text:p>wiek</text:p>
          </table:table-cell>
          <table:table-cell office:value-type="string" table:style-name="ce6">
            <text:p>Wiek w chwili rozpoczęcia leczenia</text:p>
          </table:table-cell>
          <table:table-cell table:style-name="ce6"/>
          <table:table-cell office:value-type="string" table:style-name="ce3">
            <text:p>CHOROBA</text:p>
          </table:table-cell>
          <table:table-cell office:value-type="string" table:style-name="ce3">
            <text:p>RODZAJ LECZENIA</text:p>
          </table:table-cell>
          <table:table-cell office:value-type="string" table:style-name="ce5">
            <text:p>Przed rozpoczęciem /ocena zaawansowania klinicznego</text:p>
          </table:table-cell>
          <table:table-cell office:value-type="string" table:style-name="ce3">
            <text:p>W trakcie leczenia</text:p>
          </table:table-cell>
          <table:table-cell table:number-columns-repeated="2" table:style-name="ce3"/>
          <table:table-cell table:number-columns-repeated="6" table:style-name="ce7"/>
          <table:table-cell table:style-name="ce8"/>
          <table:table-cell table:number-columns-repeated="16363" table:style-name="ce1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Kwarcińska</text:p>
          </table:table-cell>
          <table:table-cell office:value-type="string" office:string-value="kobieta" table:formula="of:=IF(ISEVEN(MID([.E2];10;1));&quot;kobieta&quot;;&quot;mężczyzna&quot;)" table:style-name="ce1">
            <text:p>kobieta</text:p>
          </table:table-cell>
          <table:table-cell office:value-type="float" office:value="73091907347" table:style-name="ce10">
            <text:p>73091907347</text:p>
          </table:table-cell>
          <table:table-cell office:value-type="date" office:date-value="1973-09-19T00:00:00" table:formula="of:=IF(MID([.E2];3;2)*1&gt;80;DATE(1800+LEFT([.E2];2)*1;MID([.E2];3;2)*1-80;MID([.E2];5;2));IF(MID([.E2];3;2)*1&gt;20;DATE(2000+LEFT([.E2];2)*1;MID([.E2];3;2)*1-20;MID([.E2];5;2));DATE(1900+LEFT([.E2];2)*1;MID([.E2];3;2)*1;MID([.E2];5;2))))" table:style-name="ce11">
            <text:p>19.09.1973</text:p>
          </table:table-cell>
          <table:table-cell office:value-type="float" office:value="50" table:formula="of:=YEAR([.K2])-YEAR([.F2])" table:style-name="ce12">
            <text:p>50</text:p>
          </table:table-cell>
          <table:table-cell table:style-name="ce12"/>
          <table:table-cell office:value-type="string" table:style-name="ce13">
            <text:p>DLBCL Chłoniak Nieziarniczy</text:p>
          </table:table-cell>
          <table:table-cell office:value-type="string" table:style-name="ce14">
            <text:p>RCHOP</text:p>
          </table:table-cell>
          <table:table-cell office:value-type="date" office:date-value="2023-01-17T00:00:00" table:style-name="ce11">
            <text:p>17.01.2023</text:p>
          </table:table-cell>
          <table:table-cell office:value-type="string" table:style-name="ce15">
            <text:p>11.05.2023/po 3 cyklach RCHOP /częsciowa odpowiedź na leczenie</text:p>
          </table:table-cell>
          <table:table-cell office:value-type="string" table:style-name="ce1">
            <text:p>8.08.2023/dobra odpowiedz, regresja choroby</text:p>
          </table:table-cell>
          <table:table-cell table:number-columns-repeated="7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Bolesław<text:s/></text:p>
          </table:table-cell>
          <table:table-cell office:value-type="string" table:style-name="ce1">
            <text:p>Kowalczyk</text:p>
          </table:table-cell>
          <table:table-cell office:value-type="string" office:string-value="mężczyzna" table:formula="of:=IF(ISEVEN(MID([.E3];10;1));&quot;kobieta&quot;;&quot;mężczyzna&quot;)" table:style-name="ce1">
            <text:p>mężczyzna</text:p>
          </table:table-cell>
          <table:table-cell office:value-type="float" office:value="64080905213" table:style-name="ce10">
            <text:p>64080905213</text:p>
          </table:table-cell>
          <table:table-cell office:value-type="date" office:date-value="1964-08-09T00:00:00" table:formula="of:=IF(MID([.E3];3;2)*1&gt;80;DATE(1800+LEFT([.E3];2)*1;MID([.E3];3;2)*1-80;MID([.E3];5;2));IF(MID([.E3];3;2)*1&gt;20;DATE(2000+LEFT([.E3];2)*1;MID([.E3];3;2)*1-20;MID([.E3];5;2));DATE(1900+LEFT([.E3];2)*1;MID([.E3];3;2)*1;MID([.E3];5;2))))" table:style-name="ce11">
            <text:p>09.08.1964</text:p>
          </table:table-cell>
          <table:table-cell office:value-type="float" office:value="56" table:formula="of:=YEAR([.K3])-YEAR([.F3])" table:style-name="ce17">
            <text:p>56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9">
            <text:p>ABVD</text:p>
          </table:table-cell>
          <table:table-cell office:value-type="date" office:date-value="2020-09-15T00:00:00" table:style-name="ce11">
            <text:p>15.09.2020</text:p>
          </table:table-cell>
          <table:table-cell office:value-type="string" table:style-name="ce20">
            <text:p>9.11.2021/ po 2 cyklach ABVD/ dobra odpowiedz</text:p>
          </table:table-cell>
          <table:table-cell office:value-type="string" table:style-name="ce1">
            <text:p>29.03.2021/wznowa leczenia 6 cykli ABVD/dobra odpowiedz</text:p>
          </table:table-cell>
          <table:table-cell office:value-type="string" table:style-name="ce1">
            <text:p>15.06.2021/20.09.2021/1.08.2023 kontrola po leczeniu/ stabilizacja</text:p>
          </table:table-cell>
          <table:table-cell table:number-columns-repeated="6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Mateusz<text:s/></text:p>
          </table:table-cell>
          <table:table-cell office:value-type="string" table:style-name="ce1">
            <text:p>Janik</text:p>
          </table:table-cell>
          <table:table-cell office:value-type="string" office:string-value="mężczyzna" table:formula="of:=IF(ISEVEN(MID([.E4];10;1));&quot;kobieta&quot;;&quot;mężczyzna&quot;)" table:style-name="ce1">
            <text:p>mężczyzna</text:p>
          </table:table-cell>
          <table:table-cell office:value-type="string" table:style-name="ce21">
            <text:p>00262603890</text:p>
          </table:table-cell>
          <table:table-cell office:value-type="date" office:date-value="2000-06-26T00:00:00" table:formula="of:=IF(MID([.E4];3;2)*1&gt;80;DATE(1800+LEFT([.E4];2)*1;MID([.E4];3;2)*1-80;MID([.E4];5;2));IF(MID([.E4];3;2)*1&gt;20;DATE(2000+LEFT([.E4];2)*1;MID([.E4];3;2)*1-20;MID([.E4];5;2));DATE(1900+LEFT([.E4];2)*1;MID([.E4];3;2)*1;MID([.E4];5;2))))" table:style-name="ce11">
            <text:p>26.06.2000</text:p>
          </table:table-cell>
          <table:table-cell office:value-type="float" office:value="22" table:formula="of:=YEAR([.K4])-YEAR([.F4])" table:style-name="ce12">
            <text:p>22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9">
            <text:p>ABVD</text:p>
          </table:table-cell>
          <table:table-cell office:value-type="date" office:date-value="2022-04-24T00:00:00" table:style-name="ce11">
            <text:p>24.04.2022</text:p>
          </table:table-cell>
          <table:table-cell office:value-type="string" table:style-name="ce20">
            <text:p>13.06.2022/po 2 cyklach/ dobra odpowiedź</text:p>
          </table:table-cell>
          <table:table-cell office:value-type="string" table:style-name="ce1">
            <text:p>7.09.2022/po 4 cyklach/ wznowa choroby/ II linia leczenia</text:p>
          </table:table-cell>
          <table:table-cell office:value-type="string" table:style-name="ce1">
            <text:p>12.01.2023/1.08.2023/kontrola po leczeniu/dobra odpowiedz</text:p>
          </table:table-cell>
          <table:table-cell table:number-columns-repeated="6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Marcin</text:p>
          </table:table-cell>
          <table:table-cell office:value-type="string" table:style-name="ce1">
            <text:p>Medyński</text:p>
          </table:table-cell>
          <table:table-cell office:value-type="string" office:string-value="mężczyzna" table:formula="of:=IF(ISEVEN(MID([.E5];10;1));&quot;kobieta&quot;;&quot;mężczyzna&quot;)" table:style-name="ce1">
            <text:p>mężczyzna</text:p>
          </table:table-cell>
          <table:table-cell office:value-type="float" office:value="88030817977" table:style-name="ce10">
            <text:p>88030817977</text:p>
          </table:table-cell>
          <table:table-cell office:value-type="date" office:date-value="1988-03-08T00:00:00" table:formula="of:=IF(MID([.E5];3;2)*1&gt;80;DATE(1800+LEFT([.E5];2)*1;MID([.E5];3;2)*1-80;MID([.E5];5;2));IF(MID([.E5];3;2)*1&gt;20;DATE(2000+LEFT([.E5];2)*1;MID([.E5];3;2)*1-20;MID([.E5];5;2));DATE(1900+LEFT([.E5];2)*1;MID([.E5];3;2)*1;MID([.E5];5;2))))" table:style-name="ce11">
            <text:p>08.03.1988</text:p>
          </table:table-cell>
          <table:table-cell office:value-type="float" office:value="34" table:formula="of:=YEAR([.K5])-YEAR([.F5])" table:style-name="ce22">
            <text:p>34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9">
            <text:p>ABVD</text:p>
          </table:table-cell>
          <table:table-cell office:value-type="date" office:date-value="2022-08-30T00:00:00" table:style-name="ce11">
            <text:p>30.08.2022</text:p>
          </table:table-cell>
          <table:table-cell office:value-type="string" table:style-name="ce20">
            <text:p>27.10.2022/ po 2 cyklach/dobra odpowiedz na leczenie</text:p>
          </table:table-cell>
          <table:table-cell office:value-type="string" table:style-name="ce1">
            <text:p>23.03.2023/zakonczenie leczenia/ progresja choroby</text:p>
          </table:table-cell>
          <table:table-cell table:number-columns-repeated="7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Marzena<text:s/></text:p>
          </table:table-cell>
          <table:table-cell office:value-type="string" table:style-name="ce1">
            <text:p>Sodolewska</text:p>
          </table:table-cell>
          <table:table-cell office:value-type="string" office:string-value="kobieta" table:formula="of:=IF(ISEVEN(MID([.E6];10;1));&quot;kobieta&quot;;&quot;mężczyzna&quot;)" table:style-name="ce1">
            <text:p>kobieta</text:p>
          </table:table-cell>
          <table:table-cell office:value-type="float" office:value="75101612724" table:style-name="ce10">
            <text:p>75101612724</text:p>
          </table:table-cell>
          <table:table-cell office:value-type="date" office:date-value="1975-10-16T00:00:00" table:formula="of:=IF(MID([.E6];3;2)*1&gt;80;DATE(1800+LEFT([.E6];2)*1;MID([.E6];3;2)*1-80;MID([.E6];5;2));IF(MID([.E6];3;2)*1&gt;20;DATE(2000+LEFT([.E6];2)*1;MID([.E6];3;2)*1-20;MID([.E6];5;2));DATE(1900+LEFT([.E6];2)*1;MID([.E6];3;2)*1;MID([.E6];5;2))))" table:style-name="ce11">
            <text:p>16.10.1975</text:p>
          </table:table-cell>
          <table:table-cell office:value-type="float" office:value="45" table:formula="of:=YEAR([.K6])-YEAR([.F6])" table:style-name="ce12">
            <text:p>45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PBSCT</text:p>
          </table:table-cell>
          <table:table-cell office:value-type="date" office:date-value="2020-08-31T00:00:00" table:style-name="ce11">
            <text:p>31.08.2020</text:p>
          </table:table-cell>
          <table:table-cell office:value-type="string" table:style-name="ce15">
            <text:p>5.11.2020/cześciowa regresja</text:p>
          </table:table-cell>
          <table:table-cell office:value-type="string" table:style-name="ce1">
            <text:p>10.12.2020/po zakonczeniu/ stabilizacja</text:p>
          </table:table-cell>
          <table:table-cell office:value-type="string" table:style-name="ce1">
            <text:p>3.02.2021/kontrola po leczeniu/dobra odpowiedz</text:p>
          </table:table-cell>
          <table:table-cell office:value-type="string" table:style-name="ce1">
            <text:p>1.04.2021/po 3 cyklach/stabilizacja</text:p>
          </table:table-cell>
          <table:table-cell office:value-type="string" table:style-name="ce1">
            <text:p>2.11.2021/po zakonczeniu/ stabilizacja</text:p>
          </table:table-cell>
          <table:table-cell office:value-type="string" table:style-name="ce1">
            <text:p>kolejne badania/ kontrola po leczenu/stabilizacja</text:p>
          </table:table-cell>
          <table:table-cell table:number-columns-repeated="3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Justyna<text:s/></text:p>
          </table:table-cell>
          <table:table-cell office:value-type="string" table:style-name="ce1">
            <text:p>Gara</text:p>
          </table:table-cell>
          <table:table-cell office:value-type="string" office:string-value="kobieta" table:formula="of:=IF(ISEVEN(MID([.E7];10;1));&quot;kobieta&quot;;&quot;mężczyzna&quot;)" table:style-name="ce1">
            <text:p>kobieta</text:p>
          </table:table-cell>
          <table:table-cell office:value-type="string" table:style-name="ce10">
            <text:p>02222703804</text:p>
          </table:table-cell>
          <table:table-cell office:value-type="date" office:date-value="2002-02-27T00:00:00" table:formula="of:=IF(MID([.E7];3;2)*1&gt;80;DATE(1800+LEFT([.E7];2)*1;MID([.E7];3;2)*1-80;MID([.E7];5;2));IF(MID([.E7];3;2)*1&gt;20;DATE(2000+LEFT([.E7];2)*1;MID([.E7];3;2)*1-20;MID([.E7];5;2));DATE(1900+LEFT([.E7];2)*1;MID([.E7];3;2)*1;MID([.E7];5;2))))" table:style-name="ce11">
            <text:p>27.02.2002</text:p>
          </table:table-cell>
          <table:table-cell office:value-type="float" office:value="20" table:formula="of:=YEAR([.K7])-YEAR([.F7])" table:style-name="ce12">
            <text:p>20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9">
            <text:p>ABVD</text:p>
          </table:table-cell>
          <table:table-cell office:value-type="date" office:date-value="2022-09-26T00:00:00" table:style-name="ce11">
            <text:p>26.09.2022</text:p>
          </table:table-cell>
          <table:table-cell office:value-type="string" table:style-name="ce15">
            <text:p>1.12.2022/ po 2 cyklach/ częściowa odpowiedź</text:p>
          </table:table-cell>
          <table:table-cell office:value-type="string" table:style-name="ce1">
            <text:p>26.01.2023/po zakończeniu/ stabilizacja</text:p>
          </table:table-cell>
          <table:table-cell office:value-type="string" table:style-name="ce1">
            <text:p>kolejne badania/ kontrola po leczeniu/stabilizacja</text:p>
          </table:table-cell>
          <table:table-cell table:number-columns-repeated="6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Elżbieta<text:s/></text:p>
          </table:table-cell>
          <table:table-cell office:value-type="string" table:style-name="ce1">
            <text:p>Galas</text:p>
          </table:table-cell>
          <table:table-cell office:value-type="string" office:string-value="kobieta" table:formula="of:=IF(ISEVEN(MID([.E8];10;1));&quot;kobieta&quot;;&quot;mężczyzna&quot;)" table:style-name="ce1">
            <text:p>kobieta</text:p>
          </table:table-cell>
          <table:table-cell office:value-type="float" office:value="34031404566" table:style-name="ce10">
            <text:p>34031404566</text:p>
          </table:table-cell>
          <table:table-cell office:value-type="date" office:date-value="1934-03-14T00:00:00" table:formula="of:=IF(MID([.E8];3;2)*1&gt;80;DATE(1800+LEFT([.E8];2)*1;MID([.E8];3;2)*1-80;MID([.E8];5;2));IF(MID([.E8];3;2)*1&gt;20;DATE(2000+LEFT([.E8];2)*1;MID([.E8];3;2)*1-20;MID([.E8];5;2));DATE(1900+LEFT([.E8];2)*1;MID([.E8];3;2)*1;MID([.E8];5;2))))" table:style-name="ce11">
            <text:p>14.03.1934</text:p>
          </table:table-cell>
          <table:table-cell office:value-type="float" office:value="88" table:formula="of:=YEAR([.K8])-YEAR([.F8])" table:style-name="ce12">
            <text:p>88</text:p>
          </table:table-cell>
          <table:table-cell table:style-name="ce12"/>
          <table:table-cell office:value-type="string" table:style-name="ce13">
            <text:p>DLBCL Chłoniak Nieziarniczy</text:p>
          </table:table-cell>
          <table:table-cell office:value-type="string" table:style-name="ce23">
            <text:p>IFRT</text:p>
          </table:table-cell>
          <table:table-cell office:value-type="date" office:date-value="2022-12-06T00:00:00" table:style-name="ce11">
            <text:p>06.12.2022</text:p>
          </table:table-cell>
          <table:table-cell office:value-type="string" table:style-name="ce15">
            <text:p>16.02.2023/po 2 cyklach/częściowa odpowiedź</text:p>
          </table:table-cell>
          <table:table-cell office:value-type="string" table:style-name="ce1">
            <text:p>17.07.2023/ po zakonczenu leczenia/ stabilizacja</text:p>
          </table:table-cell>
          <table:table-cell table:number-columns-repeated="2" table:style-name="ce1"/>
          <table:table-cell table:number-columns-repeated="5" table:style-name="ce24"/>
          <table:table-cell table:style-name="ce25"/>
          <table:table-cell table:number-columns-repeated="16363" table:style-name="ce24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Anna<text:s/></text:p>
          </table:table-cell>
          <table:table-cell office:value-type="string" table:style-name="ce1">
            <text:p>Tokarczyk</text:p>
          </table:table-cell>
          <table:table-cell office:value-type="string" office:string-value="kobieta" table:formula="of:=IF(ISEVEN(MID([.E9];10;1));&quot;kobieta&quot;;&quot;mężczyzna&quot;)" table:style-name="ce1">
            <text:p>kobieta</text:p>
          </table:table-cell>
          <table:table-cell office:value-type="float" office:value="97070210363" table:style-name="ce10">
            <text:p>97070210363</text:p>
          </table:table-cell>
          <table:table-cell office:value-type="date" office:date-value="1997-07-02T00:00:00" table:formula="of:=IF(MID([.E9];3;2)*1&gt;80;DATE(1800+LEFT([.E9];2)*1;MID([.E9];3;2)*1-80;MID([.E9];5;2));IF(MID([.E9];3;2)*1&gt;20;DATE(2000+LEFT([.E9];2)*1;MID([.E9];3;2)*1-20;MID([.E9];5;2));DATE(1900+LEFT([.E9];2)*1;MID([.E9];3;2)*1;MID([.E9];5;2))))" table:style-name="ce11">
            <text:p>02.07.1997</text:p>
          </table:table-cell>
          <table:table-cell office:value-type="float" office:value="26" table:formula="of:=YEAR([.K9])-YEAR([.F9])" table:style-name="ce12">
            <text:p>26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9">
            <text:p>BEACOPP/ABVD</text:p>
          </table:table-cell>
          <table:table-cell office:value-type="date" office:date-value="2023-01-03T00:00:00" table:style-name="ce11">
            <text:p>03.01.2023</text:p>
          </table:table-cell>
          <table:table-cell office:value-type="string" table:style-name="ce20">
            <text:p>23.02.2023/po 2 cyklach BEACOOP/ dobra odpowiedź</text:p>
          </table:table-cell>
          <table:table-cell office:value-type="string" table:style-name="ce1">
            <text:p>13.07.2023/p zakończeniu leczenia/ dpbra odpowiedź na leczenie</text:p>
          </table:table-cell>
          <table:table-cell table:number-columns-repeated="7" table:style-name="ce1"/>
          <table:table-cell table:style-name="ce16"/>
          <table:table-cell table:style-name="ce26"/>
          <table:table-cell table:number-columns-repeated="16362" table:style-name="ce27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Eugeniusz</text:p>
          </table:table-cell>
          <table:table-cell office:value-type="string" table:style-name="ce1">
            <text:p>Rachwał</text:p>
          </table:table-cell>
          <table:table-cell office:value-type="string" office:string-value="mężczyzna" table:formula="of:=IF(ISEVEN(MID([.E10];10;1));&quot;kobieta&quot;;&quot;mężczyzna&quot;)" table:style-name="ce1">
            <text:p>mężczyzna</text:p>
          </table:table-cell>
          <table:table-cell office:value-type="float" office:value="55041410134" table:style-name="ce10">
            <text:p>55041410134</text:p>
          </table:table-cell>
          <table:table-cell office:value-type="date" office:date-value="1955-04-14T00:00:00" table:formula="of:=IF(MID([.E10];3;2)*1&gt;80;DATE(1800+LEFT([.E10];2)*1;MID([.E10];3;2)*1-80;MID([.E10];5;2));IF(MID([.E10];3;2)*1&gt;20;DATE(2000+LEFT([.E10];2)*1;MID([.E10];3;2)*1-20;MID([.E10];5;2));DATE(1900+LEFT([.E10];2)*1;MID([.E10];3;2)*1;MID([.E10];5;2))))" table:style-name="ce11">
            <text:p>14.04.1955</text:p>
          </table:table-cell>
          <table:table-cell office:value-type="float" office:value="67" table:formula="of:=YEAR([.K10])-YEAR([.F10])" table:style-name="ce12">
            <text:p>67</text:p>
          </table:table-cell>
          <table:table-cell table:style-name="ce12"/>
          <table:table-cell office:value-type="string" table:style-name="ce13">
            <text:p>Chłoniak MALT<text:s/></text:p>
          </table:table-cell>
          <table:table-cell office:value-type="string" table:style-name="ce13">
            <text:p>RCVP/IFRT</text:p>
          </table:table-cell>
          <table:table-cell office:value-type="date" office:date-value="2022-06-13T00:00:00" table:style-name="ce11">
            <text:p>13.06.2022</text:p>
          </table:table-cell>
          <table:table-cell office:value-type="string" table:style-name="ce15">
            <text:p>03.11.2022/po 2 cyklach RCVP/ czesciowa odpowiedź</text:p>
          </table:table-cell>
          <table:table-cell office:value-type="string" table:style-name="ce1">
            <text:p>16.01.2023/ zakonczenie leczenia/ stabilizacja</text:p>
          </table:table-cell>
          <table:table-cell office:value-type="string" table:style-name="ce1">
            <text:p>13.02.2023/po 6 cyklach/ cześciowa odpowiedź</text:p>
          </table:table-cell>
          <table:table-cell office:value-type="string" table:style-name="ce1">
            <text:p>20.06.2023/ zakończenie RCVP 01.2023/zakończenie IFRT 04.2023/ stabilizacja</text:p>
          </table:table-cell>
          <table:table-cell table:number-columns-repeated="5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1">
            <text:p>Michał</text:p>
          </table:table-cell>
          <table:table-cell office:value-type="string" table:style-name="ce1">
            <text:p>Trzosło</text:p>
          </table:table-cell>
          <table:table-cell office:value-type="string" office:string-value="mężczyzna" table:formula="of:=IF(ISEVEN(MID([.E11];10;1));&quot;kobieta&quot;;&quot;mężczyzna&quot;)" table:style-name="ce1">
            <text:p>mężczyzna</text:p>
          </table:table-cell>
          <table:table-cell office:value-type="string" table:style-name="ce10">
            <text:p>04211306896</text:p>
          </table:table-cell>
          <table:table-cell office:value-type="date" office:date-value="2004-01-13T00:00:00" table:formula="of:=IF(MID([.E11];3;2)*1&gt;80;DATE(1800+LEFT([.E11];2)*1;MID([.E11];3;2)*1-80;MID([.E11];5;2));IF(MID([.E11];3;2)*1&gt;20;DATE(2000+LEFT([.E11];2)*1;MID([.E11];3;2)*1-20;MID([.E11];5;2));DATE(1900+LEFT([.E11];2)*1;MID([.E11];3;2)*1;MID([.E11];5;2))))" table:style-name="ce11">
            <text:p>13.01.2004</text:p>
          </table:table-cell>
          <table:table-cell office:value-type="float" office:value="19" table:formula="of:=YEAR([.K11])-YEAR([.F11])" table:style-name="ce12">
            <text:p>19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24">
            <text:p>ABVD</text:p>
          </table:table-cell>
          <table:table-cell office:value-type="date" office:date-value="2023-01-26T00:00:00" table:style-name="ce11">
            <text:p>26.01.2023</text:p>
          </table:table-cell>
          <table:table-cell office:value-type="string" table:style-name="ce15">
            <text:p>8.05.2023/po 2 cyklach /częściowa odpowiedź</text:p>
          </table:table-cell>
          <table:table-cell office:value-type="string" table:style-name="ce1">
            <text:p>4.07.2023/po zakończeniu/dobra odpowiedź</text:p>
          </table:table-cell>
          <table:table-cell table:number-columns-repeated="7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Andrzej<text:s/></text:p>
          </table:table-cell>
          <table:table-cell office:value-type="string" table:style-name="ce1">
            <text:p>Pietras</text:p>
          </table:table-cell>
          <table:table-cell office:value-type="string" office:string-value="mężczyzna" table:formula="of:=IF(ISEVEN(MID([.E12];10;1));&quot;kobieta&quot;;&quot;mężczyzna&quot;)" table:style-name="ce1">
            <text:p>mężczyzna</text:p>
          </table:table-cell>
          <table:table-cell office:value-type="float" office:value="47060505070" table:style-name="ce10">
            <text:p>47060505070</text:p>
          </table:table-cell>
          <table:table-cell office:value-type="date" office:date-value="1947-06-05T00:00:00" table:formula="of:=IF(MID([.E12];3;2)*1&gt;80;DATE(1800+LEFT([.E12];2)*1;MID([.E12];3;2)*1-80;MID([.E12];5;2));IF(MID([.E12];3;2)*1&gt;20;DATE(2000+LEFT([.E12];2)*1;MID([.E12];3;2)*1-20;MID([.E12];5;2));DATE(1900+LEFT([.E12];2)*1;MID([.E12];3;2)*1;MID([.E12];5;2))))" table:style-name="ce11">
            <text:p>05.06.1947</text:p>
          </table:table-cell>
          <table:table-cell office:value-type="float" office:value="74" table:formula="of:=YEAR([.K12])-YEAR([.F12])" table:style-name="ce12">
            <text:p>74</text:p>
          </table:table-cell>
          <table:table-cell table:style-name="ce12"/>
          <table:table-cell office:value-type="string" table:style-name="ce13">
            <text:p>Chłoniak z komórek płaszcza</text:p>
          </table:table-cell>
          <table:table-cell office:value-type="string" table:style-name="ce14">
            <text:p>RCHOP</text:p>
          </table:table-cell>
          <table:table-cell office:value-type="date" office:date-value="2021-07-27T00:00:00" table:style-name="ce11">
            <text:p>27.07.2021</text:p>
          </table:table-cell>
          <table:table-cell office:value-type="string" table:style-name="ce20">
            <text:p>04.11.2021/po 3 cyklach RCHOP/bardzo dobra odpowiedz na leczenie</text:p>
          </table:table-cell>
          <table:table-cell office:value-type="string" table:style-name="ce1">
            <text:p>18.01.2022/po zakonczeniu leczenia/dobra odpowiedz</text:p>
          </table:table-cell>
          <table:table-cell office:value-type="string" table:style-name="ce1">
            <text:p>24.11.2022/kontrola w celu wykluczenia wznowy/wznaowa choroby</text:p>
          </table:table-cell>
          <table:table-cell office:value-type="string" table:style-name="ce1">
            <text:p>5.06.2023/po zakonczenie II lini leczenie/progresja choroby</text:p>
          </table:table-cell>
          <table:table-cell table:number-columns-repeated="5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Katarzyna<text:s/></text:p>
          </table:table-cell>
          <table:table-cell office:value-type="string" table:style-name="ce1">
            <text:p>Barczyk</text:p>
          </table:table-cell>
          <table:table-cell office:value-type="string" office:string-value="kobieta" table:formula="of:=IF(ISEVEN(MID([.E13];10;1));&quot;kobieta&quot;;&quot;mężczyzna&quot;)" table:style-name="ce1">
            <text:p>kobieta</text:p>
          </table:table-cell>
          <table:table-cell office:value-type="float" office:value="80120208160" table:style-name="ce10">
            <text:p>80120208160</text:p>
          </table:table-cell>
          <table:table-cell office:value-type="date" office:date-value="1980-12-02T00:00:00" table:formula="of:=IF(MID([.E13];3;2)*1&gt;80;DATE(1800+LEFT([.E13];2)*1;MID([.E13];3;2)*1-80;MID([.E13];5;2));IF(MID([.E13];3;2)*1&gt;20;DATE(2000+LEFT([.E13];2)*1;MID([.E13];3;2)*1-20;MID([.E13];5;2));DATE(1900+LEFT([.E13];2)*1;MID([.E13];3;2)*1;MID([.E13];5;2))))" table:style-name="ce11">
            <text:p>02.12.1980</text:p>
          </table:table-cell>
          <table:table-cell office:value-type="float" office:value="41" table:formula="of:=YEAR([.K13])-YEAR([.F13])" table:style-name="ce12">
            <text:p>41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24">
            <text:p>BEACOPP/ABVD/IFRT</text:p>
          </table:table-cell>
          <table:table-cell office:value-type="date" office:date-value="2021-09-20T00:00:00" table:style-name="ce11">
            <text:p>20.09.2021</text:p>
          </table:table-cell>
          <table:table-cell office:value-type="string" table:style-name="ce20">
            <text:p>15.11.20221/w trakcie leczenia/bardzo dobra odpowiedz na leczenie</text:p>
          </table:table-cell>
          <table:table-cell office:value-type="string" table:style-name="ce1">
            <text:p>15.03.2022/po 2 cylkach BEACOPP, 2 cyklach ABVD oraz radioterapi śródpiersia/dobra odpowiedz na leczenie</text:p>
          </table:table-cell>
          <table:table-cell office:value-type="string" table:style-name="ce1">
            <text:p>26.01.2023/po zakonczeniu leczenia/dobra dopowiedxz</text:p>
          </table:table-cell>
          <table:table-cell office:value-type="string" table:style-name="ce1">
            <text:p>8.05.2023/badanie kontrolne/stabilizacja</text:p>
          </table:table-cell>
          <table:table-cell table:number-columns-repeated="5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Agnieszka</text:p>
          </table:table-cell>
          <table:table-cell office:value-type="string" table:style-name="ce1">
            <text:p>Stankiewicz</text:p>
          </table:table-cell>
          <table:table-cell office:value-type="string" office:string-value="kobieta" table:formula="of:=IF(ISEVEN(MID([.E14];10;1));&quot;kobieta&quot;;&quot;mężczyzna&quot;)" table:style-name="ce1">
            <text:p>kobieta</text:p>
          </table:table-cell>
          <table:table-cell office:value-type="float" office:value="90032401506" table:style-name="ce10">
            <text:p>90032401506</text:p>
          </table:table-cell>
          <table:table-cell office:value-type="date" office:date-value="1990-03-24T00:00:00" table:formula="of:=IF(MID([.E14];3;2)*1&gt;80;DATE(1800+LEFT([.E14];2)*1;MID([.E14];3;2)*1-80;MID([.E14];5;2));IF(MID([.E14];3;2)*1&gt;20;DATE(2000+LEFT([.E14];2)*1;MID([.E14];3;2)*1-20;MID([.E14];5;2));DATE(1900+LEFT([.E14];2)*1;MID([.E14];3;2)*1;MID([.E14];5;2))))" table:style-name="ce11">
            <text:p>24.03.1990</text:p>
          </table:table-cell>
          <table:table-cell office:value-type="float" office:value="32" table:formula="of:=YEAR([.K14])-YEAR([.F14])" table:style-name="ce28">
            <text:p>32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24">
            <text:p>ABVD/IFRT</text:p>
          </table:table-cell>
          <table:table-cell office:value-type="date" office:date-value="2022-06-06T00:00:00" table:style-name="ce11">
            <text:p>06.06.2022</text:p>
          </table:table-cell>
          <table:table-cell office:value-type="string" table:style-name="ce20">
            <text:p>23.08.2022/w trakcie leczenia ABVD/dobra odpowiedz</text:p>
          </table:table-cell>
          <table:table-cell office:value-type="string" table:style-name="ce11">
            <text:p>08.11.2022/po chemioterapi, kawlifikacja do IFRT/dobra odpowiedz na leczenie</text:p>
          </table:table-cell>
          <table:table-cell office:value-type="string" table:style-name="ce1">
            <text:p>25.04.2023/po zakonczeniu leczenia/dobra odpowiedz na leczenie</text:p>
          </table:table-cell>
          <table:table-cell table:number-columns-repeated="6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Antoni</text:p>
          </table:table-cell>
          <table:table-cell office:value-type="string" table:style-name="ce1">
            <text:p>Kasprzyk</text:p>
          </table:table-cell>
          <table:table-cell office:value-type="string" office:string-value="mężczyzna" table:formula="of:=IF(ISEVEN(MID([.E15];10;1));&quot;kobieta&quot;;&quot;mężczyzna&quot;)" table:style-name="ce1">
            <text:p>mężczyzna</text:p>
          </table:table-cell>
          <table:table-cell office:value-type="float" office:value="53011317939" table:style-name="ce10">
            <text:p>53011317939</text:p>
          </table:table-cell>
          <table:table-cell office:value-type="date" office:date-value="1953-01-13T00:00:00" table:formula="of:=IF(MID([.E15];3;2)*1&gt;80;DATE(1800+LEFT([.E15];2)*1;MID([.E15];3;2)*1-80;MID([.E15];5;2));IF(MID([.E15];3;2)*1&gt;20;DATE(2000+LEFT([.E15];2)*1;MID([.E15];3;2)*1-20;MID([.E15];5;2));DATE(1900+LEFT([.E15];2)*1;MID([.E15];3;2)*1;MID([.E15];5;2))))" table:style-name="ce11">
            <text:p>13.01.1953</text:p>
          </table:table-cell>
          <table:table-cell office:value-type="float" office:value="67" table:formula="of:=YEAR([.K15])-YEAR([.F15])" table:style-name="ce12">
            <text:p>67</text:p>
          </table:table-cell>
          <table:table-cell table:style-name="ce12"/>
          <table:table-cell office:value-type="string" table:style-name="ce13">
            <text:p>DLBCL chłoniak nieziarniczy</text:p>
          </table:table-cell>
          <table:table-cell office:value-type="string" table:style-name="ce14">
            <text:p>RCHOP</text:p>
          </table:table-cell>
          <table:table-cell office:value-type="date" office:date-value="2020-06-08T00:00:00" table:style-name="ce11">
            <text:p>08.06.2020</text:p>
          </table:table-cell>
          <table:table-cell office:value-type="string" table:style-name="ce15">
            <text:p>19.10.2020/po 4 cyklach/czesciowa odpowiedz na leczenie</text:p>
          </table:table-cell>
          <table:table-cell office:value-type="string" table:style-name="ce1">
            <text:p>3.02.2021/po zakonczenie 8 cykli RCHOP/dobra odpowiedz na lecznie</text:p>
          </table:table-cell>
          <table:table-cell office:value-type="string" table:style-name="ce1">
            <text:p>8.07.2021/kontrola po zakonczeniu leczenia/wznowa</text:p>
          </table:table-cell>
          <table:table-cell office:value-type="string" table:style-name="ce1">
            <text:p>11.10.2021/kontrolo po zakonczeniu leczenia12.2020/stabilizacja</text:p>
          </table:table-cell>
          <table:table-cell office:value-type="string" table:style-name="ce11">
            <text:p>17.05.2022/kontrolo po zakonczeniu leczenia12.2020/stabilizacja</text:p>
          </table:table-cell>
          <table:table-cell office:value-type="string" table:style-name="ce11">
            <text:p>19.09.2022/kontrolo po zakonczeniu leczenia12.2020/wznowa</text:p>
          </table:table-cell>
          <table:table-cell office:value-type="string" table:style-name="ce1">
            <text:p>24.04.2023/kontrolo po zakonczeniu leczenia12.2020/wznowa</text:p>
          </table:table-cell>
          <table:table-cell table:number-columns-repeated="2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float" office:value="15" table:style-name="ce29">
            <text:p>15</text:p>
          </table:table-cell>
          <table:table-cell office:value-type="string" table:style-name="ce30">
            <text:p>Mateusz<text:s/></text:p>
          </table:table-cell>
          <table:table-cell office:value-type="string" table:style-name="ce30">
            <text:p>Król</text:p>
          </table:table-cell>
          <table:table-cell office:value-type="string" office:string-value="mężczyzna" table:formula="of:=IF(ISEVEN(MID([.E16];10;1));&quot;kobieta&quot;;&quot;mężczyzna&quot;)" table:style-name="ce1">
            <text:p>mężczyzna</text:p>
          </table:table-cell>
          <table:table-cell office:value-type="float" office:value="96072709211" table:style-name="ce31">
            <text:p>96072709211</text:p>
          </table:table-cell>
          <table:table-cell office:value-type="date" office:date-value="1996-07-27T00:00:00" table:formula="of:=IF(MID([.E16];3;2)*1&gt;80;DATE(1800+LEFT([.E16];2)*1;MID([.E16];3;2)*1-80;MID([.E16];5;2));IF(MID([.E16];3;2)*1&gt;20;DATE(2000+LEFT([.E16];2)*1;MID([.E16];3;2)*1-20;MID([.E16];5;2));DATE(1900+LEFT([.E16];2)*1;MID([.E16];3;2)*1;MID([.E16];5;2))))" table:style-name="ce11">
            <text:p>27.07.1996</text:p>
          </table:table-cell>
          <table:table-cell office:value-type="float" office:value="26" table:formula="of:=YEAR([.K16])-YEAR([.F16])" table:style-name="ce12">
            <text:p>26</text:p>
          </table:table-cell>
          <table:table-cell table:style-name="ce12"/>
          <table:table-cell office:value-type="string" table:style-name="ce30">
            <text:p>Chłoniak Hodgkina ziarnica złośliwa</text:p>
          </table:table-cell>
          <table:table-cell office:value-type="string" table:style-name="ce30">
            <text:p>IFRT</text:p>
          </table:table-cell>
          <table:table-cell office:value-type="date" office:date-value="2022-09-29T00:00:00" table:style-name="ce32">
            <text:p>29.09.2022</text:p>
          </table:table-cell>
          <table:table-cell office:value-type="string" table:style-name="ce30">
            <text:p>20.03.2023/po zakonczeniu IFRT/dobra odpowiedź na leczenie</text:p>
          </table:table-cell>
          <table:table-cell table:number-columns-repeated="8" table:style-name="ce30"/>
          <table:table-cell table:style-name="ce33"/>
          <table:table-cell table:number-columns-repeated="16363" table:style-name="ce30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Józef</text:p>
          </table:table-cell>
          <table:table-cell office:value-type="string" table:style-name="ce1">
            <text:p>Okła</text:p>
          </table:table-cell>
          <table:table-cell office:value-type="string" office:string-value="mężczyzna" table:formula="of:=IF(ISEVEN(MID([.E17];10;1));&quot;kobieta&quot;;&quot;mężczyzna&quot;)" table:style-name="ce1">
            <text:p>mężczyzna</text:p>
          </table:table-cell>
          <table:table-cell office:value-type="string" table:style-name="ce10">
            <text:p>49031805132</text:p>
          </table:table-cell>
          <table:table-cell office:value-type="date" office:date-value="1949-03-18T00:00:00" table:formula="of:=IF(MID([.E17];3;2)*1&gt;80;DATE(1800+LEFT([.E17];2)*1;MID([.E17];3;2)*1-80;MID([.E17];5;2));IF(MID([.E17];3;2)*1&gt;20;DATE(2000+LEFT([.E17];2)*1;MID([.E17];3;2)*1-20;MID([.E17];5;2));DATE(1900+LEFT([.E17];2)*1;MID([.E17];3;2)*1;MID([.E17];5;2))))" table:style-name="ce11">
            <text:p>18.03.1949</text:p>
          </table:table-cell>
          <table:table-cell office:value-type="float" office:value="73" table:formula="of:=YEAR([.K17])-YEAR([.F17])" table:style-name="ce12">
            <text:p>73</text:p>
          </table:table-cell>
          <table:table-cell table:style-name="ce12"/>
          <table:table-cell office:value-type="string" table:style-name="ce13">
            <text:p>DLBCL Chłoniak nieziarniczy</text:p>
          </table:table-cell>
          <table:table-cell office:value-type="string" table:style-name="ce14">
            <text:p>RCHOP</text:p>
          </table:table-cell>
          <table:table-cell office:value-type="date" office:date-value="2022-05-19T00:00:00" table:style-name="ce11">
            <text:p>19.05.2022</text:p>
          </table:table-cell>
          <table:table-cell office:value-type="string" table:style-name="ce20">
            <text:p>13.12.2022/po 4 cyklach RCHOP/dobra odpowiedz na leczenie</text:p>
          </table:table-cell>
          <table:table-cell office:value-type="string" table:style-name="ce1">
            <text:p>28.03.2023/po 6 cyklach RCHOP, zakonczone leczenie/dobra odpowiedz n a leczenie</text:p>
          </table:table-cell>
          <table:table-cell table:number-columns-repeated="7" table:style-name="ce1"/>
          <table:table-cell table:style-name="ce16"/>
          <table:table-cell table:number-columns-repeated="16363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34">
            <text:p>Oleksandr</text:p>
          </table:table-cell>
          <table:table-cell office:value-type="string" table:style-name="ce34">
            <text:p>Zakrevskyi</text:p>
          </table:table-cell>
          <table:table-cell office:value-type="string" office:string-value="mężczyzna" table:formula="of:=IF(ISEVEN(MID([.E18];10;1));&quot;kobieta&quot;;&quot;mężczyzna&quot;)" table:style-name="ce1">
            <text:p>mężczyzna</text:p>
          </table:table-cell>
          <table:table-cell office:value-type="string" table:style-name="ce35">
            <text:p>91040520492</text:p>
          </table:table-cell>
          <table:table-cell office:value-type="date" office:date-value="1991-04-05T00:00:00" table:formula="of:=IF(MID([.E18];3;2)*1&gt;80;DATE(1800+LEFT([.E18];2)*1;MID([.E18];3;2)*1-80;MID([.E18];5;2));IF(MID([.E18];3;2)*1&gt;20;DATE(2000+LEFT([.E18];2)*1;MID([.E18];3;2)*1-20;MID([.E18];5;2));DATE(1900+LEFT([.E18];2)*1;MID([.E18];3;2)*1;MID([.E18];5;2))))" table:style-name="ce11">
            <text:p>05.04.1991</text:p>
          </table:table-cell>
          <table:table-cell office:value-type="float" office:value="31" table:formula="of:=YEAR([.K18])-YEAR([.F18])" table:style-name="ce28">
            <text:p>31</text:p>
          </table:table-cell>
          <table:table-cell table:style-name="ce12"/>
          <table:table-cell office:value-type="string" table:style-name="ce36">
            <text:p>Chłoniak z komórek B</text:p>
          </table:table-cell>
          <table:table-cell office:value-type="string" table:style-name="ce34">
            <text:p>RCHOP/IFRT</text:p>
          </table:table-cell>
          <table:table-cell office:value-type="date" office:date-value="2022-05-12T00:00:00" table:style-name="ce37">
            <text:p>12.05.2022</text:p>
          </table:table-cell>
          <table:table-cell office:value-type="string" table:style-name="ce38">
            <text:p>28.06.2022/ po 4 cyklach leczenia/ dobra odpowiedź</text:p>
          </table:table-cell>
          <table:table-cell office:value-type="string" table:style-name="ce34">
            <text:p>12.09.2022/po 6 cyklach leczenia/ dobra odpowiedź na leczenie</text:p>
          </table:table-cell>
          <table:table-cell office:value-type="string" table:style-name="ce34">
            <text:p>6.02.2023/ 3 msc po zakonczeniu IFRT/dobra odpowiedź na leczenie</text:p>
          </table:table-cell>
          <table:table-cell office:value-type="string" table:style-name="ce34">
            <text:p>16.05.2023/po zakonczeniu IFRT/ dobra odpowiedź na lecznie</text:p>
          </table:table-cell>
          <table:table-cell table:number-columns-repeated="5" table:style-name="ce34"/>
          <table:table-cell table:style-name="ce39"/>
          <table:table-cell table:number-columns-repeated="16363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Dorota<text:s/></text:p>
          </table:table-cell>
          <table:table-cell office:value-type="string" table:style-name="ce1">
            <text:p>Wróbel</text:p>
          </table:table-cell>
          <table:table-cell office:value-type="string" office:string-value="kobieta" table:formula="of:=IF(ISEVEN(MID([.E19];10;1));&quot;kobieta&quot;;&quot;mężczyzna&quot;)" table:style-name="ce1">
            <text:p>kobieta</text:p>
          </table:table-cell>
          <table:table-cell office:value-type="string" table:style-name="ce10">
            <text:p>66091705404</text:p>
          </table:table-cell>
          <table:table-cell office:value-type="date" office:date-value="1966-09-17T00:00:00" table:formula="of:=IF(MID([.E19];3;2)*1&gt;80;DATE(1800+LEFT([.E19];2)*1;MID([.E19];3;2)*1-80;MID([.E19];5;2));IF(MID([.E19];3;2)*1&gt;20;DATE(2000+LEFT([.E19];2)*1;MID([.E19];3;2)*1-20;MID([.E19];5;2));DATE(1900+LEFT([.E19];2)*1;MID([.E19];3;2)*1;MID([.E19];5;2))))" table:style-name="ce11">
            <text:p>17.09.1966</text:p>
          </table:table-cell>
          <table:table-cell office:value-type="float" office:value="55" table:formula="of:=YEAR([.K19])-YEAR([.F19])" table:style-name="ce17">
            <text:p>55</text:p>
          </table:table-cell>
          <table:table-cell table:style-name="ce12"/>
          <table:table-cell office:value-type="string" table:style-name="ce13">
            <text:p>Chłoniak nieziarniczy grudkowy</text:p>
          </table:table-cell>
          <table:table-cell office:value-type="string" table:style-name="ce1">
            <text:p>CVP</text:p>
          </table:table-cell>
          <table:table-cell office:value-type="date" office:date-value="2021-11-22T00:00:00" table:style-name="ce11">
            <text:p>22.11.2021</text:p>
          </table:table-cell>
          <table:table-cell office:value-type="string" table:style-name="ce20">
            <text:p>4.04.2022/po 3 cyklach leczenia/bardzo dobra odpowiedź na leczenie</text:p>
          </table:table-cell>
          <table:table-cell office:value-type="string" table:style-name="ce1">
            <text:p>9.08.2022/po zakonczeniu leczenia/ bardzo dobra odpowiedz na leczenie</text:p>
          </table:table-cell>
          <table:table-cell office:value-type="string" table:style-name="ce1">
            <text:p>16.03.2023/po zakończeniu leczenia/dobra odpowiedz na lecznie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Elżbieta<text:s/></text:p>
          </table:table-cell>
          <table:table-cell office:value-type="string" table:style-name="ce1">
            <text:p>ściobłowska</text:p>
          </table:table-cell>
          <table:table-cell office:value-type="string" office:string-value="kobieta" table:formula="of:=IF(ISEVEN(MID([.E20];10;1));&quot;kobieta&quot;;&quot;mężczyzna&quot;)" table:style-name="ce1">
            <text:p>kobieta</text:p>
          </table:table-cell>
          <table:table-cell office:value-type="float" office:value="50080305368" table:style-name="ce10">
            <text:p>50080305368</text:p>
          </table:table-cell>
          <table:table-cell office:value-type="date" office:date-value="1950-08-03T00:00:00" table:formula="of:=IF(MID([.E20];3;2)*1&gt;80;DATE(1800+LEFT([.E20];2)*1;MID([.E20];3;2)*1-80;MID([.E20];5;2));IF(MID([.E20];3;2)*1&gt;20;DATE(2000+LEFT([.E20];2)*1;MID([.E20];3;2)*1-20;MID([.E20];5;2));DATE(1900+LEFT([.E20];2)*1;MID([.E20];3;2)*1;MID([.E20];5;2))))" table:style-name="ce11">
            <text:p>03.08.1950</text:p>
          </table:table-cell>
          <table:table-cell office:value-type="float" office:value="72" table:formula="of:=YEAR([.K20])-YEAR([.F20])" table:style-name="ce12">
            <text:p>72</text:p>
          </table:table-cell>
          <table:table-cell table:style-name="ce12"/>
          <table:table-cell office:value-type="string" table:style-name="ce13">
            <text:p>Obwodowy chłoniak z komórek T</text:p>
          </table:table-cell>
          <table:table-cell office:value-type="string" table:style-name="ce1">
            <text:p>CHOP<text:s/></text:p>
          </table:table-cell>
          <table:table-cell office:value-type="date" office:date-value="2022-04-28T00:00:00" table:style-name="ce11">
            <text:p>28.04.2022</text:p>
          </table:table-cell>
          <table:table-cell office:value-type="string" table:style-name="ce20">
            <text:p>14.07.2022/po 2 cyklach CHOP/bardzo dobra odpowiedź na leczenie</text:p>
          </table:table-cell>
          <table:table-cell office:value-type="string" table:style-name="ce1">
            <text:p>27.10.2022/PO ZAKOŃCZENIU /dobra odpowei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Eweina</text:p>
          </table:table-cell>
          <table:table-cell office:value-type="string" table:style-name="ce1">
            <text:p>Strzyż</text:p>
          </table:table-cell>
          <table:table-cell office:value-type="string" office:string-value="kobieta" table:formula="of:=IF(ISEVEN(MID([.E21];10;1));&quot;kobieta&quot;;&quot;mężczyzna&quot;)" table:style-name="ce1">
            <text:p>kobieta</text:p>
          </table:table-cell>
          <table:table-cell office:value-type="string" table:style-name="ce10">
            <text:p>86111008821</text:p>
          </table:table-cell>
          <table:table-cell office:value-type="date" office:date-value="1986-11-10T00:00:00" table:formula="of:=IF(MID([.E21];3;2)*1&gt;80;DATE(1800+LEFT([.E21];2)*1;MID([.E21];3;2)*1-80;MID([.E21];5;2));IF(MID([.E21];3;2)*1&gt;20;DATE(2000+LEFT([.E21];2)*1;MID([.E21];3;2)*1-20;MID([.E21];5;2));DATE(1900+LEFT([.E21];2)*1;MID([.E21];3;2)*1;MID([.E21];5;2))))" table:style-name="ce11">
            <text:p>10.11.1986</text:p>
          </table:table-cell>
          <table:table-cell office:value-type="float" office:value="36" table:formula="of:=YEAR([.K21])-YEAR([.F21])" table:style-name="ce28">
            <text:p>36</text:p>
          </table:table-cell>
          <table:table-cell table:style-name="ce12"/>
          <table:table-cell office:value-type="string" table:style-name="ce13">
            <text:p>Obwodowy chłoniak z komórek T</text:p>
          </table:table-cell>
          <table:table-cell office:value-type="string" table:style-name="ce1">
            <text:p>CHOEP</text:p>
          </table:table-cell>
          <table:table-cell office:value-type="date" office:date-value="2022-11-08T00:00:00" table:style-name="ce11">
            <text:p>08.11.2022</text:p>
          </table:table-cell>
          <table:table-cell office:value-type="string" table:style-name="ce15">
            <text:p>14.02.2023/po 3 cyklach/czesciowa odpowiedz</text:p>
          </table:table-cell>
          <table:table-cell office:value-type="string" table:style-name="ce1">
            <text:p>16.05.2023/po 6 cyklach leczenia/dobra odpowie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string" table:style-name="ce1">
            <text:p>Małgorzata<text:s/></text:p>
          </table:table-cell>
          <table:table-cell office:value-type="string" table:style-name="ce1">
            <text:p>stachera</text:p>
          </table:table-cell>
          <table:table-cell office:value-type="string" office:string-value="kobieta" table:formula="of:=IF(ISEVEN(MID([.E22];10;1));&quot;kobieta&quot;;&quot;mężczyzna&quot;)" table:style-name="ce1">
            <text:p>kobieta</text:p>
          </table:table-cell>
          <table:table-cell office:value-type="float" office:value="72022100325" table:style-name="ce10">
            <text:p>72022100325</text:p>
          </table:table-cell>
          <table:table-cell office:value-type="date" office:date-value="1972-02-21T00:00:00" table:formula="of:=IF(MID([.E22];3;2)*1&gt;80;DATE(1800+LEFT([.E22];2)*1;MID([.E22];3;2)*1-80;MID([.E22];5;2));IF(MID([.E22];3;2)*1&gt;20;DATE(2000+LEFT([.E22];2)*1;MID([.E22];3;2)*1-20;MID([.E22];5;2));DATE(1900+LEFT([.E22];2)*1;MID([.E22];3;2)*1;MID([.E22];5;2))))" table:style-name="ce11">
            <text:p>21.02.1972</text:p>
          </table:table-cell>
          <table:table-cell office:value-type="float" office:value="49" table:formula="of:=YEAR([.K22])-YEAR([.F22])" table:style-name="ce12">
            <text:p>49</text:p>
          </table:table-cell>
          <table:table-cell table:style-name="ce12"/>
          <table:table-cell office:value-type="string" table:style-name="ce13">
            <text:p>Chłoniak z komórek B</text:p>
          </table:table-cell>
          <table:table-cell office:value-type="string" table:style-name="ce1">
            <text:p>RCHOP</text:p>
          </table:table-cell>
          <table:table-cell office:value-type="date" office:date-value="2021-05-13T00:00:00" table:style-name="ce11">
            <text:p>13.05.2021</text:p>
          </table:table-cell>
          <table:table-cell office:value-type="string" table:style-name="ce40">
            <text:p>26.07.2021/ po 3 cyklach/ bardzo dobra odpowedz na leczenie</text:p>
          </table:table-cell>
          <table:table-cell office:value-type="string" table:style-name="ce1">
            <text:p>4.10.2021/po zakonczeniu leczenia/bardzo dobra odpowiedz na leczenie</text:p>
          </table:table-cell>
          <table:table-cell office:value-type="string" table:style-name="ce1">
            <text:p>31.01.2022/ kontrola po zakonczeniu leczenia/prograsja, nawrót<text:s/>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Słota</text:p>
          </table:table-cell>
          <table:table-cell office:value-type="string" office:string-value="mężczyzna" table:formula="of:=IF(ISEVEN(MID([.E23];10;1));&quot;kobieta&quot;;&quot;mężczyzna&quot;)" table:style-name="ce1">
            <text:p>mężczyzna</text:p>
          </table:table-cell>
          <table:table-cell office:value-type="float" office:value="59071412618" table:style-name="ce10">
            <text:p>59071412618</text:p>
          </table:table-cell>
          <table:table-cell office:value-type="date" office:date-value="1959-07-14T00:00:00" table:formula="of:=IF(MID([.E23];3;2)*1&gt;80;DATE(1800+LEFT([.E23];2)*1;MID([.E23];3;2)*1-80;MID([.E23];5;2));IF(MID([.E23];3;2)*1&gt;20;DATE(2000+LEFT([.E23];2)*1;MID([.E23];3;2)*1-20;MID([.E23];5;2));DATE(1900+LEFT([.E23];2)*1;MID([.E23];3;2)*1;MID([.E23];5;2))))" table:style-name="ce11">
            <text:p>14.07.1959</text:p>
          </table:table-cell>
          <table:table-cell office:value-type="float" office:value="63" table:formula="of:=YEAR([.K23])-YEAR([.F23])" table:style-name="ce12">
            <text:p>63</text:p>
          </table:table-cell>
          <table:table-cell table:style-name="ce12"/>
          <table:table-cell office:value-type="string" table:style-name="ce13">
            <text:p>Chłoniak z komórek płaszcza</text:p>
          </table:table-cell>
          <table:table-cell office:value-type="string" table:style-name="ce1">
            <text:p>RCHOP/RHAD</text:p>
          </table:table-cell>
          <table:table-cell office:value-type="date" office:date-value="2022-04-14T00:00:00" table:style-name="ce11">
            <text:p>14.04.2022</text:p>
          </table:table-cell>
          <table:table-cell office:value-type="string" table:style-name="ce20">
            <text:p>22.08.2022/po 2 cyklach/dobra odpowiedz</text:p>
          </table:table-cell>
          <table:table-cell office:value-type="string" table:style-name="ce1">
            <text:p>1.12.2022/po zakonczeniu leczenia/dobra odpowiedź</text:p>
          </table:table-cell>
          <table:table-cell office:value-type="string" table:style-name="ce1">
            <text:p>1.06.2023/kontrola po zakonczeniu leczenia/dobra odpoweidz na leczenie</text:p>
          </table:table-cell>
          <table:table-cell table:number-columns-repeated="16370" table:style-name="ce1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string" table:style-name="ce1">
            <text:p>antoni</text:p>
          </table:table-cell>
          <table:table-cell office:value-type="string" table:style-name="ce1">
            <text:p>sajdak</text:p>
          </table:table-cell>
          <table:table-cell office:value-type="string" office:string-value="mężczyzna" table:formula="of:=IF(ISEVEN(MID([.E24];10;1));&quot;kobieta&quot;;&quot;mężczyzna&quot;)" table:style-name="ce1">
            <text:p>mężczyzna</text:p>
          </table:table-cell>
          <table:table-cell office:value-type="float" office:value="43080103814" table:style-name="ce10">
            <text:p>43080103814</text:p>
          </table:table-cell>
          <table:table-cell office:value-type="date" office:date-value="1943-08-01T00:00:00" table:formula="of:=IF(MID([.E24];3;2)*1&gt;80;DATE(1800+LEFT([.E24];2)*1;MID([.E24];3;2)*1-80;MID([.E24];5;2));IF(MID([.E24];3;2)*1&gt;20;DATE(2000+LEFT([.E24];2)*1;MID([.E24];3;2)*1-20;MID([.E24];5;2));DATE(1900+LEFT([.E24];2)*1;MID([.E24];3;2)*1;MID([.E24];5;2))))" table:style-name="ce11">
            <text:p>01.08.1943</text:p>
          </table:table-cell>
          <table:table-cell office:value-type="float" office:value="78" table:formula="of:=YEAR([.K24])-YEAR([.F24])" table:style-name="ce12">
            <text:p>78</text:p>
          </table:table-cell>
          <table:table-cell table:style-name="ce12"/>
          <table:table-cell office:value-type="string" table:style-name="ce13">
            <text:p>chłoniak z komorek płaszcza</text:p>
          </table:table-cell>
          <table:table-cell office:value-type="string" table:style-name="ce1">
            <text:p>RCHOP</text:p>
          </table:table-cell>
          <table:table-cell office:value-type="date" office:date-value="2021-08-09T00:00:00" table:style-name="ce11">
            <text:p>09.08.2021</text:p>
          </table:table-cell>
          <table:table-cell office:value-type="string" table:style-name="ce15">
            <text:p>23.12.2021/po 3 cyklach leczenia/ dobra odpowiedź na leczenie</text:p>
          </table:table-cell>
          <table:table-cell office:value-type="string" table:style-name="ce1">
            <text:p>4.04.2022/po zakonczeniu leczenia/dobra dopowiedx</text:p>
          </table:table-cell>
          <table:table-cell office:value-type="string" table:style-name="ce1">
            <text:p>6.12.2022/kontrola/ dobra odpowiedź na leczenie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string" table:style-name="ce1">
            <text:p>Marek</text:p>
          </table:table-cell>
          <table:table-cell office:value-type="string" table:style-name="ce1">
            <text:p>Rzepka</text:p>
          </table:table-cell>
          <table:table-cell office:value-type="string" office:string-value="mężczyzna" table:formula="of:=IF(ISEVEN(MID([.E25];10;1));&quot;kobieta&quot;;&quot;mężczyzna&quot;)" table:style-name="ce1">
            <text:p>mężczyzna</text:p>
          </table:table-cell>
          <table:table-cell office:value-type="float" office:value="50061103895" table:style-name="ce10">
            <text:p>50061103895</text:p>
          </table:table-cell>
          <table:table-cell office:value-type="date" office:date-value="1950-06-11T00:00:00" table:formula="of:=IF(MID([.E25];3;2)*1&gt;80;DATE(1800+LEFT([.E25];2)*1;MID([.E25];3;2)*1-80;MID([.E25];5;2));IF(MID([.E25];3;2)*1&gt;20;DATE(2000+LEFT([.E25];2)*1;MID([.E25];3;2)*1-20;MID([.E25];5;2));DATE(1900+LEFT([.E25];2)*1;MID([.E25];3;2)*1;MID([.E25];5;2))))" table:style-name="ce11">
            <text:p>11.06.1950</text:p>
          </table:table-cell>
          <table:table-cell office:value-type="float" office:value="71" table:formula="of:=YEAR([.K25])-YEAR([.F25])" table:style-name="ce12">
            <text:p>71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BGD</text:p>
          </table:table-cell>
          <table:table-cell office:value-type="date" office:date-value="2021-05-13T00:00:00" table:style-name="ce11">
            <text:p>13.05.2021</text:p>
          </table:table-cell>
          <table:table-cell office:value-type="string" table:style-name="ce20">
            <text:p>29.07.2021/po 2 cyklach/dobra odpowiedz na leczenie</text:p>
          </table:table-cell>
          <table:table-cell office:value-type="string" table:style-name="ce1">
            <text:p>21.09.2021/po 4 cyklach leczenia/dobra odpowiedx nal leczenie</text:p>
          </table:table-cell>
          <table:table-cell office:value-type="string" table:style-name="ce1">
            <text:p>30.08.2022/po zakonczeniu leczenia/wznowa choroby</text:p>
          </table:table-cell>
          <table:table-cell office:value-type="string" table:style-name="ce1">
            <text:p>1.06.2023/kontrola/progresja choroby</text:p>
          </table:table-cell>
          <table:table-cell table:number-columns-repeated="16369" table:style-name="ce1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string" table:style-name="ce1">
            <text:p>Karolina</text:p>
          </table:table-cell>
          <table:table-cell office:value-type="string" table:style-name="ce1">
            <text:p>Radwanska-zajac</text:p>
          </table:table-cell>
          <table:table-cell office:value-type="string" office:string-value="kobieta" table:formula="of:=IF(ISEVEN(MID([.E26];10;1));&quot;kobieta&quot;;&quot;mężczyzna&quot;)" table:style-name="ce1">
            <text:p>kobieta</text:p>
          </table:table-cell>
          <table:table-cell office:value-type="float" office:value="95072406081" table:style-name="ce10">
            <text:p>95072406081</text:p>
          </table:table-cell>
          <table:table-cell office:value-type="date" office:date-value="1995-07-24T00:00:00" table:formula="of:=IF(MID([.E26];3;2)*1&gt;80;DATE(1800+LEFT([.E26];2)*1;MID([.E26];3;2)*1-80;MID([.E26];5;2));IF(MID([.E26];3;2)*1&gt;20;DATE(2000+LEFT([.E26];2)*1;MID([.E26];3;2)*1-20;MID([.E26];5;2));DATE(1900+LEFT([.E26];2)*1;MID([.E26];3;2)*1;MID([.E26];5;2))))" table:style-name="ce11">
            <text:p>24.07.1995</text:p>
          </table:table-cell>
          <table:table-cell office:value-type="float" office:value="26" table:formula="of:=YEAR([.K26])-YEAR([.F26])" table:style-name="ce12">
            <text:p>26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</text:p>
          </table:table-cell>
          <table:table-cell office:value-type="date" office:date-value="2021-11-29T00:00:00" table:style-name="ce11">
            <text:p>29.11.2021</text:p>
          </table:table-cell>
          <table:table-cell office:value-type="string" table:style-name="ce15">
            <text:p>17.02.2022/po 2 cyklach/ progresja choroby</text:p>
          </table:table-cell>
          <table:table-cell office:value-type="string" table:style-name="ce1">
            <text:p>17.05.2022/badanie po zakonczeniu leczenia/czesciowa odpowiedx</text:p>
          </table:table-cell>
          <table:table-cell office:value-type="string" table:style-name="ce1">
            <text:p>18.07.2022/po zakonczeniu leczenia/czesciowa odpowied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string" table:style-name="ce1">
            <text:p>RENATA</text:p>
          </table:table-cell>
          <table:table-cell office:value-type="string" table:style-name="ce1">
            <text:p>PIROWSKA</text:p>
          </table:table-cell>
          <table:table-cell office:value-type="string" office:string-value="kobieta" table:formula="of:=IF(ISEVEN(MID([.E27];10;1));&quot;kobieta&quot;;&quot;mężczyzna&quot;)" table:style-name="ce1">
            <text:p>kobieta</text:p>
          </table:table-cell>
          <table:table-cell office:value-type="float" office:value="72021216087" table:style-name="ce10">
            <text:p>72021216087</text:p>
          </table:table-cell>
          <table:table-cell office:value-type="date" office:date-value="1972-02-12T00:00:00" table:formula="of:=IF(MID([.E27];3;2)*1&gt;80;DATE(1800+LEFT([.E27];2)*1;MID([.E27];3;2)*1-80;MID([.E27];5;2));IF(MID([.E27];3;2)*1&gt;20;DATE(2000+LEFT([.E27];2)*1;MID([.E27];3;2)*1-20;MID([.E27];5;2));DATE(1900+LEFT([.E27];2)*1;MID([.E27];3;2)*1;MID([.E27];5;2))))" table:style-name="ce11">
            <text:p>12.02.1972</text:p>
          </table:table-cell>
          <table:table-cell office:value-type="float" office:value="49" table:formula="of:=YEAR([.K27])-YEAR([.F27])" table:style-name="ce12">
            <text:p>49</text:p>
          </table:table-cell>
          <table:table-cell table:style-name="ce12"/>
          <table:table-cell office:value-type="string" table:style-name="ce13">
            <text:p>CHŁONIAK NIEZIARNICZY ROZLANY</text:p>
          </table:table-cell>
          <table:table-cell office:value-type="string" table:style-name="ce1">
            <text:p>RDAEPOCH/MTX</text:p>
          </table:table-cell>
          <table:table-cell office:value-type="date" office:date-value="2021-05-27T00:00:00" table:style-name="ce11">
            <text:p>27.05.2021</text:p>
          </table:table-cell>
          <table:table-cell office:value-type="string" table:style-name="ce20">
            <text:p>17.08.2021/PO 3 CYKLACH/DOBRA ODPOWIEDZ NA LECZENIE</text:p>
          </table:table-cell>
          <table:table-cell office:value-type="string" table:style-name="ce1">
            <text:p>9.11.2021/PO ZAKONCZENIU LECZENIA/ dobra dopowiedz</text:p>
          </table:table-cell>
          <table:table-cell table:number-columns-repeated="16371" table:style-name="ce1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Dorota<text:s/></text:p>
          </table:table-cell>
          <table:table-cell office:value-type="string" table:style-name="ce1">
            <text:p>PIETRAS</text:p>
          </table:table-cell>
          <table:table-cell office:value-type="string" office:string-value="kobieta" table:formula="of:=IF(ISEVEN(MID([.E28];10;1));&quot;kobieta&quot;;&quot;mężczyzna&quot;)" table:style-name="ce1">
            <text:p>kobieta</text:p>
          </table:table-cell>
          <table:table-cell office:value-type="float" office:value="65041813004" table:style-name="ce10">
            <text:p>65041813004</text:p>
          </table:table-cell>
          <table:table-cell office:value-type="date" office:date-value="1965-04-18T00:00:00" table:formula="of:=IF(MID([.E28];3;2)*1&gt;80;DATE(1800+LEFT([.E28];2)*1;MID([.E28];3;2)*1-80;MID([.E28];5;2));IF(MID([.E28];3;2)*1&gt;20;DATE(2000+LEFT([.E28];2)*1;MID([.E28];3;2)*1-20;MID([.E28];5;2));DATE(1900+LEFT([.E28];2)*1;MID([.E28];3;2)*1;MID([.E28];5;2))))" table:style-name="ce11">
            <text:p>18.04.1965</text:p>
          </table:table-cell>
          <table:table-cell office:value-type="float" office:value="57" table:formula="of:=YEAR([.K28])-YEAR([.F28])" table:style-name="ce17">
            <text:p>57</text:p>
          </table:table-cell>
          <table:table-cell table:style-name="ce12"/>
          <table:table-cell office:value-type="string" table:style-name="ce13">
            <text:p>Chłoniak obwodowy i skóry z komórek T</text:p>
          </table:table-cell>
          <table:table-cell office:value-type="string" table:style-name="ce1">
            <text:p>CHOEP</text:p>
          </table:table-cell>
          <table:table-cell office:value-type="date" office:date-value="2022-11-21T00:00:00" table:style-name="ce11">
            <text:p>21.11.2022</text:p>
          </table:table-cell>
          <table:table-cell office:value-type="string" table:style-name="ce15">
            <text:p>31.01.2023/po 3 cyklach/prograsja</text:p>
          </table:table-cell>
          <table:table-cell office:value-type="string" table:style-name="ce1">
            <text:p>8.05.2023/po zakonczeniu leczenia/dobra odpowiedź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ryszard</text:p>
          </table:table-cell>
          <table:table-cell office:value-type="string" table:style-name="ce1">
            <text:p>paszko</text:p>
          </table:table-cell>
          <table:table-cell office:value-type="string" office:string-value="mężczyzna" table:formula="of:=IF(ISEVEN(MID([.E29];10;1));&quot;kobieta&quot;;&quot;mężczyzna&quot;)" table:style-name="ce1">
            <text:p>mężczyzna</text:p>
          </table:table-cell>
          <table:table-cell office:value-type="float" office:value="54070108074" table:style-name="ce10">
            <text:p>54070108074</text:p>
          </table:table-cell>
          <table:table-cell office:value-type="date" office:date-value="1954-07-01T00:00:00" table:formula="of:=IF(MID([.E29];3;2)*1&gt;80;DATE(1800+LEFT([.E29];2)*1;MID([.E29];3;2)*1-80;MID([.E29];5;2));IF(MID([.E29];3;2)*1&gt;20;DATE(2000+LEFT([.E29];2)*1;MID([.E29];3;2)*1-20;MID([.E29];5;2));DATE(1900+LEFT([.E29];2)*1;MID([.E29];3;2)*1;MID([.E29];5;2))))" table:style-name="ce11">
            <text:p>01.07.1954</text:p>
          </table:table-cell>
          <table:table-cell office:value-type="float" office:value="68" table:formula="of:=YEAR([.K29])-YEAR([.F29])" table:style-name="ce12">
            <text:p>68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</text:p>
          </table:table-cell>
          <table:table-cell office:value-type="date" office:date-value="2022-03-14T00:00:00" table:style-name="ce11">
            <text:p>14.03.2022</text:p>
          </table:table-cell>
          <table:table-cell office:value-type="string" table:style-name="ce20">
            <text:p>6.07.2022/wczesna ocena odpowiedzi, po 2 cyklach/bardzo dobra odpowiedz na leczenie</text:p>
          </table:table-cell>
          <table:table-cell office:value-type="string" table:style-name="ce1">
            <text:p>8.09.2022/po zakonczeniu leczenia/ dobra odpowiedź na leczenie/ stabilizacja</text:p>
          </table:table-cell>
          <table:table-cell table:number-columns-repeated="16371" table:style-name="ce1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ewa</text:p>
          </table:table-cell>
          <table:table-cell office:value-type="string" table:style-name="ce1">
            <text:p>pańszczyk</text:p>
          </table:table-cell>
          <table:table-cell office:value-type="string" office:string-value="kobieta" table:formula="of:=IF(ISEVEN(MID([.E30];10;1));&quot;kobieta&quot;;&quot;mężczyzna&quot;)" table:style-name="ce1">
            <text:p>kobieta</text:p>
          </table:table-cell>
          <table:table-cell office:value-type="float" office:value="61061502485" table:style-name="ce10">
            <text:p>61061502485</text:p>
          </table:table-cell>
          <table:table-cell office:value-type="date" office:date-value="1961-06-15T00:00:00" table:formula="of:=IF(MID([.E30];3;2)*1&gt;80;DATE(1800+LEFT([.E30];2)*1;MID([.E30];3;2)*1-80;MID([.E30];5;2));IF(MID([.E30];3;2)*1&gt;20;DATE(2000+LEFT([.E30];2)*1;MID([.E30];3;2)*1-20;MID([.E30];5;2));DATE(1900+LEFT([.E30];2)*1;MID([.E30];3;2)*1;MID([.E30];5;2))))" table:style-name="ce11">
            <text:p>15.06.1961</text:p>
          </table:table-cell>
          <table:table-cell office:value-type="float" office:value="60" table:formula="of:=YEAR([.K30])-YEAR([.F30])" table:style-name="ce17">
            <text:p>60</text:p>
          </table:table-cell>
          <table:table-cell table:style-name="ce12"/>
          <table:table-cell office:value-type="string" table:style-name="ce13">
            <text:p>chłoniak z obwodowych komóek B</text:p>
          </table:table-cell>
          <table:table-cell office:value-type="string" table:style-name="ce1">
            <text:p>CHOP</text:p>
          </table:table-cell>
          <table:table-cell office:value-type="date" office:date-value="2021-09-28T00:00:00" table:style-name="ce11">
            <text:p>28.09.2021</text:p>
          </table:table-cell>
          <table:table-cell office:value-type="string" table:style-name="ce20">
            <text:p>28.12.2021/po 3 cyklach CHOP/dobra odpowiedź</text:p>
          </table:table-cell>
          <table:table-cell office:value-type="string" table:style-name="ce1">
            <text:p>31.03.2022/po zakonczeniu leczenia/dobra dopowie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Anna<text:s/></text:p>
          </table:table-cell>
          <table:table-cell office:value-type="string" table:style-name="ce1">
            <text:p>Paluch</text:p>
          </table:table-cell>
          <table:table-cell office:value-type="string" office:string-value="kobieta" table:formula="of:=IF(ISEVEN(MID([.E31];10;1));&quot;kobieta&quot;;&quot;mężczyzna&quot;)" table:style-name="ce1">
            <text:p>kobieta</text:p>
          </table:table-cell>
          <table:table-cell office:value-type="float" office:value="79072315628" table:style-name="ce10">
            <text:p>79072315628</text:p>
          </table:table-cell>
          <table:table-cell office:value-type="date" office:date-value="1979-07-23T00:00:00" table:formula="of:=IF(MID([.E31];3;2)*1&gt;80;DATE(1800+LEFT([.E31];2)*1;MID([.E31];3;2)*1-80;MID([.E31];5;2));IF(MID([.E31];3;2)*1&gt;20;DATE(2000+LEFT([.E31];2)*1;MID([.E31];3;2)*1-20;MID([.E31];5;2));DATE(1900+LEFT([.E31];2)*1;MID([.E31];3;2)*1;MID([.E31];5;2))))" table:style-name="ce11">
            <text:p>23.07.1979</text:p>
          </table:table-cell>
          <table:table-cell office:value-type="float" office:value="43" table:formula="of:=YEAR([.K31])-YEAR([.F31])" table:style-name="ce12">
            <text:p>43</text:p>
          </table:table-cell>
          <table:table-cell table:style-name="ce12"/>
          <table:table-cell office:value-type="string" table:style-name="ce13">
            <text:p>chłoniak nieziarniczy guzkowaty</text:p>
          </table:table-cell>
          <table:table-cell office:value-type="string" table:style-name="ce1">
            <text:p>CVP</text:p>
          </table:table-cell>
          <table:table-cell office:value-type="date" office:date-value="2022-06-28T00:00:00" table:style-name="ce11">
            <text:p>28.06.2022</text:p>
          </table:table-cell>
          <table:table-cell office:value-type="string" table:style-name="ce20">
            <text:p>20.12.2022/po 4 cyklach /bardzo dobra odpowiedz na leczenie</text:p>
          </table:table-cell>
          <table:table-cell office:value-type="string" table:style-name="ce1">
            <text:p>30.03.2023/ocena remisji choroby po zakonczeniu leczenia/dobra dopowiedź</text:p>
          </table:table-cell>
          <table:table-cell office:value-type="string" table:style-name="ce1">
            <text:p>18.07.2023/ kontrola po zakonczeniu leczenia/stabilizacja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Krzysztof<text:s/></text:p>
          </table:table-cell>
          <table:table-cell office:value-type="string" table:style-name="ce1">
            <text:p>osak</text:p>
          </table:table-cell>
          <table:table-cell office:value-type="string" office:string-value="mężczyzna" table:formula="of:=IF(ISEVEN(MID([.E32];10;1));&quot;kobieta&quot;;&quot;mężczyzna&quot;)" table:style-name="ce1">
            <text:p>mężczyzna</text:p>
          </table:table-cell>
          <table:table-cell office:value-type="string" table:style-name="ce10">
            <text:p>72092805715</text:p>
          </table:table-cell>
          <table:table-cell office:value-type="date" office:date-value="1972-09-28T00:00:00" table:formula="of:=IF(MID([.E32];3;2)*1&gt;80;DATE(1800+LEFT([.E32];2)*1;MID([.E32];3;2)*1-80;MID([.E32];5;2));IF(MID([.E32];3;2)*1&gt;20;DATE(2000+LEFT([.E32];2)*1;MID([.E32];3;2)*1-20;MID([.E32];5;2));DATE(1900+LEFT([.E32];2)*1;MID([.E32];3;2)*1;MID([.E32];5;2))))" table:style-name="ce11">
            <text:p>28.09.1972</text:p>
          </table:table-cell>
          <table:table-cell office:value-type="float" office:value="50" table:formula="of:=YEAR([.K32])-YEAR([.F32])" table:style-name="ce12">
            <text:p>50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/IFTR</text:p>
          </table:table-cell>
          <table:table-cell office:value-type="date" office:date-value="2022-01-27T00:00:00" table:style-name="ce11">
            <text:p>27.01.2022</text:p>
          </table:table-cell>
          <table:table-cell office:value-type="string" table:style-name="ce15">
            <text:p>5.04.022/po 2 cyklach ABVD/czesciowa odpoweidz</text:p>
          </table:table-cell>
          <table:table-cell office:value-type="string" table:style-name="ce1">
            <text:p>9.08.2022/po zakonczeniu leczenia/czesciowa odpowiedź</text:p>
          </table:table-cell>
          <table:table-cell office:value-type="string" table:style-name="ce1">
            <text:p>24.01.2023/3 msc po zakonczeniu IFRT/bardzo dobra odpowiedź na leczenie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halina</text:p>
          </table:table-cell>
          <table:table-cell office:value-type="string" table:style-name="ce1">
            <text:p>Lewińska</text:p>
          </table:table-cell>
          <table:table-cell office:value-type="string" office:string-value="kobieta" table:formula="of:=IF(ISEVEN(MID([.E33];10;1));&quot;kobieta&quot;;&quot;mężczyzna&quot;)" table:style-name="ce1">
            <text:p>kobieta</text:p>
          </table:table-cell>
          <table:table-cell office:value-type="float" office:value="53093012861" table:style-name="ce10">
            <text:p>53093012861</text:p>
          </table:table-cell>
          <table:table-cell office:value-type="date" office:date-value="1953-09-30T00:00:00" table:formula="of:=IF(MID([.E33];3;2)*1&gt;80;DATE(1800+LEFT([.E33];2)*1;MID([.E33];3;2)*1-80;MID([.E33];5;2));IF(MID([.E33];3;2)*1&gt;20;DATE(2000+LEFT([.E33];2)*1;MID([.E33];3;2)*1-20;MID([.E33];5;2));DATE(1900+LEFT([.E33];2)*1;MID([.E33];3;2)*1;MID([.E33];5;2))))" table:style-name="ce11">
            <text:p>30.09.1953</text:p>
          </table:table-cell>
          <table:table-cell office:value-type="float" office:value="69" table:formula="of:=YEAR([.K33])-YEAR([.F33])" table:style-name="ce12">
            <text:p>69</text:p>
          </table:table-cell>
          <table:table-cell table:style-name="ce12"/>
          <table:table-cell office:value-type="string" table:style-name="ce13">
            <text:p>Chłoniak guzkowy</text:p>
          </table:table-cell>
          <table:table-cell office:value-type="string" table:style-name="ce1">
            <text:p>CVP</text:p>
          </table:table-cell>
          <table:table-cell office:value-type="date" office:date-value="2022-02-08T00:00:00" table:style-name="ce11">
            <text:p>08.02.2022</text:p>
          </table:table-cell>
          <table:table-cell office:value-type="string" table:style-name="ce20">
            <text:p>16.08.2022/po 4 cyklach CVP/dobra odpowiedz na leczenie</text:p>
          </table:table-cell>
          <table:table-cell office:value-type="string" table:style-name="ce1">
            <text:p>29.11.2022/po zakonczeniu leczenia/dobra odpowe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kurzeja</text:p>
          </table:table-cell>
          <table:table-cell office:value-type="string" office:string-value="mężczyzna" table:formula="of:=IF(ISEVEN(MID([.E34];10;1));&quot;kobieta&quot;;&quot;mężczyzna&quot;)" table:style-name="ce1">
            <text:p>mężczyzna</text:p>
          </table:table-cell>
          <table:table-cell office:value-type="float" office:value="62112302232" table:style-name="ce10">
            <text:p>62112302232</text:p>
          </table:table-cell>
          <table:table-cell office:value-type="date" office:date-value="1962-11-23T00:00:00" table:formula="of:=IF(MID([.E34];3;2)*1&gt;80;DATE(1800+LEFT([.E34];2)*1;MID([.E34];3;2)*1-80;MID([.E34];5;2));IF(MID([.E34];3;2)*1&gt;20;DATE(2000+LEFT([.E34];2)*1;MID([.E34];3;2)*1-20;MID([.E34];5;2));DATE(1900+LEFT([.E34];2)*1;MID([.E34];3;2)*1;MID([.E34];5;2))))" table:style-name="ce11">
            <text:p>23.11.1962</text:p>
          </table:table-cell>
          <table:table-cell office:value-type="float" office:value="60" table:formula="of:=YEAR([.K34])-YEAR([.F34])" table:style-name="ce17">
            <text:p>60</text:p>
          </table:table-cell>
          <table:table-cell table:style-name="ce12"/>
          <table:table-cell office:value-type="string" table:style-name="ce13">
            <text:p>agresywny chłoniak B komórkowy</text:p>
          </table:table-cell>
          <table:table-cell office:value-type="string" table:style-name="ce1">
            <text:p>RCHOP</text:p>
          </table:table-cell>
          <table:table-cell office:value-type="date" office:date-value="2022-09-07T00:00:00" table:style-name="ce11">
            <text:p>07.09.2022</text:p>
          </table:table-cell>
          <table:table-cell office:value-type="string" table:style-name="ce20">
            <text:p>12.12.2022/po 3 cyklach RCHOP/dobra odpowiedz na leczenie</text:p>
          </table:table-cell>
          <table:table-cell office:value-type="string" table:style-name="ce1">
            <text:p>16.02.2023/po 6 cyklach leczenia/dobra odpowedź na leczenie</text:p>
          </table:table-cell>
          <table:table-cell office:value-type="string" table:style-name="ce1">
            <text:p>30.05.2023/po zakonczeniu leczenia/regresja</text:p>
          </table:table-cell>
          <table:table-cell table:number-columns-repeated="16370" table:style-name="ce1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ludwik</text:p>
          </table:table-cell>
          <table:table-cell office:value-type="string" table:style-name="ce1">
            <text:p>kozina</text:p>
          </table:table-cell>
          <table:table-cell office:value-type="string" office:string-value="mężczyzna" table:formula="of:=IF(ISEVEN(MID([.E35];10;1));&quot;kobieta&quot;;&quot;mężczyzna&quot;)" table:style-name="ce1">
            <text:p>mężczyzna</text:p>
          </table:table-cell>
          <table:table-cell office:value-type="float" office:value="73082515096" table:style-name="ce10">
            <text:p>73082515096</text:p>
          </table:table-cell>
          <table:table-cell office:value-type="date" office:date-value="1973-08-25T00:00:00" table:formula="of:=IF(MID([.E35];3;2)*1&gt;80;DATE(1800+LEFT([.E35];2)*1;MID([.E35];3;2)*1-80;MID([.E35];5;2));IF(MID([.E35];3;2)*1&gt;20;DATE(2000+LEFT([.E35];2)*1;MID([.E35];3;2)*1-20;MID([.E35];5;2));DATE(1900+LEFT([.E35];2)*1;MID([.E35];3;2)*1;MID([.E35];5;2))))" table:style-name="ce11">
            <text:p>25.08.1973</text:p>
          </table:table-cell>
          <table:table-cell office:value-type="float" office:value="48" table:formula="of:=YEAR([.K35])-YEAR([.F35])" table:style-name="ce12">
            <text:p>48</text:p>
          </table:table-cell>
          <table:table-cell table:style-name="ce12"/>
          <table:table-cell office:value-type="string" table:style-name="ce13">
            <text:p>Chłoniak ziarniczy</text:p>
          </table:table-cell>
          <table:table-cell office:value-type="string" table:style-name="ce1">
            <text:p>ABVD</text:p>
          </table:table-cell>
          <table:table-cell office:value-type="date" office:date-value="2021-05-24T00:00:00" table:style-name="ce11">
            <text:p>24.05.2021</text:p>
          </table:table-cell>
          <table:table-cell office:value-type="string" table:style-name="ce20">
            <text:p>3.08.2021/po 2 cyklach ABVD/dobra odpowiedz na leczenie</text:p>
          </table:table-cell>
          <table:table-cell office:value-type="string" table:style-name="ce1">
            <text:p>17.02.2022/po 8 cyklach ABVD po zakonczeniu leczenia/wznowa choroby</text:p>
          </table:table-cell>
          <table:table-cell office:value-type="string" table:style-name="ce1">
            <text:p>12.05.022/kontrola po leczeniu/progresja</text:p>
          </table:table-cell>
          <table:table-cell office:value-type="string" table:style-name="ce1">
            <text:p>17.10.2022/po radioterapii/dalsza prograsja</text:p>
          </table:table-cell>
          <table:table-cell office:value-type="string" table:style-name="ce1">
            <text:p>22.12.2022/po 2 cyklach BGD/stabilizacja</text:p>
          </table:table-cell>
          <table:table-cell table:number-columns-repeated="16368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">
            <text:p>Grzegorz</text:p>
          </table:table-cell>
          <table:table-cell office:value-type="string" table:style-name="ce1">
            <text:p>Kosowski</text:p>
          </table:table-cell>
          <table:table-cell office:value-type="string" office:string-value="mężczyzna" table:formula="of:=IF(ISEVEN(MID([.E36];10;1));&quot;kobieta&quot;;&quot;mężczyzna&quot;)" table:style-name="ce1">
            <text:p>mężczyzna</text:p>
          </table:table-cell>
          <table:table-cell office:value-type="string" table:style-name="ce10">
            <text:p>73121709419</text:p>
          </table:table-cell>
          <table:table-cell office:value-type="date" office:date-value="1973-12-17T00:00:00" table:formula="of:=IF(MID([.E36];3;2)*1&gt;80;DATE(1800+LEFT([.E36];2)*1;MID([.E36];3;2)*1-80;MID([.E36];5;2));IF(MID([.E36];3;2)*1&gt;20;DATE(2000+LEFT([.E36];2)*1;MID([.E36];3;2)*1-20;MID([.E36];5;2));DATE(1900+LEFT([.E36];2)*1;MID([.E36];3;2)*1;MID([.E36];5;2))))" table:style-name="ce11">
            <text:p>17.12.1973</text:p>
          </table:table-cell>
          <table:table-cell office:value-type="float" office:value="48" table:formula="of:=YEAR([.K36])-YEAR([.F36])" table:style-name="ce12">
            <text:p>48</text:p>
          </table:table-cell>
          <table:table-cell table:style-name="ce12"/>
          <table:table-cell office:value-type="string" table:style-name="ce13">
            <text:p>Chłoniak nieziarniczy guzkowy</text:p>
          </table:table-cell>
          <table:table-cell office:value-type="string" table:style-name="ce1">
            <text:p>CVP</text:p>
          </table:table-cell>
          <table:table-cell office:value-type="date" office:date-value="2021-06-15T00:00:00" table:style-name="ce11">
            <text:p>15.06.2021</text:p>
          </table:table-cell>
          <table:table-cell office:value-type="string" table:style-name="ce20">
            <text:p>21.10.2021/po 3 cyklach/ dobra odpowiedz na leczenie</text:p>
          </table:table-cell>
          <table:table-cell office:value-type="string" table:style-name="ce1">
            <text:p>10.02.2022/po zakonczeniu leczenia/bardzo dobra dopowiedź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Joanna</text:p>
          </table:table-cell>
          <table:table-cell office:value-type="string" table:style-name="ce1">
            <text:p>Klęp</text:p>
          </table:table-cell>
          <table:table-cell office:value-type="string" office:string-value="kobieta" table:formula="of:=IF(ISEVEN(MID([.E37];10;1));&quot;kobieta&quot;;&quot;mężczyzna&quot;)" table:style-name="ce1">
            <text:p>kobieta</text:p>
          </table:table-cell>
          <table:table-cell office:value-type="float" office:value="85081416162" table:style-name="ce10">
            <text:p>85081416162</text:p>
          </table:table-cell>
          <table:table-cell office:value-type="date" office:date-value="1985-08-14T00:00:00" table:formula="of:=IF(MID([.E37];3;2)*1&gt;80;DATE(1800+LEFT([.E37];2)*1;MID([.E37];3;2)*1-80;MID([.E37];5;2));IF(MID([.E37];3;2)*1&gt;20;DATE(2000+LEFT([.E37];2)*1;MID([.E37];3;2)*1-20;MID([.E37];5;2));DATE(1900+LEFT([.E37];2)*1;MID([.E37];3;2)*1;MID([.E37];5;2))))" table:style-name="ce11">
            <text:p>14.08.1985</text:p>
          </table:table-cell>
          <table:table-cell office:value-type="float" office:value="36" table:formula="of:=YEAR([.K37])-YEAR([.F37])" table:style-name="ce28">
            <text:p>36</text:p>
          </table:table-cell>
          <table:table-cell table:style-name="ce12"/>
          <table:table-cell office:value-type="string" table:style-name="ce13">
            <text:p>Chłoniak śódpiersia z obwodowych Komórek B</text:p>
          </table:table-cell>
          <table:table-cell office:value-type="string" table:style-name="ce1">
            <text:p>RCHOP</text:p>
          </table:table-cell>
          <table:table-cell office:value-type="date" office:date-value="2021-04-19T00:00:00" table:style-name="ce11">
            <text:p>19.04.2021</text:p>
          </table:table-cell>
          <table:table-cell office:value-type="string" table:style-name="ce20">
            <text:p>21.06.2021/po 3 cyklach RCHOP/bardzo dobra odpowiedz na leczenie</text:p>
          </table:table-cell>
          <table:table-cell office:value-type="string" table:style-name="ce1">
            <text:p>26.08.2021/po zakonczeniu leczenia/bardzo dobra odpowie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">
            <text:p>Izabela</text:p>
          </table:table-cell>
          <table:table-cell office:value-type="string" table:style-name="ce1">
            <text:p>Katyńska</text:p>
          </table:table-cell>
          <table:table-cell office:value-type="string" office:string-value="kobieta" table:formula="of:=IF(ISEVEN(MID([.E38];10;1));&quot;kobieta&quot;;&quot;mężczyzna&quot;)" table:style-name="ce1">
            <text:p>kobieta</text:p>
          </table:table-cell>
          <table:table-cell office:value-type="float" office:value="79051904182" table:style-name="ce10">
            <text:p>79051904182</text:p>
          </table:table-cell>
          <table:table-cell office:value-type="date" office:date-value="1979-05-19T00:00:00" table:formula="of:=IF(MID([.E38];3;2)*1&gt;80;DATE(1800+LEFT([.E38];2)*1;MID([.E38];3;2)*1-80;MID([.E38];5;2));IF(MID([.E38];3;2)*1&gt;20;DATE(2000+LEFT([.E38];2)*1;MID([.E38];3;2)*1-20;MID([.E38];5;2));DATE(1900+LEFT([.E38];2)*1;MID([.E38];3;2)*1;MID([.E38];5;2))))" table:style-name="ce11">
            <text:p>19.05.1979</text:p>
          </table:table-cell>
          <table:table-cell office:value-type="float" office:value="42" table:formula="of:=YEAR([.K38])-YEAR([.F38])" table:style-name="ce12">
            <text:p>42</text:p>
          </table:table-cell>
          <table:table-cell table:style-name="ce12"/>
          <table:table-cell office:value-type="string" table:style-name="ce13">
            <text:p>Chłoniak nieziarniczy</text:p>
          </table:table-cell>
          <table:table-cell office:value-type="string" table:style-name="ce1">
            <text:p>CHOP</text:p>
          </table:table-cell>
          <table:table-cell office:value-type="date" office:date-value="2021-05-20T00:00:00" table:style-name="ce11">
            <text:p>20.05.2021</text:p>
          </table:table-cell>
          <table:table-cell office:value-type="string" table:style-name="ce15">
            <text:p>26.07.2021/po 3 cyklach/ czesciowa odpowiedz na leczenie</text:p>
          </table:table-cell>
          <table:table-cell office:value-type="string" table:style-name="ce1">
            <text:p>27.09.2021/ po 6 cyklach leczenie/dobra odpowiedź na leczenie</text:p>
          </table:table-cell>
          <table:table-cell office:value-type="string" table:style-name="ce1">
            <text:p>3.12.2021/po 8 cyklach, zakonczone leczenie/ bardzo dobra odpowiedź na leczenie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Krzysztof<text:s/></text:p>
          </table:table-cell>
          <table:table-cell office:value-type="string" table:style-name="ce1">
            <text:p>Jerzykowski</text:p>
          </table:table-cell>
          <table:table-cell office:value-type="string" office:string-value="mężczyzna" table:formula="of:=IF(ISEVEN(MID([.E39];10;1));&quot;kobieta&quot;;&quot;mężczyzna&quot;)" table:style-name="ce1">
            <text:p>mężczyzna</text:p>
          </table:table-cell>
          <table:table-cell office:value-type="float" office:value="66090905171" table:style-name="ce10">
            <text:p>66090905171</text:p>
          </table:table-cell>
          <table:table-cell office:value-type="date" office:date-value="1966-09-09T00:00:00" table:formula="of:=IF(MID([.E39];3;2)*1&gt;80;DATE(1800+LEFT([.E39];2)*1;MID([.E39];3;2)*1-80;MID([.E39];5;2));IF(MID([.E39];3;2)*1&gt;20;DATE(2000+LEFT([.E39];2)*1;MID([.E39];3;2)*1-20;MID([.E39];5;2));DATE(1900+LEFT([.E39];2)*1;MID([.E39];3;2)*1;MID([.E39];5;2))))" table:style-name="ce11">
            <text:p>09.09.1966</text:p>
          </table:table-cell>
          <table:table-cell office:value-type="float" office:value="55" table:formula="of:=YEAR([.K39])-YEAR([.F39])" table:style-name="ce17">
            <text:p>55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</text:p>
          </table:table-cell>
          <table:table-cell office:value-type="date" office:date-value="2021-12-16T00:00:00" table:style-name="ce11">
            <text:p>16.12.2021</text:p>
          </table:table-cell>
          <table:table-cell office:value-type="string" table:style-name="ce20">
            <text:p>1.03.2022/po2 cyklach ABVD/bardzo dobra odpowiedz na leczenie</text:p>
          </table:table-cell>
          <table:table-cell office:value-type="string" table:style-name="ce11">
            <text:p>14.07.2022/po 6 cyklach leczenia/bardzo dobra odpowiedź na leczenie</text:p>
          </table:table-cell>
          <table:table-cell table:number-columns-repeated="16371" table:style-name="ce1"/>
        </table:table-row>
        <table:table-row table:style-name="ro2">
          <table:table-cell office:value-type="float" office:value="39" table:style-name="ce9">
            <text:p>39</text:p>
          </table:table-cell>
          <table:table-cell office:value-type="string" table:style-name="ce1">
            <text:p>Sylwester</text:p>
          </table:table-cell>
          <table:table-cell office:value-type="string" table:style-name="ce1">
            <text:p>Jasnos</text:p>
          </table:table-cell>
          <table:table-cell office:value-type="string" office:string-value="mężczyzna" table:formula="of:=IF(ISEVEN(MID([.E40];10;1));&quot;kobieta&quot;;&quot;mężczyzna&quot;)" table:style-name="ce1">
            <text:p>mężczyzna</text:p>
          </table:table-cell>
          <table:table-cell office:value-type="float" office:value="70123003770" table:style-name="ce10">
            <text:p>70123003770</text:p>
          </table:table-cell>
          <table:table-cell office:value-type="date" office:date-value="1970-12-30T00:00:00" table:formula="of:=IF(MID([.E40];3;2)*1&gt;80;DATE(1800+LEFT([.E40];2)*1;MID([.E40];3;2)*1-80;MID([.E40];5;2));IF(MID([.E40];3;2)*1&gt;20;DATE(2000+LEFT([.E40];2)*1;MID([.E40];3;2)*1-20;MID([.E40];5;2));DATE(1900+LEFT([.E40];2)*1;MID([.E40];3;2)*1;MID([.E40];5;2))))" table:style-name="ce11">
            <text:p>30.12.1970</text:p>
          </table:table-cell>
          <table:table-cell office:value-type="float" office:value="52" table:formula="of:=YEAR([.K40])-YEAR([.F40])" table:style-name="ce41">
            <text:p>52</text:p>
          </table:table-cell>
          <table:table-cell table:style-name="ce12"/>
          <table:table-cell office:value-type="string" table:style-name="ce13">
            <text:p>DLBCL Chłoniak nieziarniczy</text:p>
          </table:table-cell>
          <table:table-cell office:value-type="string" table:style-name="ce1">
            <text:p>RCHOP/MTX</text:p>
          </table:table-cell>
          <table:table-cell office:value-type="date" office:date-value="2022-10-04T00:00:00" table:style-name="ce11">
            <text:p>04.10.2022</text:p>
          </table:table-cell>
          <table:table-cell office:value-type="string" table:style-name="ce15">
            <text:p>13.02.2023/po 2 cyklach RCHOP i 2 cyklach MTX/czesciowa odpowiedz</text:p>
          </table:table-cell>
          <table:table-cell office:value-type="string" table:style-name="ce1">
            <text:p>27.06.2023/po zakończeniu cht i IFRT/stabilizacja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string" table:style-name="ce1">
            <text:p>Halina</text:p>
          </table:table-cell>
          <table:table-cell office:value-type="string" table:style-name="ce1">
            <text:p>Jasik</text:p>
          </table:table-cell>
          <table:table-cell office:value-type="string" office:string-value="kobieta" table:formula="of:=IF(ISEVEN(MID([.E41];10;1));&quot;kobieta&quot;;&quot;mężczyzna&quot;)" table:style-name="ce1">
            <text:p>kobieta</text:p>
          </table:table-cell>
          <table:table-cell office:value-type="string" table:style-name="ce10">
            <text:p>56120903084</text:p>
          </table:table-cell>
          <table:table-cell office:value-type="date" office:date-value="1956-12-09T00:00:00" table:formula="of:=IF(MID([.E41];3;2)*1&gt;80;DATE(1800+LEFT([.E41];2)*1;MID([.E41];3;2)*1-80;MID([.E41];5;2));IF(MID([.E41];3;2)*1&gt;20;DATE(2000+LEFT([.E41];2)*1;MID([.E41];3;2)*1-20;MID([.E41];5;2));DATE(1900+LEFT([.E41];2)*1;MID([.E41];3;2)*1;MID([.E41];5;2))))" table:style-name="ce11">
            <text:p>09.12.1956</text:p>
          </table:table-cell>
          <table:table-cell office:value-type="float" office:value="66" table:formula="of:=YEAR([.K41])-YEAR([.F41])" table:style-name="ce12">
            <text:p>66</text:p>
          </table:table-cell>
          <table:table-cell table:style-name="ce12"/>
          <table:table-cell office:value-type="string" table:style-name="ce13">
            <text:p>Chłonika nieziarniczy z komórek T</text:p>
          </table:table-cell>
          <table:table-cell office:value-type="string" table:style-name="ce1">
            <text:p>RCHOP</text:p>
          </table:table-cell>
          <table:table-cell office:value-type="date" office:date-value="2022-11-14T00:00:00" table:style-name="ce11">
            <text:p>14.11.2022</text:p>
          </table:table-cell>
          <table:table-cell office:value-type="string" table:style-name="ce20">
            <text:p>23.02.2023/po 3 cyklach RCHOP/bardzo dobra odpowiedz na leczenie</text:p>
          </table:table-cell>
          <table:table-cell office:value-type="string" table:style-name="ce1">
            <text:p>20.06.2023/po 8 cyklach leczenia, zakonczone/bardzo dobra odpowiedź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string" table:style-name="ce1">
            <text:p>Grzegorz</text:p>
          </table:table-cell>
          <table:table-cell office:value-type="string" table:style-name="ce1">
            <text:p>Jarecki</text:p>
          </table:table-cell>
          <table:table-cell office:value-type="string" office:string-value="mężczyzna" table:formula="of:=IF(ISEVEN(MID([.E42];10;1));&quot;kobieta&quot;;&quot;mężczyzna&quot;)" table:style-name="ce1">
            <text:p>mężczyzna</text:p>
          </table:table-cell>
          <table:table-cell office:value-type="float" office:value="97021006991" table:style-name="ce10">
            <text:p>97021006991</text:p>
          </table:table-cell>
          <table:table-cell office:value-type="date" office:date-value="1997-02-10T00:00:00" table:formula="of:=IF(MID([.E42];3;2)*1&gt;80;DATE(1800+LEFT([.E42];2)*1;MID([.E42];3;2)*1-80;MID([.E42];5;2));IF(MID([.E42];3;2)*1&gt;20;DATE(2000+LEFT([.E42];2)*1;MID([.E42];3;2)*1-20;MID([.E42];5;2));DATE(1900+LEFT([.E42];2)*1;MID([.E42];3;2)*1;MID([.E42];5;2))))" table:style-name="ce11">
            <text:p>10.02.1997</text:p>
          </table:table-cell>
          <table:table-cell office:value-type="float" office:value="25" table:formula="of:=YEAR([.K42])-YEAR([.F42])" table:style-name="ce12">
            <text:p>25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/AVD/</text:p>
          </table:table-cell>
          <table:table-cell office:value-type="date" office:date-value="2022-07-28T00:00:00" table:style-name="ce11">
            <text:p>28.07.2022</text:p>
          </table:table-cell>
          <table:table-cell office:value-type="string" table:style-name="ce20">
            <text:p>11.10.2022/po 2 cyklach ABVD/bardzo dobra odpowiedz na leczenie/</text:p>
          </table:table-cell>
          <table:table-cell office:value-type="string" table:style-name="ce1">
            <text:p>14.02.2023/po 2 cyklach AVBD i 6 cyklach AVD/dobra dopowiedź</text:p>
          </table:table-cell>
          <table:table-cell office:value-type="string" table:style-name="ce1">
            <text:p>18.04.2023/po zakonczeniu leczeniaregresja chprpby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Hazik</text:p>
          </table:table-cell>
          <table:table-cell office:value-type="string" office:string-value="mężczyzna" table:formula="of:=IF(ISEVEN(MID([.E43];10;1));&quot;kobieta&quot;;&quot;mężczyzna&quot;)" table:style-name="ce1">
            <text:p>mężczyzna</text:p>
          </table:table-cell>
          <table:table-cell office:value-type="float" office:value="96071805079" table:style-name="ce10">
            <text:p>96071805079</text:p>
          </table:table-cell>
          <table:table-cell office:value-type="date" office:date-value="1996-07-18T00:00:00" table:formula="of:=IF(MID([.E43];3;2)*1&gt;80;DATE(1800+LEFT([.E43];2)*1;MID([.E43];3;2)*1-80;MID([.E43];5;2));IF(MID([.E43];3;2)*1&gt;20;DATE(2000+LEFT([.E43];2)*1;MID([.E43];3;2)*1-20;MID([.E43];5;2));DATE(1900+LEFT([.E43];2)*1;MID([.E43];3;2)*1;MID([.E43];5;2))))" table:style-name="ce11">
            <text:p>18.07.1996</text:p>
          </table:table-cell>
          <table:table-cell office:value-type="float" office:value="27" table:formula="of:=YEAR([.K43])-YEAR([.F43])" table:style-name="ce12">
            <text:p>27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</text:p>
          </table:table-cell>
          <table:table-cell office:value-type="date" office:date-value="2023-03-13T00:00:00" table:style-name="ce11">
            <text:p>13.03.2023</text:p>
          </table:table-cell>
          <table:table-cell office:value-type="string" table:style-name="ce20">
            <text:p>06.06.2023/po 2 cyklach ABVD/bardzo dobra odpowiedz na leczenie</text:p>
          </table:table-cell>
          <table:table-cell office:value-type="string" table:style-name="ce1">
            <text:p>23.08.2023/po zakonczeniu leczenia/bardzo dobra odpowiedź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string" table:style-name="ce1">
            <text:p>Sylwia</text:p>
          </table:table-cell>
          <table:table-cell office:value-type="string" table:style-name="ce1">
            <text:p>Gmer-Repeta</text:p>
          </table:table-cell>
          <table:table-cell office:value-type="string" office:string-value="kobieta" table:formula="of:=IF(ISEVEN(MID([.E44];10;1));&quot;kobieta&quot;;&quot;mężczyzna&quot;)" table:style-name="ce1">
            <text:p>kobieta</text:p>
          </table:table-cell>
          <table:table-cell office:value-type="float" office:value="77090401345" table:style-name="ce10">
            <text:p>77090401345</text:p>
          </table:table-cell>
          <table:table-cell office:value-type="date" office:date-value="1977-09-04T00:00:00" table:formula="of:=IF(MID([.E44];3;2)*1&gt;80;DATE(1800+LEFT([.E44];2)*1;MID([.E44];3;2)*1-80;MID([.E44];5;2));IF(MID([.E44];3;2)*1&gt;20;DATE(2000+LEFT([.E44];2)*1;MID([.E44];3;2)*1-20;MID([.E44];5;2));DATE(1900+LEFT([.E44];2)*1;MID([.E44];3;2)*1;MID([.E44];5;2))))" table:style-name="ce11">
            <text:p>04.09.1977</text:p>
          </table:table-cell>
          <table:table-cell office:value-type="float" office:value="45" table:formula="of:=YEAR([.K44])-YEAR([.F44])" table:style-name="ce12">
            <text:p>45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BEACOPP</text:p>
          </table:table-cell>
          <table:table-cell office:value-type="date" office:date-value="2022-09-06T00:00:00" table:style-name="ce11">
            <text:p>06.09.2022</text:p>
          </table:table-cell>
          <table:table-cell office:value-type="string" table:style-name="ce15">
            <text:p>7.11.2022/po 2 cyklach/czesciowa odpowiedź</text:p>
          </table:table-cell>
          <table:table-cell office:value-type="string" table:style-name="ce1">
            <text:p>27.04.2023/po zakonczeniu leczenia/czesciowa regresja</text:p>
          </table:table-cell>
          <table:table-cell table:number-columns-repeated="16371" table:style-name="ce1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string" table:style-name="ce1">
            <text:p>Janusz</text:p>
          </table:table-cell>
          <table:table-cell office:value-type="string" table:style-name="ce1">
            <text:p>Front</text:p>
          </table:table-cell>
          <table:table-cell office:value-type="string" office:string-value="mężczyzna" table:formula="of:=IF(ISEVEN(MID([.E45];10;1));&quot;kobieta&quot;;&quot;mężczyzna&quot;)" table:style-name="ce1">
            <text:p>mężczyzna</text:p>
          </table:table-cell>
          <table:table-cell office:value-type="float" office:value="44110101778" table:style-name="ce10">
            <text:p>44110101778</text:p>
          </table:table-cell>
          <table:table-cell office:value-type="date" office:date-value="1944-11-01T00:00:00" table:formula="of:=IF(MID([.E45];3;2)*1&gt;80;DATE(1800+LEFT([.E45];2)*1;MID([.E45];3;2)*1-80;MID([.E45];5;2));IF(MID([.E45];3;2)*1&gt;20;DATE(2000+LEFT([.E45];2)*1;MID([.E45];3;2)*1-20;MID([.E45];5;2));DATE(1900+LEFT([.E45];2)*1;MID([.E45];3;2)*1;MID([.E45];5;2))))" table:style-name="ce11">
            <text:p>01.11.1944</text:p>
          </table:table-cell>
          <table:table-cell office:value-type="float" office:value="77" table:formula="of:=YEAR([.K45])-YEAR([.F45])" table:style-name="ce12">
            <text:p>77</text:p>
          </table:table-cell>
          <table:table-cell table:style-name="ce12"/>
          <table:table-cell office:value-type="string" table:style-name="ce13">
            <text:p>DLBCL Chłoniak Nieziarniczy</text:p>
          </table:table-cell>
          <table:table-cell office:value-type="string" table:style-name="ce1">
            <text:p>RCHOP</text:p>
          </table:table-cell>
          <table:table-cell office:value-type="date" office:date-value="2021-06-14T00:00:00" table:style-name="ce11">
            <text:p>14.06.2021</text:p>
          </table:table-cell>
          <table:table-cell office:value-type="string" table:style-name="ce20">
            <text:p>28.09.2021/po 3 cyklach /dobra odpowiedz na leczenie</text:p>
          </table:table-cell>
          <table:table-cell office:value-type="string" table:style-name="ce1">
            <text:p>28.12.2021/po zakonczeniu leczenia/dobra dopowie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Fiszbain</text:p>
          </table:table-cell>
          <table:table-cell office:value-type="string" office:string-value="kobieta" table:formula="of:=IF(ISEVEN(MID([.E46];10;1));&quot;kobieta&quot;;&quot;mężczyzna&quot;)" table:style-name="ce1">
            <text:p>kobieta</text:p>
          </table:table-cell>
          <table:table-cell office:value-type="float" office:value="60071503367" table:style-name="ce10">
            <text:p>60071503367</text:p>
          </table:table-cell>
          <table:table-cell office:value-type="date" office:date-value="1960-07-15T00:00:00" table:formula="of:=IF(MID([.E46];3;2)*1&gt;80;DATE(1800+LEFT([.E46];2)*1;MID([.E46];3;2)*1-80;MID([.E46];5;2));IF(MID([.E46];3;2)*1&gt;20;DATE(2000+LEFT([.E46];2)*1;MID([.E46];3;2)*1-20;MID([.E46];5;2));DATE(1900+LEFT([.E46];2)*1;MID([.E46];3;2)*1;MID([.E46];5;2))))" table:style-name="ce11">
            <text:p>15.07.1960</text:p>
          </table:table-cell>
          <table:table-cell office:value-type="float" office:value="61" table:formula="of:=YEAR([.K46])-YEAR([.F46])" table:style-name="ce12">
            <text:p>61</text:p>
          </table:table-cell>
          <table:table-cell table:style-name="ce12"/>
          <table:table-cell office:value-type="string" table:style-name="ce13">
            <text:p>Chłoniak niezairniczy</text:p>
          </table:table-cell>
          <table:table-cell office:value-type="string" table:style-name="ce1">
            <text:p>OCVP</text:p>
          </table:table-cell>
          <table:table-cell office:value-type="date" office:date-value="2021-09-13T00:00:00" table:style-name="ce11">
            <text:p>13.09.2021</text:p>
          </table:table-cell>
          <table:table-cell office:value-type="string" table:style-name="ce20">
            <text:p>13.12.2021/po 3 cyklach /dobra odpowiedz na leczenie</text:p>
          </table:table-cell>
          <table:table-cell office:value-type="string" table:style-name="ce1">
            <text:p>17.03.2022/po zakonczeniu 6 cylki leczenia/bardzo dobra odpowiedz na leczenie</text:p>
          </table:table-cell>
          <table:table-cell office:value-type="string" table:style-name="ce1">
            <text:p>22.11.2022/kontrola po zakonczeniu lec zenia/bardzo dobra odpowiedz na leczenie</text:p>
          </table:table-cell>
          <table:table-cell table:number-columns-repeated="16370" table:style-name="ce1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string" table:style-name="ce1">
            <text:p>Matylda<text:s/></text:p>
          </table:table-cell>
          <table:table-cell office:value-type="string" table:style-name="ce1">
            <text:p>Firek</text:p>
          </table:table-cell>
          <table:table-cell office:value-type="string" office:string-value="kobieta" table:formula="of:=IF(ISEVEN(MID([.E47];10;1));&quot;kobieta&quot;;&quot;mężczyzna&quot;)" table:style-name="ce1">
            <text:p>kobieta</text:p>
          </table:table-cell>
          <table:table-cell office:value-type="string" table:style-name="ce10">
            <text:p>00232205686</text:p>
          </table:table-cell>
          <table:table-cell office:value-type="date" office:date-value="2000-03-22T00:00:00" table:formula="of:=IF(MID([.E47];3;2)*1&gt;80;DATE(1800+LEFT([.E47];2)*1;MID([.E47];3;2)*1-80;MID([.E47];5;2));IF(MID([.E47];3;2)*1&gt;20;DATE(2000+LEFT([.E47];2)*1;MID([.E47];3;2)*1-20;MID([.E47];5;2));DATE(1900+LEFT([.E47];2)*1;MID([.E47];3;2)*1;MID([.E47];5;2))))" table:style-name="ce11">
            <text:p>22.03.2000</text:p>
          </table:table-cell>
          <table:table-cell office:value-type="float" office:value="21" table:formula="of:=YEAR([.K47])-YEAR([.F47])" table:style-name="ce12">
            <text:p>21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/BEACOPP</text:p>
          </table:table-cell>
          <table:table-cell office:value-type="date" office:date-value="2021-03-29T00:00:00" table:style-name="ce11">
            <text:p>29.03.2021</text:p>
          </table:table-cell>
          <table:table-cell office:value-type="string" table:style-name="ce15">
            <text:p>17.05.2021/po 2 cyklach aBVD/czesciowa odpowiedz na leczenia</text:p>
          </table:table-cell>
          <table:table-cell office:value-type="string" table:style-name="ce1">
            <text:p>16.09.2021/po zakończeniu leczenia 2 cykle ABVD i 4 cylke BEACOPP/ bardzo dobra odpowie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Drapała</text:p>
          </table:table-cell>
          <table:table-cell office:value-type="string" office:string-value="mężczyzna" table:formula="of:=IF(ISEVEN(MID([.E48];10;1));&quot;kobieta&quot;;&quot;mężczyzna&quot;)" table:style-name="ce1">
            <text:p>mężczyzna</text:p>
          </table:table-cell>
          <table:table-cell office:value-type="float" office:value="36091200711" table:style-name="ce10">
            <text:p>36091200711</text:p>
          </table:table-cell>
          <table:table-cell office:value-type="date" office:date-value="1936-09-12T00:00:00" table:formula="of:=IF(MID([.E48];3;2)*1&gt;80;DATE(1800+LEFT([.E48];2)*1;MID([.E48];3;2)*1-80;MID([.E48];5;2));IF(MID([.E48];3;2)*1&gt;20;DATE(2000+LEFT([.E48];2)*1;MID([.E48];3;2)*1-20;MID([.E48];5;2));DATE(1900+LEFT([.E48];2)*1;MID([.E48];3;2)*1;MID([.E48];5;2))))" table:style-name="ce11">
            <text:p>12.09.1936</text:p>
          </table:table-cell>
          <table:table-cell office:value-type="float" office:value="85" table:formula="of:=YEAR([.K48])-YEAR([.F48])" table:style-name="ce12">
            <text:p>85</text:p>
          </table:table-cell>
          <table:table-cell table:style-name="ce12"/>
          <table:table-cell office:value-type="string" table:style-name="ce13">
            <text:p>Chłoniak nieziarniczy rozlany</text:p>
          </table:table-cell>
          <table:table-cell office:value-type="string" table:style-name="ce1">
            <text:p>CHOP</text:p>
          </table:table-cell>
          <table:table-cell office:value-type="date" office:date-value="2021-05-24T00:00:00" table:style-name="ce11">
            <text:p>24.05.2021</text:p>
          </table:table-cell>
          <table:table-cell office:value-type="string" table:style-name="ce20">
            <text:p>7.09.2021/po 4 cyklach/dobra odpowiedz na leczenie</text:p>
          </table:table-cell>
          <table:table-cell office:value-type="string" table:style-name="ce1">
            <text:p>22.11.2021/po zakonczeniu leczenia/probresja</text:p>
          </table:table-cell>
          <table:table-cell table:number-columns-repeated="16371" table:style-name="ce1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string" table:style-name="ce1">
            <text:p>Martyna</text:p>
          </table:table-cell>
          <table:table-cell office:value-type="string" table:style-name="ce1">
            <text:p>burda</text:p>
          </table:table-cell>
          <table:table-cell office:value-type="string" office:string-value="kobieta" table:formula="of:=IF(ISEVEN(MID([.E49];10;1));&quot;kobieta&quot;;&quot;mężczyzna&quot;)" table:style-name="ce1">
            <text:p>kobieta</text:p>
          </table:table-cell>
          <table:table-cell office:value-type="float" office:value="99010405183" table:style-name="ce10">
            <text:p>99010405183</text:p>
          </table:table-cell>
          <table:table-cell office:value-type="date" office:date-value="1999-01-04T00:00:00" table:formula="of:=IF(MID([.E49];3;2)*1&gt;80;DATE(1800+LEFT([.E49];2)*1;MID([.E49];3;2)*1-80;MID([.E49];5;2));IF(MID([.E49];3;2)*1&gt;20;DATE(2000+LEFT([.E49];2)*1;MID([.E49];3;2)*1-20;MID([.E49];5;2));DATE(1900+LEFT([.E49];2)*1;MID([.E49];3;2)*1;MID([.E49];5;2))))" table:style-name="ce11">
            <text:p>04.01.1999</text:p>
          </table:table-cell>
          <table:table-cell office:value-type="float" office:value="21" table:formula="of:=YEAR([.K49])-YEAR([.F49])" table:style-name="ce12">
            <text:p>21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</text:p>
          </table:table-cell>
          <table:table-cell office:value-type="date" office:date-value="2020-07-07T00:00:00" table:style-name="ce11">
            <text:p>07.07.2020</text:p>
          </table:table-cell>
          <table:table-cell office:value-type="string" table:style-name="ce15">
            <text:p>14.09.2020/po 2 cyklach/czesciowa odpowiedx na leczenie</text:p>
          </table:table-cell>
          <table:table-cell office:value-type="string" table:style-name="ce1">
            <text:p>30.11.2020/po 4 cyklach/dobra odpowiedź na ledczenie</text:p>
          </table:table-cell>
          <table:table-cell office:value-type="string" table:style-name="ce1">
            <text:p>4.01.2021/po zakończeniu leczenia/dobra odpowiedz na leczenie</text:p>
          </table:table-cell>
          <table:table-cell office:value-type="string" table:style-name="ce1">
            <text:p>17.06.2021/po IFRT/dobra ospowiedz na keczenie</text:p>
          </table:table-cell>
          <table:table-cell table:number-columns-repeated="16369" table:style-name="ce1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Chojnowski</text:p>
          </table:table-cell>
          <table:table-cell office:value-type="string" office:string-value="mężczyzna" table:formula="of:=IF(ISEVEN(MID([.E50];10;1));&quot;kobieta&quot;;&quot;mężczyzna&quot;)" table:style-name="ce1">
            <text:p>mężczyzna</text:p>
          </table:table-cell>
          <table:table-cell office:value-type="float" office:value="65092604958" table:style-name="ce10">
            <text:p>65092604958</text:p>
          </table:table-cell>
          <table:table-cell office:value-type="date" office:date-value="1965-09-26T00:00:00" table:formula="of:=IF(MID([.E50];3;2)*1&gt;80;DATE(1800+LEFT([.E50];2)*1;MID([.E50];3;2)*1-80;MID([.E50];5;2));IF(MID([.E50];3;2)*1&gt;20;DATE(2000+LEFT([.E50];2)*1;MID([.E50];3;2)*1-20;MID([.E50];5;2));DATE(1900+LEFT([.E50];2)*1;MID([.E50];3;2)*1;MID([.E50];5;2))))" table:style-name="ce11">
            <text:p>26.09.1965</text:p>
          </table:table-cell>
          <table:table-cell office:value-type="float" office:value="55" table:formula="of:=YEAR([.K50])-YEAR([.F50])" table:style-name="ce17">
            <text:p>55</text:p>
          </table:table-cell>
          <table:table-cell table:style-name="ce12"/>
          <table:table-cell office:value-type="string" table:style-name="ce13">
            <text:p>Chłoniak T komórkowy</text:p>
          </table:table-cell>
          <table:table-cell office:value-type="string" table:style-name="ce1">
            <text:p>CHOEP</text:p>
          </table:table-cell>
          <table:table-cell office:value-type="date" office:date-value="2020-03-24T00:00:00" table:style-name="ce11">
            <text:p>24.03.2020</text:p>
          </table:table-cell>
          <table:table-cell office:value-type="string" table:style-name="ce20">
            <text:p>1.06.2020/po 3 cyklach/dobra odpowiedź na leczenie</text:p>
          </table:table-cell>
          <table:table-cell office:value-type="string" table:style-name="ce1">
            <text:p>24.08.2020/po 6 cyklach leczenia/bardzo dobra odpowiedz na keczenie</text:p>
          </table:table-cell>
          <table:table-cell office:value-type="string" table:style-name="ce1">
            <text:p>10.11.2020/po zakonczeniu leczenia/dobra dopowiedz na leczenie</text:p>
          </table:table-cell>
          <table:table-cell office:value-type="string" table:style-name="ce1">
            <text:p>7.03.2022/kontrola po eczeniu/stabilizacja</text:p>
          </table:table-cell>
          <table:table-cell office:value-type="string" table:style-name="ce1">
            <text:p>13.09.2022/kontrola.reemija choroby/wznowa</text:p>
          </table:table-cell>
          <table:table-cell table:number-columns-repeated="1636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string" table:style-name="ce1">
            <text:p>Marek</text:p>
          </table:table-cell>
          <table:table-cell office:value-type="string" table:style-name="ce1">
            <text:p>Rzepka<text:s/></text:p>
          </table:table-cell>
          <table:table-cell office:value-type="string" office:string-value="mężczyzna" table:formula="of:=IF(ISEVEN(MID([.E51];10;1));&quot;kobieta&quot;;&quot;mężczyzna&quot;)" table:style-name="ce1">
            <text:p>mężczyzna</text:p>
          </table:table-cell>
          <table:table-cell office:value-type="string" table:style-name="ce10">
            <text:p>50061103895</text:p>
          </table:table-cell>
          <table:table-cell office:value-type="date" office:date-value="1950-06-11T00:00:00" table:formula="of:=IF(MID([.E51];3;2)*1&gt;80;DATE(1800+LEFT([.E51];2)*1;MID([.E51];3;2)*1-80;MID([.E51];5;2));IF(MID([.E51];3;2)*1&gt;20;DATE(2000+LEFT([.E51];2)*1;MID([.E51];3;2)*1-20;MID([.E51];5;2));DATE(1900+LEFT([.E51];2)*1;MID([.E51];3;2)*1;MID([.E51];5;2))))" table:style-name="ce11">
            <text:p>11.06.1950</text:p>
          </table:table-cell>
          <table:table-cell office:value-type="float" office:value="71" table:formula="of:=YEAR([.K51])-YEAR([.F51])" table:style-name="ce12">
            <text:p>71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BGD</text:p>
          </table:table-cell>
          <table:table-cell office:value-type="date" office:date-value="2021-05-13T00:00:00" table:style-name="ce11">
            <text:p>13.05.2021</text:p>
          </table:table-cell>
          <table:table-cell office:value-type="string" table:style-name="ce20">
            <text:p>29.07.2021/po 2 cyklach /dobra odpowiedź na leczenie</text:p>
          </table:table-cell>
          <table:table-cell office:value-type="string" table:style-name="ce1">
            <text:p>21.09.2021/po 4 cyklach, zakończenie leczenie/dobra odpoweidz n a leczenie</text:p>
          </table:table-cell>
          <table:table-cell office:value-type="string" table:style-name="ce1">
            <text:p>30.08.2022/ocena remisji/wznowa</text:p>
          </table:table-cell>
          <table:table-cell office:value-type="string" table:style-name="ce1">
            <text:p>1.06.2023/kontrola 1 rok po zakonczeniu leczenia/prograsja</text:p>
          </table:table-cell>
          <table:table-cell table:number-columns-repeated="16369" table:style-name="ce1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string" table:style-name="ce1">
            <text:p>Sebastiaon</text:p>
          </table:table-cell>
          <table:table-cell office:value-type="string" table:style-name="ce1">
            <text:p>Tomasik</text:p>
          </table:table-cell>
          <table:table-cell office:value-type="string" office:string-value="mężczyzna" table:formula="of:=IF(ISEVEN(MID([.E52];10;1));&quot;kobieta&quot;;&quot;mężczyzna&quot;)" table:style-name="ce1">
            <text:p>mężczyzna</text:p>
          </table:table-cell>
          <table:table-cell office:value-type="string" table:style-name="ce10">
            <text:p>87072200017</text:p>
          </table:table-cell>
          <table:table-cell office:value-type="date" office:date-value="1987-07-22T00:00:00" table:formula="of:=IF(MID([.E52];3;2)*1&gt;80;DATE(1800+LEFT([.E52];2)*1;MID([.E52];3;2)*1-80;MID([.E52];5;2));IF(MID([.E52];3;2)*1&gt;20;DATE(2000+LEFT([.E52];2)*1;MID([.E52];3;2)*1-20;MID([.E52];5;2));DATE(1900+LEFT([.E52];2)*1;MID([.E52];3;2)*1;MID([.E52];5;2))))" table:style-name="ce11">
            <text:p>22.07.1987</text:p>
          </table:table-cell>
          <table:table-cell office:value-type="float" office:value="33" table:formula="of:=YEAR([.K52])-YEAR([.F52])" table:style-name="ce28">
            <text:p>33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</text:p>
          </table:table-cell>
          <table:table-cell office:value-type="date" office:date-value="2020-09-28T00:00:00" table:style-name="ce11">
            <text:p>28.09.2020</text:p>
          </table:table-cell>
          <table:table-cell office:value-type="string" table:style-name="ce1">
            <text:p>3.12.2020/po2 cyklach leczenie/dobra odpowedz na leczenie</text:p>
          </table:table-cell>
          <table:table-cell office:value-type="string" table:style-name="ce1">
            <text:p>22.04.0221/po 2 cykach ABVD i 2 cyklach BGD/dobra odpoweidz na leczenie</text:p>
          </table:table-cell>
          <table:table-cell office:value-type="string" table:style-name="ce1">
            <text:p>14.06.2021/po zakonczeniu leczenie/dobra odpowedz na leczenie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Tracz</text:p>
          </table:table-cell>
          <table:table-cell office:value-type="string" office:string-value="mężczyzna" table:formula="of:=IF(ISEVEN(MID([.E53];10;1));&quot;kobieta&quot;;&quot;mężczyzna&quot;)" table:style-name="ce1">
            <text:p>mężczyzna</text:p>
          </table:table-cell>
          <table:table-cell office:value-type="string" table:style-name="ce10">
            <text:p>97052406519</text:p>
          </table:table-cell>
          <table:table-cell office:value-type="date" office:date-value="1997-05-24T00:00:00" table:formula="of:=IF(MID([.E53];3;2)*1&gt;80;DATE(1800+LEFT([.E53];2)*1;MID([.E53];3;2)*1-80;MID([.E53];5;2));IF(MID([.E53];3;2)*1&gt;20;DATE(2000+LEFT([.E53];2)*1;MID([.E53];3;2)*1-20;MID([.E53];5;2));DATE(1900+LEFT([.E53];2)*1;MID([.E53];3;2)*1;MID([.E53];5;2))))" table:style-name="ce11">
            <text:p>24.05.1997</text:p>
          </table:table-cell>
          <table:table-cell office:value-type="float" office:value="25" table:formula="of:=YEAR([.K53])-YEAR([.F53])" table:style-name="ce12">
            <text:p>25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BEACOPP</text:p>
          </table:table-cell>
          <table:table-cell office:value-type="date" office:date-value="2022-02-07T00:00:00" table:style-name="ce11">
            <text:p>07.02.2022</text:p>
          </table:table-cell>
          <table:table-cell office:value-type="string" table:style-name="ce1">
            <text:p>29.0.2022/po 2 cyklach leczenia/dobra odpowiedz na leczenie</text:p>
          </table:table-cell>
          <table:table-cell office:value-type="string" table:style-name="ce1">
            <text:p>4.08.2022/po zakonczeniu leczenia/dobra odpowiedz na leczenie</text:p>
          </table:table-cell>
          <table:table-cell office:value-type="string" table:style-name="ce1">
            <text:p>10.01/ 3msc po zakonczeniu IFRT/progresja choroby</text:p>
          </table:table-cell>
          <table:table-cell table:number-columns-repeated="16370" table:style-name="ce1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Żmuda</text:p>
          </table:table-cell>
          <table:table-cell office:value-type="string" office:string-value="kobieta" table:formula="of:=IF(ISEVEN(MID([.E54];10;1));&quot;kobieta&quot;;&quot;mężczyzna&quot;)" table:style-name="ce1">
            <text:p>kobieta</text:p>
          </table:table-cell>
          <table:table-cell office:value-type="string" table:style-name="ce10">
            <text:p>89012707505</text:p>
          </table:table-cell>
          <table:table-cell office:value-type="date" office:date-value="1989-01-27T00:00:00" table:formula="of:=IF(MID([.E54];3;2)*1&gt;80;DATE(1800+LEFT([.E54];2)*1;MID([.E54];3;2)*1-80;MID([.E54];5;2));IF(MID([.E54];3;2)*1&gt;20;DATE(2000+LEFT([.E54];2)*1;MID([.E54];3;2)*1-20;MID([.E54];5;2));DATE(1900+LEFT([.E54];2)*1;MID([.E54];3;2)*1;MID([.E54];5;2))))" table:style-name="ce11">
            <text:p>27.01.1989</text:p>
          </table:table-cell>
          <table:table-cell office:value-type="float" office:value="31" table:formula="of:=YEAR([.K54])-YEAR([.F54])" table:style-name="ce28">
            <text:p>31</text:p>
          </table:table-cell>
          <table:table-cell table:style-name="ce12"/>
          <table:table-cell office:value-type="string" table:style-name="ce18">
            <text:p>Chłoniak Hodgkina ziarnica złośliwa</text:p>
          </table:table-cell>
          <table:table-cell office:value-type="string" table:style-name="ce1">
            <text:p>ABVD</text:p>
          </table:table-cell>
          <table:table-cell office:value-type="date" office:date-value="2020-05-14T00:00:00" table:style-name="ce11">
            <text:p>14.05.2020</text:p>
          </table:table-cell>
          <table:table-cell office:value-type="string" table:style-name="ce1">
            <text:p>27.07.2020/po 2 cyklach/dobra odpowiedz na leczenie</text:p>
          </table:table-cell>
          <table:table-cell office:value-type="string" table:style-name="ce1">
            <text:p>10.12.2020/po zakonczeniu/ dobra odpowiedz</text:p>
          </table:table-cell>
          <table:table-cell office:value-type="string" table:style-name="ce1">
            <text:p>1.06.1021/po zakonczeniu IFRT/dobra odpowiedz na leczenie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9">
            <text:p>54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Wosik</text:p>
          </table:table-cell>
          <table:table-cell office:value-type="string" office:string-value="mężczyzna" table:formula="of:=IF(ISEVEN(MID([.E55];10;1));&quot;kobieta&quot;;&quot;mężczyzna&quot;)" table:style-name="ce1">
            <text:p>mężczyzna</text:p>
          </table:table-cell>
          <table:table-cell office:value-type="string" table:style-name="ce10">
            <text:p>53121410292</text:p>
          </table:table-cell>
          <table:table-cell office:value-type="date" office:date-value="1953-12-14T00:00:00" table:formula="of:=IF(MID([.E55];3;2)*1&gt;80;DATE(1800+LEFT([.E55];2)*1;MID([.E55];3;2)*1-80;MID([.E55];5;2));IF(MID([.E55];3;2)*1&gt;20;DATE(2000+LEFT([.E55];2)*1;MID([.E55];3;2)*1-20;MID([.E55];5;2));DATE(1900+LEFT([.E55];2)*1;MID([.E55];3;2)*1;MID([.E55];5;2))))" table:style-name="ce11">
            <text:p>14.12.1953</text:p>
          </table:table-cell>
          <table:table-cell office:value-type="float" office:value="68" table:formula="of:=YEAR([.K55])-YEAR([.F55])" table:style-name="ce12">
            <text:p>68</text:p>
          </table:table-cell>
          <table:table-cell table:style-name="ce12"/>
          <table:table-cell office:value-type="string" table:style-name="ce1">
            <text:p>Chłoniak z komórek płaszcza</text:p>
          </table:table-cell>
          <table:table-cell office:value-type="string" table:style-name="ce1">
            <text:p>RHAD</text:p>
          </table:table-cell>
          <table:table-cell office:value-type="date" office:date-value="2021-01-05T00:00:00" table:style-name="ce11">
            <text:p>05.01.2021</text:p>
          </table:table-cell>
          <table:table-cell office:value-type="string" table:style-name="ce1">
            <text:p>25.05.2021/po 2 cyklach/dobra dopowedz na leczenie</text:p>
          </table:table-cell>
          <table:table-cell office:value-type="string" table:style-name="ce1">
            <text:p>17.08.2021/po 3 cyklu/czesciowa wznowa choroby</text:p>
          </table:table-cell>
          <table:table-cell office:value-type="string" table:style-name="ce1">
            <text:p>21.01.2022/po zakonczeniu leczenie/dobra dopowedz na leczenie</text:p>
          </table:table-cell>
          <table:table-cell office:value-type="string" table:style-name="ce1">
            <text:p>16.09.2022/kontrola/stabilizacja</text:p>
          </table:table-cell>
          <table:table-cell table:number-columns-repeated="16369" table:style-name="ce1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string" table:style-name="ce1">
            <text:p>Anna<text:s/></text:p>
          </table:table-cell>
          <table:table-cell office:value-type="string" table:style-name="ce1">
            <text:p>Bąk</text:p>
          </table:table-cell>
          <table:table-cell office:value-type="string" office:string-value="kobieta" table:formula="of:=IF(ISEVEN(MID([.E56];10;1));&quot;kobieta&quot;;&quot;mężczyzna&quot;)" table:style-name="ce1">
            <text:p>kobieta</text:p>
          </table:table-cell>
          <table:table-cell office:value-type="string" table:style-name="ce10">
            <text:p>70012501626</text:p>
          </table:table-cell>
          <table:table-cell office:value-type="date" office:date-value="1970-01-25T00:00:00" table:formula="of:=IF(MID([.E56];3;2)*1&gt;80;DATE(1800+LEFT([.E56];2)*1;MID([.E56];3;2)*1-80;MID([.E56];5;2));IF(MID([.E56];3;2)*1&gt;20;DATE(2000+LEFT([.E56];2)*1;MID([.E56];3;2)*1-20;MID([.E56];5;2));DATE(1900+LEFT([.E56];2)*1;MID([.E56];3;2)*1;MID([.E56];5;2))))" table:style-name="ce11">
            <text:p>25.01.1970</text:p>
          </table:table-cell>
          <table:table-cell office:value-type="float" office:value="51" table:formula="of:=YEAR([.K56])-YEAR([.F56])" table:style-name="ce17">
            <text:p>51</text:p>
          </table:table-cell>
          <table:table-cell table:style-name="ce12"/>
          <table:table-cell office:value-type="string" table:style-name="ce1">
            <text:p>Chłoniak Grudkowy</text:p>
          </table:table-cell>
          <table:table-cell office:value-type="string" table:style-name="ce1">
            <text:p>CVP</text:p>
          </table:table-cell>
          <table:table-cell office:value-type="date" office:date-value="2021-11-23T00:00:00" table:style-name="ce11">
            <text:p>23.11.2021</text:p>
          </table:table-cell>
          <table:table-cell office:value-type="string" table:style-name="ce1">
            <text:p>17.05.2021/po 4 cyklach lecznia/bardzo dobra odpowiedz na leczenie</text:p>
          </table:table-cell>
          <table:table-cell office:value-type="string" table:style-name="ce1">
            <text:p>15.09.2022/po 8 cyklach/dobra dopowiedz na leczenie</text:p>
          </table:table-cell>
          <table:table-cell table:number-columns-repeated="16371" table:style-name="ce1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CHojnowski</text:p>
          </table:table-cell>
          <table:table-cell office:value-type="string" office:string-value="mężczyzna" table:formula="of:=IF(ISEVEN(MID([.E57];10;1));&quot;kobieta&quot;;&quot;mężczyzna&quot;)" table:style-name="ce1">
            <text:p>mężczyzna</text:p>
          </table:table-cell>
          <table:table-cell office:value-type="string" table:style-name="ce10">
            <text:p>65092604958</text:p>
          </table:table-cell>
          <table:table-cell office:value-type="date" office:date-value="1965-09-26T00:00:00" table:formula="of:=IF(MID([.E57];3;2)*1&gt;80;DATE(1800+LEFT([.E57];2)*1;MID([.E57];3;2)*1-80;MID([.E57];5;2));IF(MID([.E57];3;2)*1&gt;20;DATE(2000+LEFT([.E57];2)*1;MID([.E57];3;2)*1-20;MID([.E57];5;2));DATE(1900+LEFT([.E57];2)*1;MID([.E57];3;2)*1;MID([.E57];5;2))))" table:style-name="ce11">
            <text:p>26.09.1965</text:p>
          </table:table-cell>
          <table:table-cell office:value-type="float" office:value="55" table:formula="of:=YEAR([.K57])-YEAR([.F57])" table:style-name="ce17">
            <text:p>55</text:p>
          </table:table-cell>
          <table:table-cell table:style-name="ce12"/>
          <table:table-cell office:value-type="string" table:style-name="ce1">
            <text:p>Chłonika nieziarniczy z komórek T</text:p>
          </table:table-cell>
          <table:table-cell office:value-type="string" table:style-name="ce1">
            <text:p>CHOEp</text:p>
          </table:table-cell>
          <table:table-cell office:value-type="date" office:date-value="2020-04-24T00:00:00" table:style-name="ce11">
            <text:p>24.04.2020</text:p>
          </table:table-cell>
          <table:table-cell office:value-type="string" table:style-name="ce1">
            <text:p>1.06.2020/po 3 cyklacch/bardzo dobra odpowiedz na leczenie</text:p>
          </table:table-cell>
          <table:table-cell office:value-type="string" table:style-name="ce1">
            <text:p>14.08.2020/po 6 cyklach/dobra odpowoedz na leczenie</text:p>
          </table:table-cell>
          <table:table-cell office:value-type="string" table:style-name="ce1">
            <text:p>7.03.2022/po zakonczeniu leczenia/dobra odpowiedz na leczenie</text:p>
          </table:table-cell>
          <table:table-cell office:value-type="string" table:style-name="ce1">
            <text:p>13.09.2022/kontrola/wznowa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WIEK</text:p>
          </table:table-cell>
          <table:table-cell office:value-type="string" table:style-name="ce1">
            <text:p>KOBIETA</text:p>
          </table:table-cell>
          <table:table-cell office:value-type="string" table:style-name="ce10">
            <text:p>MĘŻCZYZNA</text:p>
          </table:table-cell>
          <table:table-cell table:style-name="ce11"/>
          <table:table-cell table:number-columns-repeated="2" table:style-name="ce12"/>
          <table:table-cell table:number-columns-repeated="2" table:style-name="ce1"/>
          <table:table-cell table:style-name="ce11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&lt;20</text:p>
          </table:table-cell>
          <table:table-cell office:value-type="float" office:value="1" table:formula="of:=COUNTIFS([.D2:.D57];&quot;=kobieta&quot;;[.G2:.G57];&quot;&lt;=20&quot;)" table:style-name="ce1">
            <text:p>1</text:p>
          </table:table-cell>
          <table:table-cell office:value-type="float" office:value="1" table:formula="of:=COUNTIFS([.D2:.D57];&quot;=mężczyzna&quot;;[.G2:.G57];&quot;&lt;=20&quot;)" table:style-name="ce1">
            <text:p>1</text:p>
          </table:table-cell>
          <table:table-cell table:style-name="ce11">
            <draw:frame draw:z-index="1" draw:id="id1" draw:style-name="a1" draw:name="Wykres 3" svg:x="0.975in" svg:y="0.11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12"/>
          <table:table-cell table:number-columns-repeated="2" table:style-name="ce1"/>
          <table:table-cell table:style-name="ce11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21-30</text:p>
          </table:table-cell>
          <table:table-cell office:value-type="float" office:value="4" table:formula="of:=COUNTIFS([.$D$2:.$D$57];&quot;=kobieta&quot;;[.$G$2:.$G$57];&quot;&gt;20&quot;;[.$G$2:.$G$57];&quot;&lt;=30&quot;)" table:style-name="ce1">
            <text:p>4</text:p>
          </table:table-cell>
          <table:table-cell office:value-type="float" office:value="5" table:formula="of:=COUNTIFS([.$D2:.D57];&quot;=mężczyzna&quot;;[.$G2:.$G57];&quot;&gt;20&quot;;[.$G2:.$G57];&quot;&lt;=30&quot;)" table:style-name="ce1">
            <text:p>5</text:p>
          </table:table-cell>
          <table:table-cell table:style-name="ce11"/>
          <table:table-cell table:number-columns-repeated="2" table:style-name="ce12"/>
          <table:table-cell table:number-columns-repeated="2" table:style-name="ce1"/>
          <table:table-cell table:style-name="ce11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31-40</text:p>
          </table:table-cell>
          <table:table-cell office:value-type="float" office:value="4" table:formula="of:=COUNTIFS([.$D$2:.$D$57];&quot;=kobieta&quot;;[.$G$2:.$G$57];&quot;&gt;30&quot;;[.$G$2:.$G$57];&quot;&lt;=40&quot;)" table:style-name="ce1">
            <text:p>4</text:p>
          </table:table-cell>
          <table:table-cell office:value-type="float" office:value="3" table:formula="of:=COUNTIFS([.$D2:.D57];&quot;=mężczyzna&quot;;[.$G2:.$G57];&quot;&gt;30&quot;;[.$G2:.$G57];&quot;&lt;=40&quot;)" table:style-name="ce1">
            <text:p>3</text:p>
          </table:table-cell>
          <table:table-cell table:style-name="ce11"/>
          <table:table-cell table:number-columns-repeated="2" table:style-name="ce12"/>
          <table:table-cell table:number-columns-repeated="2" table:style-name="ce1"/>
          <table:table-cell table:style-name="ce11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41-50</text:p>
          </table:table-cell>
          <table:table-cell office:value-type="float" office:value="8" table:formula="of:=COUNTIFS([.$D$2:.$D$57];&quot;=kobieta&quot;;[.$G$2:.$G$57];&quot;&gt;40&quot;;[.$G$2:.$G$57];&quot;&lt;=50&quot;)" table:style-name="ce1">
            <text:p>8</text:p>
          </table:table-cell>
          <table:table-cell office:value-type="float" office:value="3" table:formula="of:=COUNTIFS([.$D2:.D$57];&quot;=mężczyzna&quot;;[.$G2:.$G57];&quot;&gt;40&quot;;[.$G2:.$G57];&quot;&lt;=50&quot;)" table:style-name="ce1">
            <text:p>3</text:p>
          </table:table-cell>
          <table:table-cell table:style-name="ce11"/>
          <table:table-cell table:number-columns-repeated="2" table:style-name="ce12"/>
          <table:table-cell table:number-columns-repeated="2" table:style-name="ce1"/>
          <table:table-cell table:style-name="ce11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">
            <text:p>51-60</text:p>
          </table:table-cell>
          <table:table-cell office:value-type="float" office:value="4" table:formula="of:=COUNTIFS([.$D$2:.$D$57];&quot;=kobieta&quot;;[.$G$2:.$G$57];&quot;&gt;50&quot;;[.$G$2:.$G$57];&quot;&lt;=60&quot;)" table:style-name="ce1">
            <text:p>4</text:p>
          </table:table-cell>
          <table:table-cell office:value-type="float" office:value="6" table:formula="of:=COUNTIFS([.$D2:.D$57];&quot;=mężczyzna&quot;;[.$G2:.$G57];&quot;&gt;50&quot;;[.$G2:.$G57];&quot;&lt;=60&quot;)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61-70</text:p>
          </table:table-cell>
          <table:table-cell office:value-type="float" office:value="3" table:formula="of:=COUNTIFS([.$D$2:.$D$57];&quot;=kobieta&quot;;[.$G$2:.$G$57];&quot;&gt;60&quot;;[.$G$2:.$G$57];&quot;&lt;=70&quot;)" table:style-name="ce1">
            <text:p>3</text:p>
          </table:table-cell>
          <table:table-cell office:value-type="float" office:value="5" table:formula="of:=COUNTIFS([.$D2:.D$57];&quot;=mężczyzna&quot;;[.$G2:.$G57];&quot;&gt;60&quot;;[.$G2:.$G57];&quot;&lt;=70&quot;)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71-80</text:p>
          </table:table-cell>
          <table:table-cell office:value-type="float" office:value="1" table:formula="of:=COUNTIFS([.$D$2:.$D$57];&quot;=kobieta&quot;;[.$G$2:.$G$57];&quot;&gt;70&quot;;[.$G$2:.$G$57];&quot;&lt;=80&quot;)" table:style-name="ce1">
            <text:p>1</text:p>
          </table:table-cell>
          <table:table-cell office:value-type="float" office:value="6" table:formula="of:=COUNTIFS([.$D2:.D$57];&quot;=mężczyzna&quot;;[.$G2:.$G57];&quot;&gt;70&quot;;[.$G2:.$G57];&quot;&lt;=80&quot;)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&gt;80</text:p>
          </table:table-cell>
          <table:table-cell office:value-type="float" office:value="1" table:formula="of:=COUNTIFS([.$D$2:.$D$57];&quot;=kobieta&quot;;[.$G$2:.$G$57];&quot;&gt;80&quot;)" table:style-name="ce1">
            <text:p>1</text:p>
          </table:table-cell>
          <table:table-cell office:value-type="float" office:value="1" table:formula="of:=COUNTIFS([.$D$2:.D$57];&quot;=mężczyzna&quot;;[.$G$2:.$G$57];&quot;&gt;80&quot;)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26" table:formula="of:=SUM([.D61:.D68])" table:style-name="ce1">
            <text:p>26</text:p>
          </table:table-cell>
          <table:table-cell office:value-type="float" office:value="30" table:formula="of:=SUM([.E61:.E68])" table:style-name="ce42">
            <text:p>3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26" table:formula="of:=COUNTIF([.D2:.D57];&quot;=kobieta&quot;)" table:style-name="ce1">
            <text:p>26</text:p>
          </table:table-cell>
          <table:table-cell office:value-type="float" office:value="30" table:formula="of:=COUNTIF([.D2:.D57];&quot;=mężczyzna&quot;)" table:style-name="ce1">
            <text:p>30</text:p>
          </table:table-cell>
          <table:table-cell table:number-columns-repeated="16379"/>
        </table:table-row>
        <table:table-row table:number-rows-repeated="1048506" table:style-name="ro1">
          <table:table-cell table:number-columns-repeated="16384"/>
        </table:table-row>
      </table:table>
      <table:table table:name="Arkusz3" table:style-name="ta1"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9" table:number-columns-repeated="2" table:default-cell-style-name="ce1"/>
        <table:table-column table:style-name="co27" table:default-cell-style-name="ce1"/>
        <table:table-column table:style-name="co19" table:number-columns-repeated="4" table:default-cell-style-name="ce1"/>
        <table:table-column table:style-name="co28" table:default-cell-style-name="ce1"/>
        <table:table-column table:style-name="co19" table:number-columns-repeated="16363" table:default-cell-style-name="ce1"/>
        <table:table-row table:style-name="ro1">
          <table:table-cell office:value-type="string" table:style-name="ce1">
            <text:p>plec</text:p>
          </table:table-cell>
          <table:table-cell office:value-type="string" table:style-name="ce1">
            <text:p>wiek</text:p>
          </table:table-cell>
          <table:table-cell office:value-type="string" table:style-name="ce1">
            <text:p>odpowiedz w trakcie</text:p>
          </table:table-cell>
          <table:table-cell office:value-type="string" table:style-name="ce1">
            <text:p>odpowiedz po<text:s/></text:p>
          </table:table-cell>
          <table:table-cell office:value-type="string" table:style-name="ce1">
            <text:p>rozpoznanie</text:p>
          </table:table-cell>
          <table:table-cell office:value-type="string" table:style-name="ce1">
            <text:p>leczeni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terapii</text:p>
          </table:table-cell>
          <table:table-cell office:value-type="string" table:style-name="ce1">
            <text:p>rodziaj chłoniak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43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Wartości oczekiwane</text:p>
          </table:table-cell>
          <table:table-cell table:number-columns-repeated="6" table:style-name="ce1"/>
          <table:table-cell office:value-type="string" table:style-name="ce1">
            <text:p>Wartości oczekiwane</text:p>
          </table:table-cell>
          <table:table-cell table:number-columns-repeated="7" table:style-name="ce1"/>
          <table:table-cell office:value-type="string" table:style-name="ce1">
            <text:p>terapia</text:p>
          </table:table-cell>
          <table:table-cell table:number-columns-repeated="6" table:style-name="ce1"/>
          <table:table-cell office:value-type="string" table:style-name="ce1">
            <text:p>CHŁONIAK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w trakcie</text:p>
          </table:table-cell>
          <table:table-cell table:number-columns-repeated="6" table:style-name="ce1"/>
          <table:table-cell office:value-type="string" table:style-name="ce1">
            <text:p>w trakcie</text:p>
          </table:table-cell>
          <table:table-cell table:number-columns-repeated="7" table:style-name="ce1"/>
          <table:table-cell office:value-type="string" table:style-name="ce1">
            <text:p>w trakcie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</text:p>
          </table:table-cell>
          <table:table-cell table:number-columns-repeated="2" table:style-name="ce1"/>
          <table:table-cell office:value-type="string" table:style-name="ce1">
            <text:p>w trakci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IFRT</text:p>
          </table:table-cell>
          <table:table-cell table:number-columns-repeated="2"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style-name="ce1"/>
          <table:table-cell office:value-type="string" table:style-name="ce1">
            <text:p>WIEK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2" table:style-name="ce1"/>
          <table:table-cell office:value-type="string" table:style-name="ce1">
            <text:p>RCHOP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1" table:formula="of:=SUM([.Y8:.AB8])" table:style-name="ce1">
            <text:p>21</text:p>
          </table:table-cell>
          <table:table-cell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ABVD</text:p>
          </table:table-cell>
          <table:table-cell office:value-type="string" table:style-name="ce1">
            <text:p>BEACOPP</text:p>
          </table:table-cell>
          <table:table-cell table:style-name="ce1"/>
          <table:table-cell office:value-type="string" table:style-name="ce1">
            <text:p>kobieta</text:p>
          </table:table-cell>
          <table:table-cell office:value-type="float" office:value="8" table:formula="of:=COUNTIFS([.A2:.A57];&quot;kobieta&quot;;[.C2:.C57];&quot;1&quot;)" table:style-name="ce1">
            <text:p>8</text:p>
          </table:table-cell>
          <table:table-cell office:value-type="float" office:value="8" table:formula="of:=COUNTIFS([.$A$2:.$A$57];&quot;kobieta&quot;;[.$C$2:.$C$57];&quot;2&quot;)" table:style-name="ce1">
            <text:p>8</text:p>
          </table:table-cell>
          <table:table-cell office:value-type="float" office:value="8" table:formula="of:=COUNTIFS([.$A$2:.$A$57];&quot;kobieta&quot;;[.$C$2:.$C$57];&quot;4&quot;)" table:style-name="ce1">
            <text:p>8</text:p>
          </table:table-cell>
          <table:table-cell office:value-type="float" office:value="2" table:formula="of:=COUNTIFS([.$A$2:.$A$57];&quot;kobieta&quot;;[.$C$2:.$C$57];&quot;5&quot;)" table:style-name="ce1">
            <text:p>2</text:p>
          </table:table-cell>
          <table:table-cell office:value-type="float" office:value="26" table:formula="of:=SUM([.J9:.M9])" table:style-name="ce43">
            <text:p>26</text:p>
          </table:table-cell>
          <table:table-cell table:style-name="ce1"/>
          <table:table-cell office:value-type="string" table:style-name="ce1">
            <text:p>15-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Q9:.T9])" table:style-name="ce1">
            <text:p>10</text:p>
          </table:table-cell>
          <table:table-cell table:number-columns-repeated="2" table:style-name="ce1"/>
          <table:table-cell office:value-type="string" table:style-name="ce1">
            <text:p>abvd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SUM(COUNTIFS([.$F$2:.$F$57];&quot;ABVD&quot;;[.$C$2:.$C$57];&quot;5&quot;);COUNTIFS([.$G$2:.$G$57];&quot;ABVD&quot;;[.$C$2:.$C$57];&quot;5&quot;);COUNTIFS([.$H$2:.$H$57];&quot;ABVD&quot;;[.$C$2:.$C$57];&quot;5&quot;))" table:style-name="ce1">
            <text:p>1</text:p>
          </table:table-cell>
          <table:table-cell office:value-type="float" office:value="25" table:formula="of:=SUM([.Y9:.AB9])" table:style-name="ce1">
            <text:p>25</text:p>
          </table:table-cell>
          <table:table-cell table:style-name="ce1"/>
          <table:table-cell office:value-type="string" table:style-name="ce1">
            <text:p>HL</text:p>
          </table:table-cell>
          <table:table-cell office:value-type="float" office:value="5" table:formula="of:=COUNTIFS([.$E$2:.$E$57];&quot;HL&quot;;[.$C$2:.$C$57];&quot;1&quot;)" table:style-name="ce1">
            <text:p>5</text:p>
          </table:table-cell>
          <table:table-cell office:value-type="float" office:value="9" table:formula="of:=COUNTIFS([.$E$2:.$E$57];&quot;HL&quot;;[.$C$2:.$C$57];&quot;2&quot;)" table:style-name="ce1">
            <text:p>9</text:p>
          </table:table-cell>
          <table:table-cell office:value-type="float" office:value="7" table:formula="of:=COUNTIFS([.$E$2:.$E$57];&quot;HL&quot;;[.$C$2:.$C$57];&quot;4&quot;)" table:style-name="ce1">
            <text:p>7</text:p>
          </table:table-cell>
          <table:table-cell office:value-type="float" office:value="1" table:formula="of:=COUNTIFS([.$E$2:.$E$57];&quot;HL&quot;;[.$C$2:.$C$57];&quot;5&quot;)" table:style-name="ce1">
            <text:p>1</text:p>
          </table:table-cell>
          <table:table-cell office:value-type="float" office:value="22" table:formula="of:=SUM([.AF9:.AI9])" table:style-name="ce43">
            <text:p>2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VP</text:p>
          </table:table-cell>
          <table:table-cell office:value-type="string" table:style-name="ce1">
            <text:p>IFRT</text:p>
          </table:table-cell>
          <table:table-cell table:style-name="ce1"/>
          <table:table-cell office:value-type="string" table:style-name="ce1">
            <text:p>mezczyzna</text:p>
          </table:table-cell>
          <table:table-cell office:value-type="float" office:value="6" table:formula="of:=COUNTIFS([.A2:.A57];&quot;mężczyzna&quot;;[.C2:.C57];1)" table:style-name="ce1">
            <text:p>6</text:p>
          </table:table-cell>
          <table:table-cell office:value-type="float" office:value="18" table:formula="of:=COUNTIFS([.$A$2:.$A$57];&quot;mężczyzna&quot;;[.$C$2:.$C$57];&quot;2&quot;)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9" table:formula="of:=SUM([.J10:.M10])" table:style-name="ce43">
            <text:p>29</text:p>
          </table:table-cell>
          <table:table-cell table:style-name="ce1"/>
          <table:table-cell office:value-type="string" table:style-name="ce44">
            <text:p>31-5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8" table:formula="of:=SUM([.Q10:.T10])" table:style-name="ce1">
            <text:p>18</text:p>
          </table:table-cell>
          <table:table-cell table:number-columns-repeated="2" table:style-name="ce1"/>
          <table:table-cell office:value-type="string" table:style-name="ce1">
            <text:p>ifrt</text:p>
          </table:table-cell>
          <table:table-cell office:value-type="float" office:value="1" table:formula="of:=SUM(COUNTIFS([.$F$2:.$F$57];&quot;IFRT&quot;;[.$C$2:.$C$57];&quot;1&quot;);COUNTIFS([.$G$2:.$G$57];&quot;IFRT&quot;;[.$C$2:.$C$57];&quot;1&quot;);COUNTIFS([.$H$2:.$H$57];&quot;IFRT&quot;;[.$C$2:.$C$57];&quot;1&quot;))" table:style-name="ce1">
            <text:p>1</text:p>
          </table:table-cell>
          <table:table-cell office:value-type="float" office:value="2" table:formula="of:=SUM(COUNTIFS([.$F$2:.$F$57];&quot;IFRT&quot;;[.$C$2:.$C$57];&quot;2&quot;);COUNTIFS([.$G$2:.$G$57];&quot;IFRT&quot;;[.$C$2:.$C$57];&quot;2&quot;);COUNTIFS([.$H$2:.$H$57];&quot;IFRT&quot;;[.$C$2:.$C$57];&quot;2&quot;)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SUM([.Y10:.AB10])" table:style-name="ce1">
            <text:p>6</text:p>
          </table:table-cell>
          <table:table-cell table:style-name="ce1"/>
          <table:table-cell office:value-type="string" table:style-name="ce1">
            <text:p>NHL</text:p>
          </table:table-cell>
          <table:table-cell office:value-type="float" office:value="9" table:formula="of:=COUNTIFS([.$E$2:.$E$57];&quot;NHL&quot;;[.$C$2:.$C$57];&quot;1&quot;)" table:style-name="ce1">
            <text:p>9</text:p>
          </table:table-cell>
          <table:table-cell office:value-type="float" office:value="17" table:formula="of:=COUNTIFS([.$E$2:.$E$57];&quot;NHL&quot;;[.$C$2:.$C$57];&quot;2&quot;)" table:style-name="ce1">
            <text:p>17</text:p>
          </table:table-cell>
          <table:table-cell office:value-type="float" office:value="6" table:formula="of:=COUNTIFS([.$E$2:.$E$57];&quot;NHL&quot;;[.$C$2:.$C$57];&quot;4&quot;)" table:style-name="ce1">
            <text:p>6</text:p>
          </table:table-cell>
          <table:table-cell office:value-type="float" office:value="1" table:formula="of:=COUNTIFS([.$E$2:.$E$57];&quot;NHL&quot;;[.$C$2:.$C$57];&quot;5&quot;)" table:style-name="ce1">
            <text:p>1</text:p>
          </table:table-cell>
          <table:table-cell office:value-type="float" office:value="33" table:formula="of:=SUM([.AF10:.AI10])" table:style-name="ce43">
            <text:p>3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14" table:formula="of:=SUM([.J9:.J10])" table:style-name="ce43">
            <text:p>14</text:p>
          </table:table-cell>
          <table:table-cell office:value-type="float" office:value="26" table:formula="of:=SUM([.K9:.K10])" table:style-name="ce43">
            <text:p>26</text:p>
          </table:table-cell>
          <table:table-cell office:value-type="float" office:value="12" table:formula="of:=SUM([.L9:.L10])" table:style-name="ce43">
            <text:p>12</text:p>
          </table:table-cell>
          <table:table-cell office:value-type="float" office:value="3" table:formula="of:=SUM([.M9:.M10])" table:style-name="ce43">
            <text:p>3</text:p>
          </table:table-cell>
          <table:table-cell office:value-type="float" office:value="55" table:formula="of:=SUM([.N9:.N10])" table:style-name="ce43">
            <text:p>55</text:p>
          </table:table-cell>
          <table:table-cell table:style-name="ce1"/>
          <table:table-cell office:value-type="string" table:style-name="ce1">
            <text:p>51-7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8" table:formula="of:=SUM([.Q11:.T11])" table:style-name="ce1">
            <text:p>18</text:p>
          </table:table-cell>
          <table:table-cell table:number-columns-repeated="2" table:style-name="ce1"/>
          <table:table-cell office:value-type="string" table:style-name="ce45">
            <text:p>AVD</text:p>
          </table:table-cell>
          <table:table-cell office:value-type="float" office:value="1" table:formula="of:=SUM(COUNTIFS([.$F$2:.$F$57];&quot;AVD&quot;;[.$C$2:.$C$57];&quot;1&quot;);COUNTIFS([.$G$2:.$G$57];&quot;AVD&quot;;[.$C$2:.$C$57];&quot;1&quot;);COUNTIFS([.$H$2:.$H$57];&quot;AVD&quot;;[.$C$2:.$C$57];&quot;1&quot;))" table:style-name="ce45">
            <text:p>1</text:p>
          </table:table-cell>
          <table:table-cell office:value-type="float" office:value="3" table:style-name="ce45">
            <text:p>3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6" table:formula="of:=SUM([.Y11:.AB11])" table:style-name="ce45">
            <text:p>6</text:p>
          </table:table-cell>
          <table:table-cell table:style-name="ce1"/>
          <table:table-cell office:value-type="string" table:style-name="ce1">
            <text:p>suma</text:p>
          </table:table-cell>
          <table:table-cell office:value-type="float" office:value="14" table:formula="of:=SUM([.AF9:.AF10])" table:style-name="ce43">
            <text:p>14</text:p>
          </table:table-cell>
          <table:table-cell office:value-type="float" office:value="26" table:formula="of:=SUM([.AG9:.AG10])" table:style-name="ce43">
            <text:p>26</text:p>
          </table:table-cell>
          <table:table-cell office:value-type="float" office:value="13" table:formula="of:=SUM([.AH9:.AH10])" table:style-name="ce43">
            <text:p>13</text:p>
          </table:table-cell>
          <table:table-cell office:value-type="float" office:value="2" table:formula="of:=SUM([.AI9:.AI10])" table:style-name="ce43">
            <text:p>2</text:p>
          </table:table-cell>
          <table:table-cell office:value-type="float" office:value="55" table:formula="of:=SUM([.AJ9:.AJ10])" table:style-name="ce43">
            <text:p>55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46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9" table:style-name="ce1"/>
          <table:table-cell office:value-type="string" table:style-name="ce1">
            <text:p>71-10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formula="of:=SUM([.Q12:.T12])" table:style-name="ce1">
            <text:p>9</text:p>
          </table:table-cell>
          <table:table-cell table:number-columns-repeated="2" table:style-name="ce1"/>
          <table:table-cell office:value-type="string" table:style-name="ce1">
            <text:p>CVP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SUM([.Y12:.AB12])" table:style-name="ce1">
            <text:p>8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office:value-type="string" table:style-name="ce1">
            <text:p>BEACOPP</text:p>
          </table:table-cell>
          <table:table-cell office:value-type="string" table:style-name="ce1">
            <text:p>IFRT</text:p>
          </table:table-cell>
          <table:table-cell office:value-type="string" table:style-name="ce1">
            <text:p>po leczeniu</text:p>
          </table:table-cell>
          <table:table-cell table:number-columns-repeated="6" table:style-name="ce1"/>
          <table:table-cell office:value-type="string" table:style-name="ce1">
            <text:p>suma</text:p>
          </table:table-cell>
          <table:table-cell office:value-type="float" office:value="14" table:formula="of:=SUM([.Q9:.Q12])" table:style-name="ce1">
            <text:p>14</text:p>
          </table:table-cell>
          <table:table-cell office:value-type="float" office:value="25" table:formula="of:=SUM([.R9:.R12])" table:style-name="ce1">
            <text:p>25</text:p>
          </table:table-cell>
          <table:table-cell office:value-type="float" office:value="12" table:formula="of:=SUM([.S9:.S12])" table:style-name="ce1">
            <text:p>12</text:p>
          </table:table-cell>
          <table:table-cell office:value-type="float" office:value="4" table:formula="of:=SUM([.T9:.T12])" table:style-name="ce1">
            <text:p>4</text:p>
          </table:table-cell>
          <table:table-cell office:value-type="float" office:value="55" table:formula="of:=SUM([.Q13:.T13])" table:style-name="ce1">
            <text:p>55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18" table:formula="of:=SUM([.Y8:.Y12])" table:style-name="ce1">
            <text:p>18</text:p>
          </table:table-cell>
          <table:table-cell office:value-type="float" office:value="27" table:formula="of:=SUM([.Z8:.Z12])" table:style-name="ce1">
            <text:p>27</text:p>
          </table:table-cell>
          <table:table-cell office:value-type="float" office:value="14" table:formula="of:=SUM([.AA8:.AA12])" table:style-name="ce1">
            <text:p>14</text:p>
          </table:table-cell>
          <table:table-cell office:value-type="float" office:value="7" table:formula="of:=SUM([.AB8:.AB12])" table:style-name="ce1">
            <text:p>7</text:p>
          </table:table-cell>
          <table:table-cell office:value-type="float" office:value="66" table:formula="of:=SUM([.AC8:.AC12])" table:style-name="ce1">
            <text:p>66</text:p>
          </table:table-cell>
          <table:table-cell table:style-name="ce1"/>
          <table:table-cell office:value-type="string" table:style-name="ce1">
            <text:p>po leczeniu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office:value-type="string" table:style-name="ce1">
            <text:p>IFRT</text:p>
          </table:table-cell>
          <table:table-cell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16"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kobieta</text:p>
          </table:table-cell>
          <table:table-cell office:value-type="float" office:value="7" table:formula="of:=COUNTIFS([.$A$2:.$A$57];&quot;kobieta&quot;;[.$D$2:.$D$57];&quot;1&quot;)" table:style-name="ce1">
            <text:p>7</text:p>
          </table:table-cell>
          <table:table-cell office:value-type="float" office:value="18" table:formula="of:=COUNTIFS([.$A$2:.$A$57];&quot;kobieta&quot;;[.$D$2:.$D$57];&quot;2&quot;)" table:style-name="ce1">
            <text:p>18</text:p>
          </table:table-cell>
          <table:table-cell office:value-type="float" office:value="1" table:formula="of:=COUNTIFS([.$A$2:.$A$57];&quot;kobieta&quot;;[.$D$2:.$D$57];&quot;4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formula="of:=SUM([.J15:.M15])" table:style-name="ce43">
            <text:p>27</text:p>
          </table:table-cell>
          <table:table-cell table:style-name="ce1"/>
          <table:table-cell office:value-type="string" table:style-name="ce1">
            <text:p>po leczeniu</text:p>
          </table:table-cell>
          <table:table-cell table:number-columns-repeated="14" table:style-name="ce1"/>
          <table:table-cell office:value-type="string" table:style-name="ce1">
            <text:p>nhl</text:p>
          </table:table-cell>
          <table:table-cell office:value-type="float" office:value="5" table:formula="of:=COUNTIFS([.$E$2:.$E$57];&quot;HL&quot;;[.$D$2:.$D$57];&quot;1&quot;)" table:style-name="ce1">
            <text:p>5</text:p>
          </table:table-cell>
          <table:table-cell office:value-type="float" office:value="12" table:formula="of:=COUNTIFS([.$E$2:.$E$57];&quot;HL&quot;;[.$D$2:.$D$57];&quot;2&quot;)" table:style-name="ce1">
            <text:p>12</text:p>
          </table:table-cell>
          <table:table-cell office:value-type="float" office:value="1" table:formula="of:=COUNTIFS([.$E$2:.$E$57];&quot;HL&quot;;[.$D$2:.$D$57];&quot;4&quot;)" table:style-name="ce1">
            <text:p>1</text:p>
          </table:table-cell>
          <table:table-cell office:value-type="float" office:value="5" table:formula="of:=COUNTIFS([.$E$2:.$E$57];&quot;HL&quot;;[.$D$2:.$D$57];&quot;5&quot;)" table:style-name="ce1">
            <text:p>5</text:p>
          </table:table-cell>
          <table:table-cell office:value-type="float" office:value="23" table:formula="of:=SUM([.AF15:.AI15])" table:style-name="ce43">
            <text:p>2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IFRT</text:p>
          </table:table-cell>
          <table:table-cell table:number-columns-repeated="2" table:style-name="ce1"/>
          <table:table-cell office:value-type="string" table:style-name="ce1">
            <text:p>mezczyzna</text:p>
          </table:table-cell>
          <table:table-cell office:value-type="float" office:value="5" table:formula="of:=COUNTIFS([.A2:.A57];&quot;mężczyzna&quot;;[.D2:.D57];&quot;1&quot;)" table:style-name="ce1">
            <text:p>5</text:p>
          </table:table-cell>
          <table:table-cell office:value-type="float" office:value="14" table:formula="of:=COUNTIFS([.$A$2:.$A$57];&quot;mężczyzna&quot;;[.$D$2:.$D$57];&quot;2&quot;)" table:style-name="ce1">
            <text:p>14</text:p>
          </table:table-cell>
          <table:table-cell office:value-type="float" office:value="1" table:formula="of:=COUNTIFS([.$A$2:.$A$57];&quot;mężczyzna&quot;;[.$D$2:.$D$57];&quot;4&quot;)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9" table:formula="of:=SUM([.J16:.M16])" table:style-name="ce43">
            <text:p>29</text:p>
          </table:table-cell>
          <table:table-cell table:style-name="ce1"/>
          <table:table-cell office:value-type="string" table:style-name="ce1">
            <text:p>WIEK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2" table:style-name="ce1"/>
          <table:table-cell office:value-type="string" table:style-name="ce1">
            <text:p>po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</text:p>
          </table:table-cell>
          <table:table-cell table:number-columns-repeated="2" table:style-name="ce1"/>
          <table:table-cell office:value-type="string" table:style-name="ce1">
            <text:p>nHL</text:p>
          </table:table-cell>
          <table:table-cell office:value-type="float" office:value="7" table:formula="of:=COUNTIFS([.$E$2:.$E$57];&quot;NHL&quot;;[.$D$2:.$D$57];&quot;1&quot;)" table:style-name="ce1">
            <text:p>7</text:p>
          </table:table-cell>
          <table:table-cell office:value-type="float" office:value="20" table:formula="of:=COUNTIFS([.$E$2:.$E$57];&quot;NHL&quot;;[.$D$2:.$D$57];&quot;2&quot;)" table:style-name="ce1">
            <text:p>20</text:p>
          </table:table-cell>
          <table:table-cell office:value-type="float" office:value="1" table:formula="of:=COUNTIFS([.$E$2:.$E$57];&quot;NHL&quot;;[.$D$2:.$D$57];&quot;4&quot;)" table:style-name="ce1">
            <text:p>1</text:p>
          </table:table-cell>
          <table:table-cell office:value-type="float" office:value="5" table:formula="of:=COUNTIFS([.$E$2:.$E$57];&quot;NHL&quot;;[.$D$2:.$D$57];&quot;5&quot;)" table:style-name="ce1">
            <text:p>5</text:p>
          </table:table-cell>
          <table:table-cell office:value-type="float" office:value="33" table:formula="of:=SUM([.AF16:.AI16])" table:style-name="ce43">
            <text:p>3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12" table:formula="of:=SUM([.J15:.J16])" table:style-name="ce43">
            <text:p>12</text:p>
          </table:table-cell>
          <table:table-cell office:value-type="float" office:value="32" table:formula="of:=SUM([.K15:.K16])" table:style-name="ce43">
            <text:p>32</text:p>
          </table:table-cell>
          <table:table-cell office:value-type="float" office:value="2" table:formula="of:=SUM([.L15:.L16])" table:style-name="ce43">
            <text:p>2</text:p>
          </table:table-cell>
          <table:table-cell office:value-type="float" office:value="10" table:formula="of:=SUM([.M15:.M16])" table:style-name="ce43">
            <text:p>10</text:p>
          </table:table-cell>
          <table:table-cell office:value-type="float" office:value="56" table:formula="of:=SUM([.N15:.N16])" table:style-name="ce43">
            <text:p>56</text:p>
          </table:table-cell>
          <table:table-cell table:style-name="ce1"/>
          <table:table-cell office:value-type="string" table:style-name="ce1">
            <text:p>15-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formula="of:=SUM([.Q17:.T17])" table:style-name="ce1">
            <text:p>11</text:p>
          </table:table-cell>
          <table:table-cell table:number-columns-repeated="2" table:style-name="ce1"/>
          <table:table-cell office:value-type="string" table:style-name="ce1">
            <text:p>RCHOP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1" table:formula="of:=SUM([.Y17:.AB17])" table:style-name="ce1">
            <text:p>21</text:p>
          </table:table-cell>
          <table:table-cell table:style-name="ce1"/>
          <table:table-cell office:value-type="string" table:style-name="ce1">
            <text:p>suma</text:p>
          </table:table-cell>
          <table:table-cell office:value-type="float" office:value="12" table:formula="of:=SUM([.AF15:.AF16])" table:style-name="ce43">
            <text:p>12</text:p>
          </table:table-cell>
          <table:table-cell office:value-type="float" office:value="32" table:formula="of:=SUM([.AG15:.AG16])" table:style-name="ce43">
            <text:p>32</text:p>
          </table:table-cell>
          <table:table-cell office:value-type="float" office:value="2" table:formula="of:=SUM([.AH15:.AH16])" table:style-name="ce43">
            <text:p>2</text:p>
          </table:table-cell>
          <table:table-cell office:value-type="float" office:value="10" table:formula="of:=SUM([.AI15:.AI16])" table:style-name="ce43">
            <text:p>10</text:p>
          </table:table-cell>
          <table:table-cell office:value-type="float" office:value="56" table:formula="of:=SUM([.AJ15:.AJ16])" table:style-name="ce43">
            <text:p>5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office:value-type="string" table:style-name="ce1">
            <text:p>IFRT</text:p>
          </table:table-cell>
          <table:table-cell table:number-columns-repeated="8" table:style-name="ce1"/>
          <table:table-cell office:value-type="string" table:style-name="ce1">
            <text:p>31-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formula="of:=SUM([.Q18:.T18])" table:style-name="ce1">
            <text:p>18</text:p>
          </table:table-cell>
          <table:table-cell table:number-columns-repeated="2" table:style-name="ce1"/>
          <table:table-cell office:value-type="string" table:style-name="ce1">
            <text:p>abvd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SUM(COUNTIFS([.$F$2:.$F$57];&quot;ABVD&quot;;[.$D$2:.$D$57];&quot;4&quot;);COUNTIFS([.$G$2:.$G$57];&quot;ABVD&quot;;[.$D$2:.$D$57];&quot;4&quot;);COUNTIFS([.$H$2:.$H$57];&quot;ABVD&quot;;[.$D$2:.$D$57];&quot;4&quot;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5" table:formula="of:=SUM([.Y18:.AB18])" table:style-name="ce1">
            <text:p>2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VP</text:p>
          </table:table-cell>
          <table:table-cell table:number-columns-repeated="9" table:style-name="ce1"/>
          <table:table-cell office:value-type="string" table:style-name="ce1">
            <text:p>51-7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8" table:formula="of:=SUM([.Q19:.T19])" table:style-name="ce1">
            <text:p>18</text:p>
          </table:table-cell>
          <table:table-cell table:number-columns-repeated="2" table:style-name="ce1"/>
          <table:table-cell office:value-type="string" table:style-name="ce1">
            <text:p>ifrt</text:p>
          </table:table-cell>
          <table:table-cell office:value-type="float" office:value="2" table:formula="of:=SUM(COUNTIFS([.$F$2:.$F$57];&quot;IFRT&quot;;[.$D$2:.$D$57];&quot;1&quot;);COUNTIFS([.$G$2:.$G$57];&quot;IFRT&quot;;[.$D$2:.$D$57];&quot;1&quot;);COUNTIFS([.$H$2:.$H$57];&quot;IFRT&quot;;[.$D$2:.$D$57];&quot;1&quot;))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SUM(COUNTIFS([.$F$2:.$F$57];&quot;IFRT&quot;;[.$D$2:.$D$57];&quot;4&quot;);COUNTIFS([.$G$2:.$G$57];&quot;IFRT&quot;;[.$D$2:.$D$57];&quot;4&quot;);COUNTIFS([.$H$2:.$H$57];&quot;IFRT&quot;;[.$D$2:.$D$57];&quot;4&quot;)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formula="of:=SUM([.Y19:.AB19])" table:style-name="ce1">
            <text:p>7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P</text:p>
          </table:table-cell>
          <table:table-cell table:number-columns-repeated="2" table:style-name="ce1"/>
          <table:table-cell office:value-type="string" table:style-name="ce1">
            <text:p>liczebności teoretyczne</text:p>
          </table:table-cell>
          <table:table-cell table:number-columns-repeated="6" table:style-name="ce1"/>
          <table:table-cell office:value-type="string" table:style-name="ce1">
            <text:p>71-10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SUM([.Q20:.T20])" table:style-name="ce1">
            <text:p>9</text:p>
          </table:table-cell>
          <table:table-cell table:number-columns-repeated="2" table:style-name="ce1"/>
          <table:table-cell office:value-type="string" table:style-name="ce1">
            <text:p>AV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SUM([.Y20:.AB20])" table:style-name="ce1">
            <text:p>6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EP</text:p>
          </table:table-cell>
          <table:table-cell table:number-columns-repeated="2" table:style-name="ce1"/>
          <table:table-cell office:value-type="string" table:style-name="ce1">
            <text:p>w trakcie</text:p>
          </table:table-cell>
          <table:table-cell table:number-columns-repeated="6" table:style-name="ce1"/>
          <table:table-cell office:value-type="string" table:style-name="ce1">
            <text:p>suma</text:p>
          </table:table-cell>
          <table:table-cell office:value-type="float" office:value="13" table:formula="of:=SUM([.Q17:.Q20])" table:style-name="ce1">
            <text:p>13</text:p>
          </table:table-cell>
          <table:table-cell office:value-type="float" office:value="31" table:formula="of:=SUM([.R17:.R20])" table:style-name="ce1">
            <text:p>31</text:p>
          </table:table-cell>
          <table:table-cell office:value-type="float" office:value="4" table:formula="of:=SUM([.S17:.S20])" table:style-name="ce1">
            <text:p>4</text:p>
          </table:table-cell>
          <table:table-cell office:value-type="float" office:value="8" table:formula="of:=SUM([.T17:.T20])" table:style-name="ce1">
            <text:p>8</text:p>
          </table:table-cell>
          <table:table-cell office:value-type="float" office:value="56" table:formula="of:=SUM([.Q21:.T21])" table:style-name="ce1">
            <text:p>56</text:p>
          </table:table-cell>
          <table:table-cell table:number-columns-repeated="2" table:style-name="ce1"/>
          <table:table-cell office:value-type="string" table:style-name="ce45">
            <text:p>CVP</text:p>
          </table:table-cell>
          <table:table-cell office:value-type="float" office:value="3" table:style-name="ce45">
            <text:p>3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7" table:formula="of:=SUM([.Y21:.AB21])" table:style-name="ce1">
            <text:p>7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9" table:style-name="ce1"/>
          <table:table-cell office:value-type="string" table:style-name="ce1">
            <text:p>suma</text:p>
          </table:table-cell>
          <table:table-cell office:value-type="float" office:value="16" table:formula="of:=SUM([.Y17:.Y21])" table:style-name="ce1">
            <text:p>16</text:p>
          </table:table-cell>
          <table:table-cell office:value-type="float" office:value="33" table:formula="of:=SUM([.Z17:.Z21])" table:style-name="ce1">
            <text:p>33</text:p>
          </table:table-cell>
          <table:table-cell office:value-type="float" office:value="6" table:formula="of:=SUM([.AA17:.AA21])" table:style-name="ce1">
            <text:p>6</text:p>
          </table:table-cell>
          <table:table-cell office:value-type="float" office:value="11" table:formula="of:=SUM([.AB17:.AB21])" table:style-name="ce1">
            <text:p>11</text:p>
          </table:table-cell>
          <table:table-cell office:value-type="float" office:value="66" table:formula="of:=SUM([.AC17:.AC21])" table:style-name="ce1">
            <text:p>66</text:p>
          </table:table-cell>
          <table:table-cell table:style-name="ce1"/>
          <table:table-cell office:value-type="string" table:style-name="ce1">
            <text:p>w trakci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office:value-type="string" table:style-name="ce1">
            <text:p>RHAD</text:p>
          </table:table-cell>
          <table:table-cell table:style-name="ce1"/>
          <table:table-cell office:value-type="string" table:style-name="ce1">
            <text:p>kobieta</text:p>
          </table:table-cell>
          <table:table-cell office:value-type="float" office:value="6.6181818181818182" table:formula="of:=([.J11]*[.$N$9])/[.$N$11]" table:style-name="ce1">
            <text:p>6,618181818</text:p>
          </table:table-cell>
          <table:table-cell office:value-type="float" office:value="12.290909090909091" table:formula="of:=([.K11]*[.$N$9])/[.$N$11]" table:style-name="ce1">
            <text:p>12,29090909</text:p>
          </table:table-cell>
          <table:table-cell office:value-type="float" office:value="5.6727272727272728" table:formula="of:=([.L11]*[.$N$9])/[.$N$11]" table:style-name="ce1">
            <text:p>5,672727273</text:p>
          </table:table-cell>
          <table:table-cell office:value-type="float" office:value="1.4181818181818182" table:formula="of:=([.M11]*[.$N$9])/[.$N$11]" table:style-name="ce1">
            <text:p>1,418181818</text:p>
          </table:table-cell>
          <table:table-cell office:value-type="float" office:value="26" table:formula="of:=SUM([.J23:.M23])" table:style-name="ce43">
            <text:p>26</text:p>
          </table:table-cell>
          <table:table-cell table:number-columns-repeated="16"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mezczyzna</text:p>
          </table:table-cell>
          <table:table-cell office:value-type="float" office:value="7.3818181818181818" table:formula="of:=([.J11]*[.$N$10])/[.$N$11]" table:style-name="ce1">
            <text:p>7,381818182</text:p>
          </table:table-cell>
          <table:table-cell office:value-type="float" office:value="13.709090909090909" table:formula="of:=([.K11]*[.$N$10])/[.$N$11]" table:style-name="ce1">
            <text:p>13,70909091</text:p>
          </table:table-cell>
          <table:table-cell office:value-type="float" office:value="6.3272727272727272" table:formula="of:=([.L11]*[.$N$10])/[.$N$11]" table:style-name="ce1">
            <text:p>6,327272727</text:p>
          </table:table-cell>
          <table:table-cell office:value-type="float" office:value="1.5818181818181818" table:formula="of:=([.M11]*[.$N$10])/[.$N$11]" table:style-name="ce1">
            <text:p>1,581818182</text:p>
          </table:table-cell>
          <table:table-cell office:value-type="float" office:value="29" table:formula="of:=SUM([.J24:.M24])" table:style-name="ce43">
            <text:p>29</text:p>
          </table:table-cell>
          <table:table-cell table:style-name="ce1"/>
          <table:table-cell office:value-type="string" table:style-name="ce1">
            <text:p>liczebność teoretyczna</text:p>
          </table:table-cell>
          <table:table-cell table:number-columns-repeated="14" table:style-name="ce1"/>
          <table:table-cell office:value-type="string" table:style-name="ce1">
            <text:p>HL</text:p>
          </table:table-cell>
          <table:table-cell office:value-type="float" office:value="5.6" table:formula="of:=([.AF$11]*[.$AJ9])/[.$AJ$11]" table:style-name="ce1">
            <text:p>5,6</text:p>
          </table:table-cell>
          <table:table-cell office:value-type="float" office:value="10.4" table:formula="of:=([.AG$11]*[.$AJ9])/[.$AJ$11]" table:style-name="ce1">
            <text:p>10,4</text:p>
          </table:table-cell>
          <table:table-cell office:value-type="float" office:value="5.2" table:formula="of:=([.AH$11]*[.$AJ9])/[.$AJ$11]" table:style-name="ce1">
            <text:p>5,2</text:p>
          </table:table-cell>
          <table:table-cell office:value-type="float" office:value="0.8" table:formula="of:=([.AI$11]*[.$AJ9])/[.$AJ$11]" table:style-name="ce1">
            <text:p>0,8</text:p>
          </table:table-cell>
          <table:table-cell office:value-type="float" office:value="22" table:formula="of:=SUM([.AF24:.AI24])" table:style-name="ce43">
            <text:p>2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43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BGD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14" table:formula="of:=SUM([.J23:.J24])" table:style-name="ce43">
            <text:p>14</text:p>
          </table:table-cell>
          <table:table-cell office:value-type="float" office:value="26" table:formula="of:=SUM([.K23:.K24])" table:style-name="ce43">
            <text:p>26</text:p>
          </table:table-cell>
          <table:table-cell office:value-type="float" office:value="12" table:formula="of:=SUM([.L23:.L24])" table:style-name="ce43">
            <text:p>12</text:p>
          </table:table-cell>
          <table:table-cell office:value-type="float" office:value="3" table:formula="of:=SUM([.M23:.M24])" table:style-name="ce43">
            <text:p>3</text:p>
          </table:table-cell>
          <table:table-cell office:value-type="float" office:value="55" table:formula="of:=SUM([.N23:.N24])" table:style-name="ce43">
            <text:p>55</text:p>
          </table:table-cell>
          <table:table-cell table:style-name="ce1"/>
          <table:table-cell office:value-type="string" table:style-name="ce1">
            <text:p>w trakcie</text:p>
          </table:table-cell>
          <table:table-cell table:number-columns-repeated="7" table:style-name="ce1"/>
          <table:table-cell office:value-type="string" table:style-name="ce1">
            <text:p>liczebność teoretyczna</text:p>
          </table:table-cell>
          <table:table-cell table:number-columns-repeated="6" table:style-name="ce1"/>
          <table:table-cell office:value-type="string" table:style-name="ce1">
            <text:p>NHL</text:p>
          </table:table-cell>
          <table:table-cell office:value-type="float" office:value="8.4" table:formula="of:=([.AF$11]*[.$AJ10])/[.$AJ$11]" table:style-name="ce1">
            <text:p>8,4</text:p>
          </table:table-cell>
          <table:table-cell office:value-type="float" office:value="15.6" table:formula="of:=([.AG$11]*[.$AJ10])/[.$AJ$11]" table:style-name="ce1">
            <text:p>15,6</text:p>
          </table:table-cell>
          <table:table-cell office:value-type="float" office:value="7.8" table:formula="of:=([.AH$11]*[.$AJ10])/[.$AJ$11]" table:style-name="ce1">
            <text:p>7,8</text:p>
          </table:table-cell>
          <table:table-cell office:value-type="float" office:value="1.2" table:formula="of:=([.AI$11]*[.$AJ10])/[.$AJ$11]" table:style-name="ce1">
            <text:p>1,2</text:p>
          </table:table-cell>
          <table:table-cell office:value-type="float" office:value="33" table:formula="of:=SUM([.AF25:.AI25])" table:style-name="ce43">
            <text:p>3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9" table:style-name="ce1"/>
          <table:table-cell office:value-type="string" table:style-name="ce1">
            <text:p>WIEK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9" table:style-name="ce1"/>
          <table:table-cell office:value-type="string" table:style-name="ce1">
            <text:p>suma</text:p>
          </table:table-cell>
          <table:table-cell office:value-type="float" office:value="14" table:formula="of:=SUM([.AF24:.AF25])" table:style-name="ce43">
            <text:p>14</text:p>
          </table:table-cell>
          <table:table-cell office:value-type="float" office:value="26" table:formula="of:=SUM([.AG24:.AG25])" table:style-name="ce43">
            <text:p>26</text:p>
          </table:table-cell>
          <table:table-cell office:value-type="float" office:value="13" table:formula="of:=SUM([.AH24:.AH25])" table:style-name="ce43">
            <text:p>13</text:p>
          </table:table-cell>
          <table:table-cell office:value-type="float" office:value="2" table:formula="of:=SUM([.AI24:.AI25])" table:style-name="ce43">
            <text:p>2</text:p>
          </table:table-cell>
          <table:table-cell office:value-type="float" office:value="55" table:formula="of:=SUM([.AJ24:.AJ25])" table:style-name="ce43">
            <text:p>55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DAEPOCH</text:p>
          </table:table-cell>
          <table:table-cell table:number-columns-repeated="2" table:style-name="ce1"/>
          <table:table-cell office:value-type="string" table:style-name="ce1">
            <text:p>po leczeniu</text:p>
          </table:table-cell>
          <table:table-cell table:number-columns-repeated="6" table:style-name="ce1"/>
          <table:table-cell office:value-type="string" table:style-name="ce1">
            <text:p>15-30</text:p>
          </table:table-cell>
          <table:table-cell office:value-type="float" office:value="2.5454545454545454" table:formula="of:=([.Q13]*[.$U$9])/[.$U$13]" table:style-name="ce1">
            <text:p>2,545454545</text:p>
          </table:table-cell>
          <table:table-cell office:value-type="float" office:value="4.5454545454545459" table:formula="of:=([.R13]*[.$U$9])/[.$U$13]" table:style-name="ce1">
            <text:p>4,545454545</text:p>
          </table:table-cell>
          <table:table-cell office:value-type="float" office:value="2.1818181818181817" table:formula="of:=([.S13]*[.$U$9])/[.$U$13]" table:style-name="ce1">
            <text:p>2,181818182</text:p>
          </table:table-cell>
          <table:table-cell office:value-type="float" office:value="0.72727272727272729" table:formula="of:=([.T13]*[.$U$9])/[.$U$13]" table:style-name="ce1">
            <text:p>0,727272727</text:p>
          </table:table-cell>
          <table:table-cell office:value-type="float" office:value="10" table:formula="of:=SUM([.Q27:.T27])" table:style-name="ce1">
            <text:p>10</text:p>
          </table:table-cell>
          <table:table-cell table:number-columns-repeated="2" table:style-name="ce1"/>
          <table:table-cell office:value-type="string" table:style-name="ce1">
            <text:p>w trakcie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EP</text:p>
          </table:table-cell>
          <table:table-cell table:number-columns-repeated="2"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style-name="ce1"/>
          <table:table-cell office:value-type="string" table:style-name="ce44">
            <text:p>31-50</text:p>
          </table:table-cell>
          <table:table-cell office:value-type="float" office:value="4.581818181818182" table:formula="of:=([.Q13]*[.$U$10])/[.$U$13]" table:style-name="ce1">
            <text:p>4,581818182</text:p>
          </table:table-cell>
          <table:table-cell office:value-type="float" office:value="8.1818181818181817" table:formula="of:=([.R13]*[.$U$10])/[.$U$13]" table:style-name="ce1">
            <text:p>8,181818182</text:p>
          </table:table-cell>
          <table:table-cell office:value-type="float" office:value="3.9272727272727272" table:formula="of:=([.S13]*[.$U$10])/[.$U$13]" table:style-name="ce1">
            <text:p>3,927272727</text:p>
          </table:table-cell>
          <table:table-cell office:value-type="float" office:value="1.3090909090909091" table:formula="of:=([.T13]*[.$U$10])/[.$U$13]" table:style-name="ce1">
            <text:p>1,309090909</text:p>
          </table:table-cell>
          <table:table-cell office:value-type="float" office:value="18" table:formula="of:=SUM([.Q28:.T28])" table:style-name="ce1">
            <text:p>18</text:p>
          </table:table-cell>
          <table:table-cell table:number-columns-repeated="2" table:style-name="ce1"/>
          <table:table-cell office:value-type="string" table:style-name="ce1">
            <text:p>RCHOP</text:p>
          </table:table-cell>
          <table:table-cell office:value-type="float" office:value="5.7272727272727275" table:formula="of:=([.Y13]*[.AC8])/[.AC13]" table:style-name="ce1">
            <text:p>5,727272727</text:p>
          </table:table-cell>
          <table:table-cell office:value-type="float" office:value="8.5909090909090917" table:formula="of:=([.Z$13]*[.$AC8])/[.$AC$13]" table:style-name="ce1">
            <text:p>8,590909091</text:p>
          </table:table-cell>
          <table:table-cell office:value-type="float" office:value="4.4545454545454541" table:formula="of:=([.AA$13]*[.$AC8])/[.$AC$13]" table:style-name="ce1">
            <text:p>4,454545455</text:p>
          </table:table-cell>
          <table:table-cell office:value-type="float" office:value="2.2272727272727271" table:formula="of:=([.AB$13]*[.$AC8])/[.$AC$13]" table:style-name="ce1">
            <text:p>2,227272727</text:p>
          </table:table-cell>
          <table:table-cell office:value-type="float" office:value="21" table:formula="of:=SUM([.Y28:.AB28])" table:style-name="ce1">
            <text:p>21</text:p>
          </table:table-cell>
          <table:table-cell table:style-name="ce1"/>
          <table:table-cell office:value-type="string" table:style-name="ce1">
            <text:p>po leczeniu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kobieta</text:p>
          </table:table-cell>
          <table:table-cell office:value-type="float" office:value="5.7857142857142856" table:formula="of:=([.J17]*[.N$15])/[.$N$17]" table:style-name="ce1">
            <text:p>5,785714286</text:p>
          </table:table-cell>
          <table:table-cell office:value-type="float" office:value="15.428571428571429" table:formula="of:=([.K17]*[.$N$15])/[.$N$17]" table:style-name="ce1">
            <text:p>15,42857143</text:p>
          </table:table-cell>
          <table:table-cell office:value-type="float" office:value="0.9642857142857143" table:formula="of:=([.L17]*[.$N$15])/[.$N$17]" table:style-name="ce1">
            <text:p>0,964285714</text:p>
          </table:table-cell>
          <table:table-cell office:value-type="float" office:value="4.8214285714285712" table:formula="of:=([.M17]*[.$N$15])/[.$N$17]" table:style-name="ce1">
            <text:p>4,821428571</text:p>
          </table:table-cell>
          <table:table-cell office:value-type="float" office:value="27" table:formula="of:=SUM([.J29:.M29])" table:style-name="ce43">
            <text:p>27</text:p>
          </table:table-cell>
          <table:table-cell table:style-name="ce1"/>
          <table:table-cell office:value-type="string" table:style-name="ce1">
            <text:p>51-70</text:p>
          </table:table-cell>
          <table:table-cell office:value-type="float" office:value="4.581818181818182" table:formula="of:=([.$Q$13]*[.U11])/[.$U$13]" table:style-name="ce1">
            <text:p>4,581818182</text:p>
          </table:table-cell>
          <table:table-cell office:value-type="float" office:value="8.1818181818181817" table:formula="of:=([.R$13]*[.U11])/[.$U$13]" table:style-name="ce1">
            <text:p>8,181818182</text:p>
          </table:table-cell>
          <table:table-cell office:value-type="float" office:value="3.9272727272727272" table:formula="of:=([.$S13]*[.$U$11])/[.$U$13]" table:style-name="ce1">
            <text:p>3,927272727</text:p>
          </table:table-cell>
          <table:table-cell office:value-type="float" office:value="1.3090909090909091" table:formula="of:=([.$T13]*[.$U$11])/[.$U$13]" table:style-name="ce1">
            <text:p>1,309090909</text:p>
          </table:table-cell>
          <table:table-cell office:value-type="float" office:value="18" table:formula="of:=SUM([.Q29:.T29])" table:style-name="ce1">
            <text:p>18</text:p>
          </table:table-cell>
          <table:table-cell table:number-columns-repeated="2" table:style-name="ce1"/>
          <table:table-cell office:value-type="string" table:style-name="ce1">
            <text:p>abvd</text:p>
          </table:table-cell>
          <table:table-cell office:value-type="float" office:value="6.8181818181818183" table:formula="of:=([.$Y13]*[.$AC9])/[.$AC$13]" table:style-name="ce1">
            <text:p>6,818181818</text:p>
          </table:table-cell>
          <table:table-cell office:value-type="float" office:value="10.227272727272727" table:formula="of:=([.$Z13]*[.$AC9])/[.$AC$13]" table:style-name="ce1">
            <text:p>10,22727273</text:p>
          </table:table-cell>
          <table:table-cell office:value-type="float" office:value="5.3030303030303028" table:formula="of:=([.$AA13]*[.$AC9])/[.$AC$13]" table:style-name="ce1">
            <text:p>5,303030303</text:p>
          </table:table-cell>
          <table:table-cell office:value-type="float" office:value="2.6515151515151514" table:formula="of:=([.AB$13]*[.$AC9])/[.$AC$13]" table:style-name="ce1">
            <text:p>2,651515152</text:p>
          </table:table-cell>
          <table:table-cell office:value-type="float" office:value="25.000000000000004" table:formula="of:=SUM([.Y29:.AB29])" table:style-name="ce1">
            <text:p>25</text:p>
          </table:table-cell>
          <table:table-cell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P</text:p>
          </table:table-cell>
          <table:table-cell table:number-columns-repeated="2" table:style-name="ce1"/>
          <table:table-cell office:value-type="string" table:style-name="ce1">
            <text:p>mezczyzna</text:p>
          </table:table-cell>
          <table:table-cell office:value-type="float" office:value="6.2142857142857144" table:formula="of:=([.J17]*[.$N$16])/[.$N$17]" table:style-name="ce1">
            <text:p>6,214285714</text:p>
          </table:table-cell>
          <table:table-cell office:value-type="float" office:value="16.571428571428573" table:formula="of:=([.K17]*[.$N$16])/[.$N$17]" table:style-name="ce1">
            <text:p>16,57142857</text:p>
          </table:table-cell>
          <table:table-cell office:value-type="float" office:value="1.0357142857142858" table:formula="of:=([.L17]*[.$N$16])/[.$N$17]" table:style-name="ce1">
            <text:p>1,035714286</text:p>
          </table:table-cell>
          <table:table-cell office:value-type="float" office:value="5.1785714285714288" table:formula="of:=([.M17]*[.$N$16])/[.$N$17]" table:style-name="ce1">
            <text:p>5,178571429</text:p>
          </table:table-cell>
          <table:table-cell office:value-type="float" office:value="29" table:formula="of:=SUM([.J30:.M30])" table:style-name="ce43">
            <text:p>29</text:p>
          </table:table-cell>
          <table:table-cell table:style-name="ce1"/>
          <table:table-cell office:value-type="string" table:style-name="ce1">
            <text:p>71-100</text:p>
          </table:table-cell>
          <table:table-cell office:value-type="float" office:value="2.290909090909091" table:formula="of:=([.$Q$13]*[.U12])/[.$U$13]" table:style-name="ce1">
            <text:p>2,290909091</text:p>
          </table:table-cell>
          <table:table-cell office:value-type="float" office:value="4.0909090909090908" table:formula="of:=([.R$13]*[.U12])/[.$U$13]" table:style-name="ce1">
            <text:p>4,090909091</text:p>
          </table:table-cell>
          <table:table-cell office:value-type="float" office:value="1.9636363636363636" table:formula="of:=([.S$13]*[.U12])/[.$U$13]" table:style-name="ce1">
            <text:p>1,963636364</text:p>
          </table:table-cell>
          <table:table-cell office:value-type="float" office:value="0.65454545454545454" table:formula="of:=([.T$13]*[.U12])/[.$U$13]" table:style-name="ce1">
            <text:p>0,654545455</text:p>
          </table:table-cell>
          <table:table-cell office:value-type="float" office:value="9" table:formula="of:=SUM([.Q30:.T30])" table:style-name="ce1">
            <text:p>9</text:p>
          </table:table-cell>
          <table:table-cell table:number-columns-repeated="2" table:style-name="ce1"/>
          <table:table-cell office:value-type="string" table:style-name="ce1">
            <text:p>ifrt</text:p>
          </table:table-cell>
          <table:table-cell office:value-type="float" office:value="1.6363636363636365" table:formula="of:=([.Y$13]*[.$AC10])/[.$AC$13]" table:style-name="ce1">
            <text:p>1,636363636</text:p>
          </table:table-cell>
          <table:table-cell office:value-type="float" office:value="2.4545454545454546" table:formula="of:=([.Z$13]*[.$AC10])/[.$AC$13]" table:style-name="ce1">
            <text:p>2,454545455</text:p>
          </table:table-cell>
          <table:table-cell office:value-type="float" office:value="1.2727272727272727" table:formula="of:=([.AA$13]*[.$AC10])/[.$AC$13]" table:style-name="ce1">
            <text:p>1,272727273</text:p>
          </table:table-cell>
          <table:table-cell office:value-type="float" office:value="0.63636363636363635" table:formula="of:=([.AB$13]*[.$AC10])/[.$AC$13]" table:style-name="ce1">
            <text:p>0,636363636</text:p>
          </table:table-cell>
          <table:table-cell office:value-type="float" office:value="6" table:formula="of:=SUM([.Y30:.AB30])" table:style-name="ce1">
            <text:p>6</text:p>
          </table:table-cell>
          <table:table-cell table:style-name="ce1"/>
          <table:table-cell office:value-type="string" table:style-name="ce1">
            <text:p>nhl</text:p>
          </table:table-cell>
          <table:table-cell office:value-type="float" office:value="4.9285714285714288" table:formula="of:=([.AF$17]*[.$AJ15])/[.$AJ$17]" table:style-name="ce1">
            <text:p>4,928571429</text:p>
          </table:table-cell>
          <table:table-cell office:value-type="float" office:value="13.142857142857142" table:formula="of:=([.AG$17]*[.$AJ15])/[.$AJ$17]" table:style-name="ce1">
            <text:p>13,14285714</text:p>
          </table:table-cell>
          <table:table-cell office:value-type="float" office:value="0.8214285714285714" table:formula="of:=([.AH$17]*[.$AJ15])/[.$AJ$17]" table:style-name="ce1">
            <text:p>0,821428571</text:p>
          </table:table-cell>
          <table:table-cell office:value-type="float" office:value="4.1071428571428568" table:formula="of:=([.AI$17]*[.$AJ15])/[.$AJ$17]" table:style-name="ce1">
            <text:p>4,107142857</text:p>
          </table:table-cell>
          <table:table-cell office:value-type="float" office:value="23" table:formula="of:=SUM([.AF30:.AI30])" table:style-name="ce43">
            <text:p>2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VP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12" table:formula="of:=SUM([.J29:.J30])" table:style-name="ce43">
            <text:p>12</text:p>
          </table:table-cell>
          <table:table-cell office:value-type="float" office:value="32" table:formula="of:=SUM([.K29:.K30])" table:style-name="ce43">
            <text:p>32</text:p>
          </table:table-cell>
          <table:table-cell office:value-type="float" office:value="2" table:formula="of:=SUM([.L29:.L30])" table:style-name="ce43">
            <text:p>2</text:p>
          </table:table-cell>
          <table:table-cell office:value-type="float" office:value="10" table:formula="of:=SUM([.M29:.M30])" table:style-name="ce43">
            <text:p>10</text:p>
          </table:table-cell>
          <table:table-cell office:value-type="float" office:value="56" table:formula="of:=SUM([.N29:.N30])" table:style-name="ce43">
            <text:p>56</text:p>
          </table:table-cell>
          <table:table-cell table:style-name="ce1"/>
          <table:table-cell office:value-type="string" table:style-name="ce1">
            <text:p>suma</text:p>
          </table:table-cell>
          <table:table-cell office:value-type="float" office:value="14" table:formula="of:=SUM([.Q27:.Q30])" table:style-name="ce1">
            <text:p>14</text:p>
          </table:table-cell>
          <table:table-cell office:value-type="float" office:value="24.999999999999996" table:formula="of:=SUM([.R27:.R30])" table:style-name="ce1">
            <text:p>25</text:p>
          </table:table-cell>
          <table:table-cell office:value-type="float" office:value="12" table:formula="of:=SUM([.S27:.S30])" table:style-name="ce1">
            <text:p>12</text:p>
          </table:table-cell>
          <table:table-cell office:value-type="float" office:value="4" table:formula="of:=SUM([.T27:.T30])" table:style-name="ce1">
            <text:p>4</text:p>
          </table:table-cell>
          <table:table-cell office:value-type="float" office:value="55" table:formula="of:=SUM([.U27:.U30])" table:style-name="ce1">
            <text:p>55</text:p>
          </table:table-cell>
          <table:table-cell table:number-columns-repeated="2" table:style-name="ce1"/>
          <table:table-cell office:value-type="string" table:style-name="ce1">
            <text:p>BEACOPP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31:.AB31])" table:style-name="ce1">
            <text:p>#ADR!</text:p>
          </table:table-cell>
          <table:table-cell table:style-name="ce1"/>
          <table:table-cell office:value-type="string" table:style-name="ce1">
            <text:p>nHL</text:p>
          </table:table-cell>
          <table:table-cell office:value-type="float" office:value="7.0714285714285712" table:formula="of:=([.AF$17]*[.$AJ16])/[.$AJ$17]" table:style-name="ce1">
            <text:p>7,071428571</text:p>
          </table:table-cell>
          <table:table-cell office:value-type="float" office:value="18.857142857142858" table:formula="of:=([.AG$17]*[.$AJ16])/[.$AJ$17]" table:style-name="ce1">
            <text:p>18,85714286</text:p>
          </table:table-cell>
          <table:table-cell office:value-type="float" office:value="1.1785714285714286" table:formula="of:=([.AH$17]*[.$AJ16])/[.$AJ$17]" table:style-name="ce1">
            <text:p>1,178571429</text:p>
          </table:table-cell>
          <table:table-cell office:value-type="float" office:value="5.8928571428571432" table:formula="of:=([.AI$17]*[.$AJ16])/[.$AJ$17]" table:style-name="ce1">
            <text:p>5,892857143</text:p>
          </table:table-cell>
          <table:table-cell office:value-type="float" office:value="33" table:formula="of:=SUM([.AF31:.AI31])" table:style-name="ce43">
            <text:p>3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office:value-type="string" table:style-name="ce1">
            <text:p>IFRT</text:p>
          </table:table-cell>
          <table:table-cell table:number-columns-repeated="16" table:style-name="ce1"/>
          <table:table-cell office:value-type="string" table:style-name="ce1">
            <text:p>AVD</text:p>
          </table:table-cell>
          <table:table-cell office:value-type="float" office:value="1.6363636363636365" table:formula="of:=([.Y$13]*[.$AC11])/[.$AC$13]" table:style-name="ce1">
            <text:p>1,636363636</text:p>
          </table:table-cell>
          <table:table-cell office:value-type="float" office:value="2.4545454545454546" table:formula="of:=([.Z$13]*[.$AC11])/[.$AC$13]" table:style-name="ce1">
            <text:p>2,454545455</text:p>
          </table:table-cell>
          <table:table-cell office:value-type="float" office:value="1.2727272727272727" table:formula="of:=([.AA$13]*[.$AC11])/[.$AC$13]" table:style-name="ce1">
            <text:p>1,272727273</text:p>
          </table:table-cell>
          <table:table-cell office:value-type="float" office:value="0.63636363636363635" table:formula="of:=([.AB$13]*[.$AC11])/[.$AC$13]" table:style-name="ce1">
            <text:p>0,636363636</text:p>
          </table:table-cell>
          <table:table-cell office:value-type="float" office:value="6" table:formula="of:=SUM([.Y32:.AB32])" table:style-name="ce1">
            <text:p>6</text:p>
          </table:table-cell>
          <table:table-cell table:style-name="ce1"/>
          <table:table-cell office:value-type="string" table:style-name="ce1">
            <text:p>suma</text:p>
          </table:table-cell>
          <table:table-cell office:value-type="float" office:value="12" table:formula="of:=SUM([.AF30:.AF31])" table:style-name="ce43">
            <text:p>12</text:p>
          </table:table-cell>
          <table:table-cell office:value-type="float" office:value="32" table:formula="of:=SUM([.AG30:.AG31])" table:style-name="ce43">
            <text:p>32</text:p>
          </table:table-cell>
          <table:table-cell office:value-type="float" office:value="2" table:formula="of:=SUM([.AH30:.AH31])" table:style-name="ce43">
            <text:p>2</text:p>
          </table:table-cell>
          <table:table-cell office:value-type="float" office:value="10" table:formula="of:=SUM([.AI30:.AI31])" table:style-name="ce43">
            <text:p>10</text:p>
          </table:table-cell>
          <table:table-cell office:value-type="float" office:value="56" table:formula="of:=SUM([.AJ30:.AJ31])" table:style-name="ce43">
            <text:p>5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VP</text:p>
          </table:table-cell>
          <table:table-cell table:number-columns-repeated="9" table:style-name="ce1"/>
          <table:table-cell office:value-type="string" table:style-name="ce1">
            <text:p>po leczeniu</text:p>
          </table:table-cell>
          <table:table-cell table:number-columns-repeated="7" table:style-name="ce1"/>
          <table:table-cell office:value-type="string" table:style-name="ce1">
            <text:p>CVP</text:p>
          </table:table-cell>
          <table:table-cell office:value-type="float" office:value="2.1818181818181817" table:formula="of:=([.Y$13]*[.$AC12])/[.$AC$13]" table:style-name="ce1">
            <text:p>2,181818182</text:p>
          </table:table-cell>
          <table:table-cell office:value-type="float" office:value="3.2727272727272729" table:formula="of:=([.Z$13]*[.$AC12])/[.$AC$13]" table:style-name="ce1">
            <text:p>3,272727273</text:p>
          </table:table-cell>
          <table:table-cell office:value-type="float" office:value="1.696969696969697" table:formula="of:=([.AA$13]*[.$AC12])/[.$AC$13]" table:style-name="ce1">
            <text:p>1,696969697</text:p>
          </table:table-cell>
          <table:table-cell office:value-type="float" office:value="0.84848484848484851" table:formula="of:=([.AB$13]*[.$AC12])/[.$AC$13]" table:style-name="ce1">
            <text:p>0,848484848</text:p>
          </table:table-cell>
          <table:table-cell office:value-type="float" office:value="8" table:formula="of:=SUM([.Y33:.AB33])" table:style-name="ce1">
            <text:p>8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różnice</text:p>
          </table:table-cell>
          <table:table-cell table:number-columns-repeated="6" table:style-name="ce1"/>
          <table:table-cell office:value-type="string" table:style-name="ce1">
            <text:p>WIEK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2" table:style-name="ce1"/>
          <table:table-cell office:value-type="string" table:style-name="ce1">
            <text:p>OCVP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34:.AB34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43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w trakcie</text:p>
          </table:table-cell>
          <table:table-cell table:number-columns-repeated="6" table:style-name="ce1"/>
          <table:table-cell office:value-type="string" table:style-name="ce1">
            <text:p>15-30</text:p>
          </table:table-cell>
          <table:table-cell office:value-type="float" office:value="2.5535714285714284" table:formula="of:=([.Q$21]*[.$U$17])/[.$U$21]" table:style-name="ce1">
            <text:p>2,553571429</text:p>
          </table:table-cell>
          <table:table-cell office:value-type="float" office:value="6.0892857142857144" table:formula="of:=([.R$21]*[.$U$17])/[.$U$21]" table:style-name="ce1">
            <text:p>6,089285714</text:p>
          </table:table-cell>
          <table:table-cell office:value-type="float" office:value="0.7857142857142857" table:formula="of:=([.S$21]*[.$U$17])/[.$U$21]" table:style-name="ce1">
            <text:p>0,785714286</text:p>
          </table:table-cell>
          <table:table-cell office:value-type="float" office:value="1.5714285714285714" table:formula="of:=([.T$21]*[.$U$17])/[.$U$21]" table:style-name="ce1">
            <text:p>1,571428571</text:p>
          </table:table-cell>
          <table:table-cell office:value-type="float" office:value="11" table:formula="of:=SUM([.Q35:.T35])" table:style-name="ce1">
            <text:p>11</text:p>
          </table:table-cell>
          <table:table-cell table:number-columns-repeated="2" table:style-name="ce1"/>
          <table:table-cell office:value-type="string" table:style-name="ce1">
            <text:p>CHOEP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35:.AB35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VP</text:p>
          </table:table-cell>
          <table:table-cell table:number-columns-repeated="2"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style-name="ce1"/>
          <table:table-cell office:value-type="string" table:style-name="ce44">
            <text:p>31-50</text:p>
          </table:table-cell>
          <table:table-cell office:value-type="float" office:value="4.1785714285714288" table:formula="of:=([.Q$21]*[.$U$18])/[.$U$21]" table:style-name="ce1">
            <text:p>4,178571429</text:p>
          </table:table-cell>
          <table:table-cell office:value-type="float" office:value="9.9642857142857135" table:formula="of:=([.R$21]*[.U18])/[.$U$21]" table:style-name="ce1">
            <text:p>9,964285714</text:p>
          </table:table-cell>
          <table:table-cell office:value-type="float" office:value="1.2857142857142858" table:formula="of:=([.S$21]*[.U18])/[.$U$21]" table:style-name="ce1">
            <text:p>1,285714286</text:p>
          </table:table-cell>
          <table:table-cell office:value-type="float" office:value="2.5714285714285716" table:formula="of:=([.T$21]*[.U18])/[.$U$21]" table:style-name="ce1">
            <text:p>2,571428571</text:p>
          </table:table-cell>
          <table:table-cell office:value-type="float" office:value="18" table:formula="of:=SUM([.Q36:.T36])" table:style-name="ce1">
            <text:p>18</text:p>
          </table:table-cell>
          <table:table-cell table:number-columns-repeated="2" table:style-name="ce1"/>
          <table:table-cell office:value-type="string" table:style-name="ce1">
            <text:p>RHAD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36:.AB36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kobieta</text:p>
          </table:table-cell>
          <table:table-cell office:value-type="float" office:value="0.2885114885114885" table:formula="of:=(([.J9]-[.J23])^2)/[.J23]" table:style-name="ce1">
            <text:p>0,288511489</text:p>
          </table:table-cell>
          <table:table-cell office:value-type="float" office:value="1.4980096826250673" table:formula="of:=([.K9]-[.K23])^2/[.K23]" table:style-name="ce1">
            <text:p>1,498009683</text:p>
          </table:table-cell>
          <table:table-cell office:value-type="float" office:value="0.95477855477855467" table:formula="of:=([.L9]-[.L23])^2/[.L23]" table:style-name="ce1">
            <text:p>0,954778555</text:p>
          </table:table-cell>
          <table:table-cell office:value-type="float" office:value="0.23869463869463867" table:formula="of:=([.M9]-[.M23])^2/[.M23]" table:style-name="ce1">
            <text:p>0,238694639</text:p>
          </table:table-cell>
          <table:table-cell office:value-type="float" office:value="2.9799943646097491" table:formula="of:=SUM([.J37:.M37])" table:style-name="ce43">
            <text:p>2,979994365</text:p>
          </table:table-cell>
          <table:table-cell table:style-name="ce1"/>
          <table:table-cell office:value-type="string" table:style-name="ce1">
            <text:p>51-70</text:p>
          </table:table-cell>
          <table:table-cell office:value-type="float" office:value="4.1785714285714288" table:formula="of:=([.Q$21]*[.$U$19])/[.$U$21]" table:style-name="ce1">
            <text:p>4,178571429</text:p>
          </table:table-cell>
          <table:table-cell office:value-type="float" office:value="9.9642857142857135" table:formula="of:=([.R$21]*[.$U19])/[.$U$21]" table:style-name="ce1">
            <text:p>9,964285714</text:p>
          </table:table-cell>
          <table:table-cell office:value-type="float" office:value="1.2857142857142858" table:formula="of:=([.S$21]*[.$U19])/[.$U$21]" table:style-name="ce1">
            <text:p>1,285714286</text:p>
          </table:table-cell>
          <table:table-cell office:value-type="float" office:value="2.5714285714285716" table:formula="of:=([.T$21]*[.$U19])/[.$U$21]" table:style-name="ce1">
            <text:p>2,571428571</text:p>
          </table:table-cell>
          <table:table-cell office:value-type="float" office:value="18" table:formula="of:=SUM([.Q37:.T37])" table:style-name="ce1">
            <text:p>18</text:p>
          </table:table-cell>
          <table:table-cell table:number-columns-repeated="2" table:style-name="ce1"/>
          <table:table-cell office:value-type="string" table:style-name="ce1">
            <text:p>BGD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37:.AB37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P</text:p>
          </table:table-cell>
          <table:table-cell table:number-columns-repeated="2" table:style-name="ce1"/>
          <table:table-cell office:value-type="string" table:style-name="ce1">
            <text:p>mezczyzna</text:p>
          </table:table-cell>
          <table:table-cell office:value-type="float" office:value="0.25866547245857591" table:formula="of:=([.J10]-[.J24])^2/[.J24]" table:style-name="ce1">
            <text:p>0,258665472</text:p>
          </table:table-cell>
          <table:table-cell office:value-type="float" office:value="1.3430431637328188" table:formula="of:=([.K10]-[.K24])^2/[.K24]" table:style-name="ce1">
            <text:p>1,343043164</text:p>
          </table:table-cell>
          <table:table-cell office:value-type="float" office:value="0.85600835945663523" table:formula="of:=([.L10]-[.L24])^2/[.L24]" table:style-name="ce1">
            <text:p>0,856008359</text:p>
          </table:table-cell>
          <table:table-cell office:value-type="float" office:value="0.21400208986415881" table:formula="of:=([.M10]-[.M24])^2/[.M24]" table:style-name="ce1">
            <text:p>0,21400209</text:p>
          </table:table-cell>
          <table:table-cell office:value-type="float" office:value="2.6717190855121888" table:formula="of:=SUM([.J38:.M38])" table:style-name="ce43">
            <text:p>2,671719086</text:p>
          </table:table-cell>
          <table:table-cell table:style-name="ce1"/>
          <table:table-cell office:value-type="string" table:style-name="ce1">
            <text:p>71-100</text:p>
          </table:table-cell>
          <table:table-cell office:value-type="float" office:value="2.0892857142857144" table:formula="of:=([.Q$21]*[.$U$20])/[.$U$21]" table:style-name="ce1">
            <text:p>2,089285714</text:p>
          </table:table-cell>
          <table:table-cell office:value-type="float" office:value="4.9821428571428568" table:formula="of:=([.R$21]*[.U20])/[.$U$21]" table:style-name="ce1">
            <text:p>4,982142857</text:p>
          </table:table-cell>
          <table:table-cell office:value-type="float" office:value="0.6428571428571429" table:formula="of:=([.S$21]*[.U20])/[.$U$21]" table:style-name="ce1">
            <text:p>0,642857143</text:p>
          </table:table-cell>
          <table:table-cell office:value-type="float" office:value="1.2857142857142858" table:formula="of:=([.T$21]*[.U20])/[.$U$21]" table:style-name="ce1">
            <text:p>1,285714286</text:p>
          </table:table-cell>
          <table:table-cell office:value-type="float" office:value="9" table:formula="of:=SUM([.Q38:.T38])" table:style-name="ce1">
            <text:p>9</text:p>
          </table:table-cell>
          <table:table-cell table:number-columns-repeated="2" table:style-name="ce1"/>
          <table:table-cell office:value-type="string" table:style-name="ce1">
            <text:p>CHOP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38:.AB38])" table:style-name="ce1">
            <text:p>#ADR!</text:p>
          </table:table-cell>
          <table:table-cell table:style-name="ce1"/>
          <table:table-cell office:value-type="string" table:style-name="ce1">
            <text:p>w trakci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0.54717696097006441" table:formula="of:=SUM([.J37:.J38])" table:style-name="ce43">
            <text:p>0,547176961</text:p>
          </table:table-cell>
          <table:table-cell office:value-type="float" office:value="2.8410528463578864" table:formula="of:=SUM([.K37:.K38])" table:style-name="ce43">
            <text:p>2,841052846</text:p>
          </table:table-cell>
          <table:table-cell office:value-type="float" office:value="1.81078691423519" table:formula="of:=SUM([.L37:.L38])" table:style-name="ce43">
            <text:p>1,810786914</text:p>
          </table:table-cell>
          <table:table-cell office:value-type="float" office:value="0.4526967285587975" table:formula="of:=SUM([.M37:.M38])" table:style-name="ce43">
            <text:p>0,452696729</text:p>
          </table:table-cell>
          <table:table-cell office:value-type="float" office:value="5.6517134501219379" table:formula="of:=SUM([.N37:.N38])" table:style-name="ce43">
            <text:p>5,65171345</text:p>
          </table:table-cell>
          <table:table-cell table:style-name="ce1"/>
          <table:table-cell office:value-type="string" table:style-name="ce1">
            <text:p>suma</text:p>
          </table:table-cell>
          <table:table-cell office:value-type="float" office:value="13" table:formula="of:=SUM([.Q35:.Q38])" table:style-name="ce1">
            <text:p>13</text:p>
          </table:table-cell>
          <table:table-cell office:value-type="float" office:value="30.999999999999996" table:formula="of:=SUM([.R35:.R38])" table:style-name="ce1">
            <text:p>31</text:p>
          </table:table-cell>
          <table:table-cell office:value-type="float" office:value="4.0000000000000009" table:formula="of:=SUM([.S35:.S38])" table:style-name="ce1">
            <text:p>4</text:p>
          </table:table-cell>
          <table:table-cell office:value-type="float" office:value="8.0000000000000018" table:formula="of:=SUM([.T35:.T38])" table:style-name="ce1">
            <text:p>8</text:p>
          </table:table-cell>
          <table:table-cell office:value-type="float" office:value="56" table:formula="of:=SUM([.Q39:.T39])" table:style-name="ce1">
            <text:p>56</text:p>
          </table:table-cell>
          <table:table-cell table:number-columns-repeated="2" table:style-name="ce1"/>
          <table:table-cell office:value-type="string" table:style-name="ce1">
            <text:p>RDAPOCH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39:.AB39])" table:style-name="ce1">
            <text:p>#ADR!</text:p>
          </table:table-cell>
          <table:table-cell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6" table:style-name="ce1"/>
          <table:table-cell office:value-type="string" table:style-name="ce1">
            <text:p>p value</text:p>
          </table:table-cell>
          <table:table-cell office:value-type="float" office:value="0.12984100000000001" table:style-name="ce1">
            <text:p>0,129841</text:p>
          </table:table-cell>
          <table:table-cell table:number-columns-repeated="9" table:style-name="ce1"/>
          <table:table-cell office:value-type="string" table:style-name="ce1">
            <text:p>RCVP</text:p>
          </table:table-cell>
          <table:table-cell office:value-type="error" office:string-value="#REF!" table:formula="of:=([.Y$13]*[.#REF!])/[.$AC$13]" table:style-name="ce1">
            <text:p>#ADR!</text:p>
          </table:table-cell>
          <table:table-cell office:value-type="error" office:string-value="#REF!" table:formula="of:=([.Z$13]*[.#REF!])/[.$AC$13]" table:style-name="ce1">
            <text:p>#ADR!</text:p>
          </table:table-cell>
          <table:table-cell office:value-type="error" office:string-value="#REF!" table:formula="of:=([.AA$13]*[.#REF!])/[.$AC$13]" table:style-name="ce1">
            <text:p>#ADR!</text:p>
          </table:table-cell>
          <table:table-cell office:value-type="error" office:string-value="#REF!" table:formula="of:=([.AB$13]*[.#REF!])/[.$AC$13]" table:style-name="ce1">
            <text:p>#ADR!</text:p>
          </table:table-cell>
          <table:table-cell office:value-type="error" office:string-value="#REF!" table:formula="of:=SUM([.Y40:.AB40])" table:style-name="ce1">
            <text:p>#ADR!</text:p>
          </table:table-cell>
          <table:table-cell table:style-name="ce1"/>
          <table:table-cell office:value-type="string" table:style-name="ce1">
            <text:p>HL</text:p>
          </table:table-cell>
          <table:table-cell office:value-type="float" office:value="6.4285714285714224E-2" table:formula="of:=([.AF9]-[.AF24])^2/[.AF24]" table:style-name="ce1">
            <text:p>0,064285714</text:p>
          </table:table-cell>
          <table:table-cell office:value-type="float" office:value="0.18846153846153857" table:formula="of:=([.AG9]-[.AG24])^2/[.AG24]" table:style-name="ce1">
            <text:p>0,188461538</text:p>
          </table:table-cell>
          <table:table-cell office:value-type="float" office:value="0.62307692307692297" table:formula="of:=([.AH9]-[.AH24])^2/[.AH24]" table:style-name="ce1">
            <text:p>0,623076923</text:p>
          </table:table-cell>
          <table:table-cell office:value-type="float" office:value="4.9999999999999975E-2" table:formula="of:=([.AI9]-[.AI24])^2/[.AI24]" table:style-name="ce1">
            <text:p>0,05</text:p>
          </table:table-cell>
          <table:table-cell office:value-type="float" office:value="0.92582417582417575" table:formula="of:=SUM([.AF40:.AI40])" table:style-name="ce43">
            <text:p>0,9258241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po leczeniu</text:p>
          </table:table-cell>
          <table:table-cell table:number-columns-repeated="14" table:style-name="ce1"/>
          <table:table-cell office:value-type="string" table:style-name="ce1">
            <text:p>suma</text:p>
          </table:table-cell>
          <table:table-cell office:value-type="error" office:string-value="#REF!" table:formula="of:=SUM([.Y28:.Y40])" table:style-name="ce1">
            <text:p>#ADR!</text:p>
          </table:table-cell>
          <table:table-cell office:value-type="error" office:string-value="#REF!" table:formula="of:=SUM([.Z28:.Z40])" table:style-name="ce1">
            <text:p>#ADR!</text:p>
          </table:table-cell>
          <table:table-cell office:value-type="error" office:string-value="#REF!" table:formula="of:=SUM([.AA28:.AA40])" table:style-name="ce1">
            <text:p>#ADR!</text:p>
          </table:table-cell>
          <table:table-cell office:value-type="error" office:string-value="#REF!" table:formula="of:=SUM([.AB28:.AB40])" table:style-name="ce1">
            <text:p>#ADR!</text:p>
          </table:table-cell>
          <table:table-cell office:value-type="error" office:string-value="#REF!" table:formula="of:=SUM([.AC28:.AC40])" table:style-name="ce1">
            <text:p>#ADR!</text:p>
          </table:table-cell>
          <table:table-cell table:style-name="ce1"/>
          <table:table-cell office:value-type="string" table:style-name="ce1">
            <text:p>NHL</text:p>
          </table:table-cell>
          <table:table-cell office:value-type="float" office:value="4.2857142857142809E-2" table:formula="of:=([.AF10]-[.AF25])^2/[.AF25]" table:style-name="ce1">
            <text:p>0,042857143</text:p>
          </table:table-cell>
          <table:table-cell office:value-type="float" office:value="0.12564102564102572" table:formula="of:=([.AG10]-[.AG25])^2/[.AG25]" table:style-name="ce1">
            <text:p>0,125641026</text:p>
          </table:table-cell>
          <table:table-cell office:value-type="float" office:value="0.4153846153846153" table:formula="of:=([.AH10]-[.AH25])^2/[.AH25]" table:style-name="ce1">
            <text:p>0,415384615</text:p>
          </table:table-cell>
          <table:table-cell office:value-type="float" office:value="3.3333333333333319E-2" table:formula="of:=([.AI10]-[.AI25])^2/[.AI25]" table:style-name="ce1">
            <text:p>0,033333333</text:p>
          </table:table-cell>
          <table:table-cell office:value-type="float" office:value="0.61721611721611713" table:formula="of:=SUM([.AF41:.AI41])" table:style-name="ce43">
            <text:p>0,617216117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46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office:value-type="string" table:style-name="ce1">
            <text:p>AVD</text:p>
          </table:table-cell>
          <table:table-cell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style-name="ce1"/>
          <table:table-cell office:value-type="string" table:style-name="ce1">
            <text:p>różnice</text:p>
          </table:table-cell>
          <table:table-cell table:number-columns-repeated="14" table:style-name="ce1"/>
          <table:table-cell office:value-type="string" table:style-name="ce1">
            <text:p>suma</text:p>
          </table:table-cell>
          <table:table-cell office:value-type="float" office:value="0.10714285714285704" table:formula="of:=SUM([.AF40:.AF41])" table:style-name="ce43">
            <text:p>0,107142857</text:p>
          </table:table-cell>
          <table:table-cell office:value-type="float" office:value="0.31410256410256432" table:formula="of:=SUM([.AG40:.AG41])" table:style-name="ce43">
            <text:p>0,314102564</text:p>
          </table:table-cell>
          <table:table-cell office:value-type="float" office:value="1.0384615384615383" table:formula="of:=SUM([.AH40:.AH41])" table:style-name="ce43">
            <text:p>1,038461538</text:p>
          </table:table-cell>
          <table:table-cell office:value-type="float" office:value="8.3333333333333287E-2" table:formula="of:=SUM([.AI40:.AI41])" table:style-name="ce43">
            <text:p>0,083333333</text:p>
          </table:table-cell>
          <table:table-cell office:value-type="float" office:value="1.5430402930402929" table:formula="of:=SUM([.AJ40:.AJ41])" table:style-name="ce43">
            <text:p>1,54304029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kobieta</text:p>
          </table:table-cell>
          <table:table-cell office:value-type="float" office:value="0.25485008818342159" table:formula="of:=([.J15]-[.J29])^2/[.J29]" table:style-name="ce1">
            <text:p>0,254850088</text:p>
          </table:table-cell>
          <table:table-cell office:value-type="float" office:value="0.42857142857142849" table:formula="of:=([.K15]-[.K29])^2/[.K29]" table:style-name="ce1">
            <text:p>0,428571429</text:p>
          </table:table-cell>
          <table:table-cell office:value-type="float" office:value="1.3227513227513216E-3" table:formula="of:=([.L15]-[.L29])^2/[.L29]" table:style-name="ce1">
            <text:p>0,001322751</text:p>
          </table:table-cell>
          <table:table-cell office:value-type="float" office:value="3.0288359788359784" table:formula="of:=([.M15]-[.M29])^2/[.M29]" table:style-name="ce1">
            <text:p>3,028835979</text:p>
          </table:table-cell>
          <table:table-cell office:value-type="float" office:value="3.7135802469135797" table:formula="of:=SUM([.J43:.M43])" table:style-name="ce43">
            <text:p>3,713580247</text:p>
          </table:table-cell>
          <table:table-cell table:style-name="ce1"/>
          <table:table-cell office:value-type="string" table:style-name="ce1">
            <text:p>w trakcie</text:p>
          </table:table-cell>
          <table:table-cell table:number-columns-repeated="18" table:style-name="ce1"/>
          <table:table-cell office:value-type="string" table:style-name="ce1">
            <text:p>P VALUE</text:p>
          </table:table-cell>
          <table:table-cell office:value-type="string" table:style-name="ce1">
            <text:p>0.67237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BEACOPP</text:p>
          </table:table-cell>
          <table:table-cell table:number-columns-repeated="2" table:style-name="ce1"/>
          <table:table-cell office:value-type="string" table:style-name="ce1">
            <text:p>mezczyzna</text:p>
          </table:table-cell>
          <table:table-cell office:value-type="float" office:value="0.23727422003284077" table:formula="of:=([.J16]-[.J30])^2/[.J30]" table:style-name="ce1">
            <text:p>0,23727422</text:p>
          </table:table-cell>
          <table:table-cell office:value-type="float" office:value="0.39901477832512361" table:formula="of:=([.K16]-[.K30])^2/[.K30]" table:style-name="ce1">
            <text:p>0,399014778</text:p>
          </table:table-cell>
          <table:table-cell office:value-type="float" office:value="1.2315270935960656E-3" table:formula="of:=([.L16]-[.L30])^2/[.L30]" table:style-name="ce1">
            <text:p>0,001231527</text:p>
          </table:table-cell>
          <table:table-cell office:value-type="float" office:value="2.8199507389162557" table:formula="of:=([.M16]-[.M30])^2/[.M30]" table:style-name="ce1">
            <text:p>2,819950739</text:p>
          </table:table-cell>
          <table:table-cell office:value-type="float" office:value="3.457471264367816" table:formula="of:=SUM([.J44:.M44])" table:style-name="ce43">
            <text:p>3,457471264</text:p>
          </table:table-cell>
          <table:table-cell table:style-name="ce1"/>
          <table:table-cell office:value-type="string" table:style-name="ce1">
            <text:p>WIEK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2" table:style-name="ce1"/>
          <table:table-cell office:value-type="string" table:style-name="ce1">
            <text:p>po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</text:p>
          </table:table-cell>
          <table:table-cell table:number-columns-repeated="2" table:style-name="ce1"/>
          <table:table-cell office:value-type="string" table:style-name="ce1">
            <text:p>po leczeniu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CHOP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0.49212430821626235" table:formula="of:=SUM([.J43:.J44])" table:style-name="ce43">
            <text:p>0,492124308</text:p>
          </table:table-cell>
          <table:table-cell office:value-type="float" office:value="0.82758620689655205" table:formula="of:=SUM([.K43:.K44])" table:style-name="ce43">
            <text:p>0,827586207</text:p>
          </table:table-cell>
          <table:table-cell office:value-type="float" office:value="2.5542784163473872E-3" table:formula="of:=SUM([.L43:.L44])" table:style-name="ce43">
            <text:p>0,002554278</text:p>
          </table:table-cell>
          <table:table-cell office:value-type="float" office:value="5.8487867177522341" table:formula="of:=SUM([.M43:.M44])" table:style-name="ce43">
            <text:p>5,848786718</text:p>
          </table:table-cell>
          <table:table-cell office:value-type="float" office:value="7.1710515112813962" table:formula="of:=SUM([.N43:.N44])" table:style-name="ce43">
            <text:p>7,171051511</text:p>
          </table:table-cell>
          <table:table-cell table:style-name="ce1"/>
          <table:table-cell office:value-type="string" table:style-name="ce1">
            <text:p>15-30</text:p>
          </table:table-cell>
          <table:table-cell office:value-type="float" office:value="0.11688311688311687" table:formula="of:=([.Q9]-[.Q27])^2/[.Q27]" table:style-name="ce1">
            <text:p>0,116883117</text:p>
          </table:table-cell>
          <table:table-cell office:value-type="float" office:value="0.52545454545454562" table:formula="of:=([.R9]-[.R27])^2/[.R27]" table:style-name="ce1">
            <text:p>0,525454545</text:p>
          </table:table-cell>
          <table:table-cell office:value-type="float" office:value="1.5151515151515156" table:formula="of:=([.S9]-[.S27])^2/[.S27]" table:style-name="ce1">
            <text:p>1,515151515</text:p>
          </table:table-cell>
          <table:table-cell office:value-type="float" office:value="0.10227272727272725" table:formula="of:=([.T9]-[.T27])^2/[.T27]" table:style-name="ce1">
            <text:p>0,102272727</text:p>
          </table:table-cell>
          <table:table-cell office:value-type="float" office:value="2.2597619047619051" table:formula="of:=SUM([.Q45:.T45])" table:style-name="ce1">
            <text:p>2,259761905</text:p>
          </table:table-cell>
          <table:table-cell table:number-columns-repeated="2" table:style-name="ce1"/>
          <table:table-cell office:value-type="string" table:style-name="ce1">
            <text:p>RCHOP</text:p>
          </table:table-cell>
          <table:table-cell office:value-type="float" office:value="5.0909090909090908" table:formula="of:=([.Y22]*[.AC17])/[.AC22]" table:style-name="ce1">
            <text:p>5,090909091</text:p>
          </table:table-cell>
          <table:table-cell office:value-type="float" office:value="10.5" table:formula="of:=([.Z$22]*[.$AC17])/[.$AC$22]" table:style-name="ce1">
            <text:p>10,5</text:p>
          </table:table-cell>
          <table:table-cell office:value-type="float" office:value="1.9090909090909092" table:formula="of:=([.AA$22]*[.$AC17])/[.$AC$22]" table:style-name="ce1">
            <text:p>1,909090909</text:p>
          </table:table-cell>
          <table:table-cell office:value-type="float" office:value="3.5" table:formula="of:=([.AB$22]*[.$AC17])/[.$AC$22]" table:style-name="ce1">
            <text:p>3,5</text:p>
          </table:table-cell>
          <table:table-cell office:value-type="float" office:value="21" table:formula="of:=SUM([.Y45:.AB45])" table:style-name="ce1">
            <text:p>21</text:p>
          </table:table-cell>
          <table:table-cell table:style-name="ce1"/>
          <table:table-cell office:value-type="string" table:style-name="ce1">
            <text:p>PLEC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OCVP</text:p>
          </table:table-cell>
          <table:table-cell table:number-columns-repeated="6" table:style-name="ce1"/>
          <table:table-cell office:value-type="string" table:style-name="ce1">
            <text:p>p value</text:p>
          </table:table-cell>
          <table:table-cell office:value-type="string" table:style-name="ce1">
            <text:p>0.066641</text:p>
          </table:table-cell>
          <table:table-cell table:style-name="ce1"/>
          <table:table-cell office:value-type="string" table:style-name="ce44">
            <text:p>31-50</text:p>
          </table:table-cell>
          <table:table-cell office:value-type="float" office:value="7.3881673881673937E-2" table:formula="of:=([.Q10]-[.Q28])^2/[.Q28]" table:style-name="ce1">
            <text:p>0,073881674</text:p>
          </table:table-cell>
          <table:table-cell office:value-type="float" office:value="8.1818181818181845E-2" table:formula="of:=([.R10]-[.R28])^2/[.R28]" table:style-name="ce1">
            <text:p>0,081818182</text:p>
          </table:table-cell>
          <table:table-cell office:value-type="float" office:value="1.3468013468013477E-3" table:formula="of:=([.S10]-[.S28])^2/[.S28]" table:style-name="ce1">
            <text:p>0,001346801</text:p>
          </table:table-cell>
          <table:table-cell office:value-type="float" office:value="7.2979797979797978E-2" table:formula="of:=([.T10]-[.T28])^2/[.T28]" table:style-name="ce1">
            <text:p>0,072979798</text:p>
          </table:table-cell>
          <table:table-cell office:value-type="float" office:value="0.23002645502645511" table:formula="of:=SUM([.Q46:.T46])" table:style-name="ce1">
            <text:p>0,230026455</text:p>
          </table:table-cell>
          <table:table-cell table:number-columns-repeated="2" table:style-name="ce1"/>
          <table:table-cell office:value-type="string" table:style-name="ce1">
            <text:p>abvd</text:p>
          </table:table-cell>
          <table:table-cell office:value-type="float" office:value="6.0606060606060606" table:formula="of:=([.Y$22]*[.$AC18])/[.$AC$22]" table:style-name="ce1">
            <text:p>6,060606061</text:p>
          </table:table-cell>
          <table:table-cell office:value-type="float" office:value="12.5" table:formula="of:=([.Z$22]*[.$AC18])/[.$AC$22]" table:style-name="ce1">
            <text:p>12,5</text:p>
          </table:table-cell>
          <table:table-cell office:value-type="float" office:value="2.2727272727272729" table:formula="of:=([.AA$22]*[.$AC18])/[.$AC$22]" table:style-name="ce1">
            <text:p>2,272727273</text:p>
          </table:table-cell>
          <table:table-cell office:value-type="float" office:value="4.166666666666667" table:formula="of:=([.AB$22]*[.$AC18])/[.$AC$22]" table:style-name="ce1">
            <text:p>4,166666667</text:p>
          </table:table-cell>
          <table:table-cell office:value-type="float" office:value="25.000000000000004" table:formula="of:=SUM([.Y46:.AB46])" table:style-name="ce1">
            <text:p>25</text:p>
          </table:table-cell>
          <table:table-cell table:style-name="ce1"/>
          <table:table-cell office:value-type="string" table:style-name="ce1">
            <text:p>nhl</text:p>
          </table:table-cell>
          <table:table-cell office:value-type="float" office:value="1.0351966873705931E-3" table:formula="of:=([.AF15]-[.AF30])^2/[.AF30]" table:style-name="ce1">
            <text:p>0,001035197</text:p>
          </table:table-cell>
          <table:table-cell office:value-type="float" office:value="9.937888198757755E-2" table:formula="of:=([.AG15]-[.AG30])^2/[.AG30]" table:style-name="ce1">
            <text:p>0,099378882</text:p>
          </table:table-cell>
          <table:table-cell office:value-type="float" office:value="3.8819875776397533E-2" table:formula="of:=([.AH15]-[.AH30])^2/[.AH30]" table:style-name="ce1">
            <text:p>0,038819876</text:p>
          </table:table-cell>
          <table:table-cell office:value-type="float" office:value="0.19409937888198778" table:formula="of:=([.AI15]-[.AI30])^2/[.AI30]" table:style-name="ce1">
            <text:p>0,194099379</text:p>
          </table:table-cell>
          <table:table-cell office:value-type="float" office:value="0.33333333333333348" table:formula="of:=SUM([.AF46:.AI46])" table:style-name="ce43">
            <text:p>0,33333333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office:value-type="string" table:style-name="ce1">
            <text:p>BEACOPP</text:p>
          </table:table-cell>
          <table:table-cell table:number-columns-repeated="8" table:style-name="ce1"/>
          <table:table-cell office:value-type="string" table:style-name="ce1">
            <text:p>51-70</text:p>
          </table:table-cell>
          <table:table-cell office:value-type="float" office:value="0.43896103896103877" table:formula="of:=([.Q11]-[.Q29])^2/[.Q29]" table:style-name="ce1">
            <text:p>0,438961039</text:p>
          </table:table-cell>
          <table:table-cell office:value-type="float" office:value="4.0404040404040326E-3" table:formula="of:=([.R11]-[.R29])^2/[.R29]" table:style-name="ce1">
            <text:p>0,004040404</text:p>
          </table:table-cell>
          <table:table-cell office:value-type="float" office:value="0.21893939393939393" table:formula="of:=([.S11]-[.S29])^2/[.S29]" table:style-name="ce1">
            <text:p>0,218939394</text:p>
          </table:table-cell>
          <table:table-cell office:value-type="float" office:value="7.2979797979797978E-2" table:formula="of:=([.T11]-[.T29])^2/[.T29]" table:style-name="ce1">
            <text:p>0,072979798</text:p>
          </table:table-cell>
          <table:table-cell office:value-type="float" office:value="0.73492063492063475" table:formula="of:=SUM([.Q47:.T47])" table:style-name="ce1">
            <text:p>0,734920635</text:p>
          </table:table-cell>
          <table:table-cell table:number-columns-repeated="2" table:style-name="ce1"/>
          <table:table-cell office:value-type="string" table:style-name="ce1">
            <text:p>ifrt</text:p>
          </table:table-cell>
          <table:table-cell office:value-type="float" office:value="1.696969696969697" table:formula="of:=([.Y$22]*[.$AC19])/[.$AC$22]" table:style-name="ce1">
            <text:p>1,696969697</text:p>
          </table:table-cell>
          <table:table-cell office:value-type="float" office:value="3.5" table:formula="of:=([.Z$22]*[.$AC19])/[.$AC$22]" table:style-name="ce1">
            <text:p>3,5</text:p>
          </table:table-cell>
          <table:table-cell office:value-type="float" office:value="0.63636363636363635" table:formula="of:=([.AA$22]*[.$AC19])/[.$AC$22]" table:style-name="ce1">
            <text:p>0,636363636</text:p>
          </table:table-cell>
          <table:table-cell office:value-type="float" office:value="1.1666666666666667" table:formula="of:=([.AB$22]*[.$AC19])/[.$AC$22]" table:style-name="ce1">
            <text:p>1,166666667</text:p>
          </table:table-cell>
          <table:table-cell office:value-type="float" office:value="7.0000000000000009" table:formula="of:=SUM([.Y47:.AB47])" table:style-name="ce1">
            <text:p>7</text:p>
          </table:table-cell>
          <table:table-cell table:style-name="ce1"/>
          <table:table-cell office:value-type="string" table:style-name="ce1">
            <text:p>nHL</text:p>
          </table:table-cell>
          <table:table-cell office:value-type="float" office:value="7.215007215007164E-4" table:formula="of:=([.AF16]-[.AF31])^2/[.AF31]" table:style-name="ce1">
            <text:p>0,000721501</text:p>
          </table:table-cell>
          <table:table-cell office:value-type="float" office:value="6.9264069264069195E-2" table:formula="of:=([.AG16]-[.AG31])^2/[.AG31]" table:style-name="ce1">
            <text:p>0,069264069</text:p>
          </table:table-cell>
          <table:table-cell office:value-type="float" office:value="2.7056277056277066E-2" table:formula="of:=([.AH16]-[.AH31])^2/[.AH31]" table:style-name="ce1">
            <text:p>0,027056277</text:p>
          </table:table-cell>
          <table:table-cell office:value-type="float" office:value="0.13528138528138539" table:formula="of:=([.AI16]-[.AI31])^2/[.AI31]" table:style-name="ce1">
            <text:p>0,135281385</text:p>
          </table:table-cell>
          <table:table-cell office:value-type="float" office:value="0.23232323232323238" table:formula="of:=SUM([.AF47:.AI47])" table:style-name="ce43">
            <text:p>0,232323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43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P</text:p>
          </table:table-cell>
          <table:table-cell table:number-columns-repeated="9" table:style-name="ce1"/>
          <table:table-cell office:value-type="string" table:style-name="ce1">
            <text:p>71-100</text:p>
          </table:table-cell>
          <table:table-cell office:value-type="float" office:value="3.6940836940836969E-2" table:formula="of:=([.Q12]-[.Q30])^2/[.Q30]" table:style-name="ce1">
            <text:p>0,036940837</text:p>
          </table:table-cell>
          <table:table-cell office:value-type="float" office:value="0.20202020202020204" table:formula="of:=([.R12]-[.R30])^2/[.R30]" table:style-name="ce1">
            <text:p>0,202020202</text:p>
          </table:table-cell>
          <table:table-cell office:value-type="float" office:value="0.47289562289562292" table:formula="of:=([.S12]-[.S30])^2/[.S30]" table:style-name="ce1">
            <text:p>0,472895623</text:p>
          </table:table-cell>
          <table:table-cell office:value-type="float" office:value="0.18232323232323233" table:formula="of:=([.T12]-[.T30])^2/[.T30]" table:style-name="ce1">
            <text:p>0,182323232</text:p>
          </table:table-cell>
          <table:table-cell office:value-type="float" office:value="0.8941798941798943" table:formula="of:=SUM([.Q48:.T48])" table:style-name="ce1">
            <text:p>0,894179894</text:p>
          </table:table-cell>
          <table:table-cell table:number-columns-repeated="2" table:style-name="ce1"/>
          <table:table-cell office:value-type="string" table:style-name="ce1">
            <text:p>BEACOPP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48:.AB48])" table:style-name="ce1">
            <text:p>#ADR!</text:p>
          </table:table-cell>
          <table:table-cell table:style-name="ce1"/>
          <table:table-cell office:value-type="string" table:style-name="ce1">
            <text:p>suma</text:p>
          </table:table-cell>
          <table:table-cell office:value-type="float" office:value="1.7566974088713094E-3" table:formula="of:=SUM([.AF46:.AF47])" table:style-name="ce43">
            <text:p>0,001756697</text:p>
          </table:table-cell>
          <table:table-cell office:value-type="float" office:value="0.16864295125164674" table:formula="of:=SUM([.AG46:.AG47])" table:style-name="ce43">
            <text:p>0,168642951</text:p>
          </table:table-cell>
          <table:table-cell office:value-type="float" office:value="6.5876152832674603E-2" table:formula="of:=SUM([.AH46:.AH47])" table:style-name="ce43">
            <text:p>0,065876153</text:p>
          </table:table-cell>
          <table:table-cell office:value-type="float" office:value="0.32938076416337314" table:formula="of:=SUM([.AI46:.AI47])" table:style-name="ce43">
            <text:p>0,329380764</text:p>
          </table:table-cell>
          <table:table-cell office:value-type="float" office:value="0.56565656565656586" table:formula="of:=SUM([.AJ46:.AJ47])" table:style-name="ce43">
            <text:p>0,56565656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2" table:style-name="ce1"/>
          <table:table-cell office:value-type="string" table:style-name="ce1">
            <text:p>ss=3</text:p>
          </table:table-cell>
          <table:table-cell office:value-type="string" table:style-name="ce1">
            <text:p>wartość tablicowa</text:p>
          </table:table-cell>
          <table:table-cell office:value-type="float" office:value="7.8147000000000002" table:style-name="ce1">
            <text:p>7,8147</text:p>
          </table:table-cell>
          <table:table-cell table:number-columns-repeated="4" table:style-name="ce1"/>
          <table:table-cell office:value-type="string" table:style-name="ce1">
            <text:p>suma</text:p>
          </table:table-cell>
          <table:table-cell office:value-type="float" office:value="0.66666666666666652" table:formula="of:=SUM([.Q45:.Q48])" table:style-name="ce1">
            <text:p>0,666666667</text:p>
          </table:table-cell>
          <table:table-cell office:value-type="float" office:value="0.81333333333333346" table:formula="of:=SUM([.R45:.R48])" table:style-name="ce1">
            <text:p>0,813333333</text:p>
          </table:table-cell>
          <table:table-cell office:value-type="float" office:value="2.2083333333333339" table:formula="of:=SUM([.S45:.S48])" table:style-name="ce1">
            <text:p>2,208333333</text:p>
          </table:table-cell>
          <table:table-cell office:value-type="float" office:value="0.43055555555555552" table:formula="of:=SUM([.T45:.T48])" table:style-name="ce1">
            <text:p>0,430555556</text:p>
          </table:table-cell>
          <table:table-cell office:value-type="float" office:value="4.1188888888888888" table:formula="of:=SUM([.U45:.U48])" table:style-name="ce1">
            <text:p>4,118888889</text:p>
          </table:table-cell>
          <table:table-cell table:number-columns-repeated="2" table:style-name="ce1"/>
          <table:table-cell office:value-type="string" table:style-name="ce1">
            <text:p>AVD</text:p>
          </table:table-cell>
          <table:table-cell office:value-type="float" office:value="1.4545454545454546" table:formula="of:=([.Y$22]*[.$AC20])/[.$AC$22]" table:style-name="ce1">
            <text:p>1,454545455</text:p>
          </table:table-cell>
          <table:table-cell office:value-type="float" office:value="3" table:formula="of:=([.Z$22]*[.$AC20])/[.$AC$22]" table:style-name="ce1">
            <text:p>3</text:p>
          </table:table-cell>
          <table:table-cell office:value-type="float" office:value="0.54545454545454541" table:formula="of:=([.AA$22]*[.$AC20])/[.$AC$22]" table:style-name="ce1">
            <text:p>0,545454545</text:p>
          </table:table-cell>
          <table:table-cell office:value-type="float" office:value="1" table:formula="of:=([.AB$22]*[.$AC20])/[.$AC$22]" table:style-name="ce1">
            <text:p>1</text:p>
          </table:table-cell>
          <table:table-cell office:value-type="float" office:value="6" table:formula="of:=SUM([.Y49:.AB49])" table:style-name="ce1">
            <text:p>6</text:p>
          </table:table-cell>
          <table:table-cell table:number-columns-repeated="5" table:style-name="ce1"/>
          <table:table-cell office:value-type="string" table:style-name="ce1">
            <text:p>p value</text:p>
          </table:table-cell>
          <table:table-cell office:value-type="float" office:value="0.90424700000000002" table:style-name="ce1">
            <text:p>0,904247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43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EP</text:p>
          </table:table-cell>
          <table:table-cell table:number-columns-repeated="2" table:style-name="ce1"/>
          <table:table-cell office:value-type="string" table:style-name="ce1">
            <text:p>5 % istotność testu</text:p>
          </table:table-cell>
          <table:table-cell table:number-columns-repeated="14" table:style-name="ce1"/>
          <table:table-cell office:value-type="string" table:style-name="ce1">
            <text:p>CVP</text:p>
          </table:table-cell>
          <table:table-cell office:value-type="float" office:value="1.696969696969697" table:formula="of:=([.Y$22]*[.$AC21])/[.$AC$22]" table:style-name="ce1">
            <text:p>1,696969697</text:p>
          </table:table-cell>
          <table:table-cell office:value-type="float" office:value="3.5" table:formula="of:=([.Z$22]*[.$AC21])/[.$AC$22]" table:style-name="ce1">
            <text:p>3,5</text:p>
          </table:table-cell>
          <table:table-cell office:value-type="float" office:value="0.63636363636363635" table:formula="of:=([.AA$22]*[.$AC21])/[.$AC$22]" table:style-name="ce1">
            <text:p>0,636363636</text:p>
          </table:table-cell>
          <table:table-cell office:value-type="float" office:value="1.1666666666666667" table:formula="of:=([.AB$22]*[.$AC21])/[.$AC$22]" table:style-name="ce1">
            <text:p>1,166666667</text:p>
          </table:table-cell>
          <table:table-cell office:value-type="float" office:value="7.0000000000000009" table:formula="of:=SUM([.Y50:.AB50])" table:style-name="ce1">
            <text:p>7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43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BGD</text:p>
          </table:table-cell>
          <table:table-cell table:number-columns-repeated="9" table:style-name="ce1"/>
          <table:table-cell office:value-type="string" table:style-name="ce1">
            <text:p>po leczeniu</text:p>
          </table:table-cell>
          <table:table-cell table:number-columns-repeated="7" table:style-name="ce1"/>
          <table:table-cell office:value-type="string" table:style-name="ce1">
            <text:p>OCVP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51:.AB51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9" table:style-name="ce1"/>
          <table:table-cell office:value-type="string" table:style-name="ce1">
            <text:p>WIEK\odpowiedx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/wznowa</text:p>
          </table:table-cell>
          <table:table-cell office:value-type="string" table:style-name="ce1">
            <text:p>suma</text:p>
          </table:table-cell>
          <table:table-cell table:number-columns-repeated="2" table:style-name="ce1"/>
          <table:table-cell office:value-type="string" table:style-name="ce1">
            <text:p>CHOEP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52:.AB52])" table:style-name="ce1">
            <text:p>#ADR!</text:p>
          </table:table-cell>
          <table:table-cell table:style-name="ce1"/>
          <table:table-cell office:value-type="string" table:style-name="ce1">
            <text:p>ss</text:p>
          </table:table-cell>
          <table:table-cell office:value-type="float" office:value="3" table:style-name="ce1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43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BEACOPP</text:p>
          </table:table-cell>
          <table:table-cell table:number-columns-repeated="2" table:style-name="ce1"/>
          <table:table-cell office:value-type="float" office:value="0.5" table:formula="of:=COM.MICROSOFT.T.TEST([.J9:.M10];[.J23:.M24];1;2)" table:style-name="ce1">
            <text:p>0,5</text:p>
          </table:table-cell>
          <table:table-cell table:number-columns-repeated="3" table:style-name="ce1"/>
          <table:table-cell office:value-type="string" table:style-name="ce1">
            <text:p>hl</text:p>
          </table:table-cell>
          <table:table-cell table:number-columns-repeated="2" table:style-name="ce1"/>
          <table:table-cell office:value-type="string" table:style-name="ce1">
            <text:p>15-30</text:p>
          </table:table-cell>
          <table:table-cell office:value-type="float" office:value="7.8046953046953124E-2" table:formula="of:=([.Q17]-[.Q35])^2/[.Q35]" table:style-name="ce1">
            <text:p>0,078046953</text:p>
          </table:table-cell>
          <table:table-cell office:value-type="float" office:value="0.1948575617930457" table:formula="of:=([.R17]-[.R35])^2/[.R35]" table:style-name="ce1">
            <text:p>0,194857562</text:p>
          </table:table-cell>
          <table:table-cell office:value-type="float" office:value="5.8441558441558454E-2" table:formula="of:=([.S17]-[.S35])^2/[.S35]" table:style-name="ce1">
            <text:p>0,058441558</text:p>
          </table:table-cell>
          <table:table-cell office:value-type="float" office:value="0.11688311688311691" table:formula="of:=([.T17]-[.T35])^2/[.T35]" table:style-name="ce1">
            <text:p>0,116883117</text:p>
          </table:table-cell>
          <table:table-cell office:value-type="float" office:value="0.44822919016467422" table:formula="of:=SUM([.Q53:.T53])" table:style-name="ce1">
            <text:p>0,44822919</text:p>
          </table:table-cell>
          <table:table-cell table:number-columns-repeated="2" table:style-name="ce1"/>
          <table:table-cell office:value-type="string" table:style-name="ce1">
            <text:p>RHAD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53:.AB53])" table:style-name="ce1">
            <text:p>#ADR!</text:p>
          </table:table-cell>
          <table:table-cell table:style-name="ce1"/>
          <table:table-cell office:value-type="string" table:style-name="ce1">
            <text:p>wartosc tablicowa</text:p>
          </table:table-cell>
          <table:table-cell table:style-name="ce1"/>
          <table:table-cell office:value-type="float" office:value="7.81" table:style-name="ce1">
            <text:p>7,81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ABVD</text:p>
          </table:table-cell>
          <table:table-cell table:number-columns-repeated="9" table:style-name="ce1"/>
          <table:table-cell office:value-type="string" table:style-name="ce44">
            <text:p>31-50</text:p>
          </table:table-cell>
          <table:table-cell office:value-type="error" office:string-value="#REF!" table:formula="of:=([.#REF!]-[.Q36])^2/[.Q36]" table:style-name="ce1">
            <text:p>#ADR!</text:p>
          </table:table-cell>
          <table:table-cell office:value-type="error" office:string-value="#REF!" table:formula="of:=([.#REF!]-[.R36])^2/[.R36]" table:style-name="ce1">
            <text:p>#ADR!</text:p>
          </table:table-cell>
          <table:table-cell office:value-type="error" office:string-value="#REF!" table:formula="of:=([.#REF!]-[.S36])^2/[.S36]" table:style-name="ce1">
            <text:p>#ADR!</text:p>
          </table:table-cell>
          <table:table-cell office:value-type="error" office:string-value="#REF!" table:formula="of:=([.#REF!]-[.T36])^2/[.T36]" table:style-name="ce1">
            <text:p>#ADR!</text:p>
          </table:table-cell>
          <table:table-cell office:value-type="error" office:string-value="#REF!" table:formula="of:=SUM([.Q54:.T54])" table:style-name="ce1">
            <text:p>#ADR!</text:p>
          </table:table-cell>
          <table:table-cell table:number-columns-repeated="2" table:style-name="ce1"/>
          <table:table-cell office:value-type="string" table:style-name="ce1">
            <text:p>BGD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54:.AB54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RHAD</text:p>
          </table:table-cell>
          <table:table-cell table:number-columns-repeated="9" table:style-name="ce1"/>
          <table:table-cell office:value-type="string" table:style-name="ce1">
            <text:p>51-70</text:p>
          </table:table-cell>
          <table:table-cell office:value-type="float" office:value="0.16147741147741138" table:formula="of:=([.Q18]-[.Q37])^2/[.Q37]" table:style-name="ce1">
            <text:p>0,161477411</text:p>
          </table:table-cell>
          <table:table-cell office:value-type="float" office:value="0.1076548899129546" table:formula="of:=([.R18]-[.R37])^2/[.R37]" table:style-name="ce1">
            <text:p>0,10765489</text:p>
          </table:table-cell>
          <table:table-cell office:value-type="float" office:value="6.349206349206353E-2" table:formula="of:=([.S18]-[.S37])^2/[.S37]" table:style-name="ce1">
            <text:p>0,063492063</text:p>
          </table:table-cell>
          <table:table-cell office:value-type="float" office:value="0.96031746031746057" table:formula="of:=([.T18]-[.T37])^2/[.T37]" table:style-name="ce1">
            <text:p>0,96031746</text:p>
          </table:table-cell>
          <table:table-cell office:value-type="float" office:value="1.2929418251998901" table:formula="of:=SUM([.Q55:.T55])" table:style-name="ce1">
            <text:p>1,292941825</text:p>
          </table:table-cell>
          <table:table-cell table:number-columns-repeated="2" table:style-name="ce1"/>
          <table:table-cell office:value-type="string" table:style-name="ce1">
            <text:p>CHOP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55:.AB55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kobieta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VP</text:p>
          </table:table-cell>
          <table:table-cell table:number-columns-repeated="9" table:style-name="ce1"/>
          <table:table-cell office:value-type="string" table:style-name="ce1">
            <text:p>71-100</text:p>
          </table:table-cell>
          <table:table-cell office:value-type="error" office:string-value="#REF!" table:formula="of:=([.#REF!]-[.Q38])^2/[.Q38]" table:style-name="ce1">
            <text:p>#ADR!</text:p>
          </table:table-cell>
          <table:table-cell office:value-type="error" office:string-value="#REF!" table:formula="of:=([.#REF!]-[.R38])^2/[.R38]" table:style-name="ce1">
            <text:p>#ADR!</text:p>
          </table:table-cell>
          <table:table-cell office:value-type="error" office:string-value="#REF!" table:formula="of:=([.#REF!]-[.S38])^2/[.S38]" table:style-name="ce1">
            <text:p>#ADR!</text:p>
          </table:table-cell>
          <table:table-cell office:value-type="error" office:string-value="#REF!" table:formula="of:=([.#REF!]-[.T38])^2/[.T38]" table:style-name="ce1">
            <text:p>#ADR!</text:p>
          </table:table-cell>
          <table:table-cell office:value-type="error" office:string-value="#REF!" table:formula="of:=SUM([.Q56:.T56])" table:style-name="ce1">
            <text:p>#ADR!</text:p>
          </table:table-cell>
          <table:table-cell table:number-columns-repeated="2" table:style-name="ce1"/>
          <table:table-cell office:value-type="string" table:style-name="ce1">
            <text:p>RDAPOCH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56:.AB56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ężczyzna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46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HL</text:p>
          </table:table-cell>
          <table:table-cell office:value-type="string" table:style-name="ce1">
            <text:p>CHOEP</text:p>
          </table:table-cell>
          <table:table-cell table:number-columns-repeated="9" table:style-name="ce1"/>
          <table:table-cell office:value-type="string" table:style-name="ce1">
            <text:p>suma</text:p>
          </table:table-cell>
          <table:table-cell office:value-type="error" office:string-value="#REF!" table:formula="of:=SUM([.Q53:.Q56])" table:style-name="ce1">
            <text:p>#ADR!</text:p>
          </table:table-cell>
          <table:table-cell office:value-type="error" office:string-value="#REF!" table:formula="of:=SUM([.R53:.R56])" table:style-name="ce1">
            <text:p>#ADR!</text:p>
          </table:table-cell>
          <table:table-cell office:value-type="error" office:string-value="#REF!" table:formula="of:=SUM([.S53:.S56])" table:style-name="ce1">
            <text:p>#ADR!</text:p>
          </table:table-cell>
          <table:table-cell office:value-type="error" office:string-value="#REF!" table:formula="of:=SUM([.T53:.T56])" table:style-name="ce1">
            <text:p>#ADR!</text:p>
          </table:table-cell>
          <table:table-cell office:value-type="error" office:string-value="#REF!" table:formula="of:=SUM([.U53:.U56])" table:style-name="ce1">
            <text:p>#ADR!</text:p>
          </table:table-cell>
          <table:table-cell table:number-columns-repeated="2" table:style-name="ce1"/>
          <table:table-cell office:value-type="string" table:style-name="ce1">
            <text:p>RCVP</text:p>
          </table:table-cell>
          <table:table-cell office:value-type="error" office:string-value="#REF!" table:formula="of:=([.Y$22]*[.#REF!])/[.$AC$22]" table:style-name="ce1">
            <text:p>#ADR!</text:p>
          </table:table-cell>
          <table:table-cell office:value-type="error" office:string-value="#REF!" table:formula="of:=([.Z$22]*[.#REF!])/[.$AC$22]" table:style-name="ce1">
            <text:p>#ADR!</text:p>
          </table:table-cell>
          <table:table-cell office:value-type="error" office:string-value="#REF!" table:formula="of:=([.AA$22]*[.#REF!])/[.$AC$22]" table:style-name="ce1">
            <text:p>#ADR!</text:p>
          </table:table-cell>
          <table:table-cell office:value-type="error" office:string-value="#REF!" table:formula="of:=([.AB$22]*[.#REF!])/[.$AC$22]" table:style-name="ce1">
            <text:p>#ADR!</text:p>
          </table:table-cell>
          <table:table-cell office:value-type="error" office:string-value="#REF!" table:formula="of:=SUM([.Y57:.AB57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table:number-columns-repeated="23" table:style-name="ce1"/>
          <table:table-cell office:value-type="string" table:style-name="ce1">
            <text:p>suma</text:p>
          </table:table-cell>
          <table:table-cell office:value-type="error" office:string-value="#REF!" table:formula="of:=SUM([.Y45:.Y57])" table:style-name="ce1">
            <text:p>#ADR!</text:p>
          </table:table-cell>
          <table:table-cell office:value-type="error" office:string-value="#REF!" table:formula="of:=SUM([.Z45:.Z57])" table:style-name="ce1">
            <text:p>#ADR!</text:p>
          </table:table-cell>
          <table:table-cell office:value-type="error" office:string-value="#REF!" table:formula="of:=SUM([.AA45:.AA57])" table:style-name="ce1">
            <text:p>#ADR!</text:p>
          </table:table-cell>
          <table:table-cell office:value-type="error" office:string-value="#REF!" table:formula="of:=SUM([.AB45:.AB57])" table:style-name="ce1">
            <text:p>#ADR!</text:p>
          </table:table-cell>
          <table:table-cell office:value-type="error" office:string-value="#REF!" table:formula="of:=SUM([.AC45:.AC57])" table:style-name="ce1">
            <text:p>#ADR!</text:p>
          </table:table-cell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ss</text:p>
          </table:table-cell>
          <table:table-cell office:value-type="float" office:value="21" table:formula="of:=3*7" table:style-name="ce1">
            <text:p>21</text:p>
          </table:table-cell>
          <table:table-cell table:number-columns-repeated="16367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wartość tablicowa</text:p>
          </table:table-cell>
          <table:table-cell office:value-type="float" office:value="32.760599999999997" table:style-name="ce1">
            <text:p>32,7606</text:p>
          </table:table-cell>
          <table:table-cell table:number-columns-repeated="16367" table:style-name="ce1"/>
        </table:table-row>
        <table:table-row table:style-name="ro1">
          <table:table-cell table:number-columns-repeated="23" table:style-name="ce1"/>
          <table:table-cell office:value-type="string" table:style-name="ce1">
            <text:p>RÓZNICE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float" office:value="0.5" table:formula="of:=COM.MICROSOFT.T.TEST([.Q9:.T12];[.Q27:.T30];1;1)" table:style-name="ce1">
            <text:p>0,5</text:p>
          </table:table-cell>
          <table:table-cell table:number-columns-repeated="16368" table:style-name="ce1"/>
        </table:table-row>
        <table:table-row table:style-name="ro1">
          <table:table-cell table:number-columns-repeated="23" table:style-name="ce1"/>
          <table:table-cell office:value-type="string" table:style-name="ce1">
            <text:p>w trakcie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</text:p>
          </table:table-cell>
          <table:table-cell table:number-columns-repeated="16356" table:style-name="ce1"/>
        </table:table-row>
        <table:table-row table:style-name="ro1">
          <table:table-cell table:number-columns-repeated="23"/>
          <table:table-cell office:value-type="string" table:style-name="ce1">
            <text:p>RCHOP</text:p>
          </table:table-cell>
          <table:table-cell office:value-type="float" office:value="1.2987012987012962E-2" table:formula="of:=([.Y8]-[.Y28])^2/[.Y28]" table:style-name="ce1">
            <text:p>0,012987013</text:p>
          </table:table-cell>
          <table:table-cell office:value-type="float" office:value="0.23112073112073084" table:formula="of:=([.Z8]-[.Z28])^2/[.Z28]" table:style-name="ce1">
            <text:p>0,231120731</text:p>
          </table:table-cell>
          <table:table-cell office:value-type="float" office:value="1.3525046382189236" table:formula="of:=([.AA8]-[.AA28])^2/[.AA28]" table:style-name="ce1">
            <text:p>1,352504638</text:p>
          </table:table-cell>
          <table:table-cell office:value-type="float" office:value="0.26808905380333969" table:formula="of:=([.AB8]-[.AB28])^2/[.AB28]" table:style-name="ce1">
            <text:p>0,268089054</text:p>
          </table:table-cell>
          <table:table-cell office:value-type="float" office:value="1.8647014361300069" table:formula="of:=SUM([.Y65:.AB65])" table:style-name="ce1">
            <text:p>1,864701436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abvd</text:p>
          </table:table-cell>
          <table:table-cell office:value-type="float" office:value="9.8181818181818217E-2" table:formula="of:=([.Y9]-[.Y29])^2/[.Y29]" table:style-name="ce1">
            <text:p>0,098181818</text:p>
          </table:table-cell>
          <table:table-cell office:value-type="float" office:value="5.0505050505050214E-3" table:formula="of:=([.Z9]-[.Z29])^2/[.Z29]" table:style-name="ce1">
            <text:p>0,005050505</text:p>
          </table:table-cell>
          <table:table-cell office:value-type="float" office:value="1.3716017316017319" table:formula="of:=([.AA9]-[.AA29])^2/[.AA29]" table:style-name="ce1">
            <text:p>1,371601732</text:p>
          </table:table-cell>
          <table:table-cell office:value-type="float" office:value="1.0286580086580086" table:formula="of:=([.AB9]-[.AB29])^2/[.AB29]" table:style-name="ce1">
            <text:p>1,028658009</text:p>
          </table:table-cell>
          <table:table-cell office:value-type="float" office:value="2.5034920634920637" table:formula="of:=SUM([.Y66:.AB66])" table:style-name="ce1">
            <text:p>2,503492063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ifrt</text:p>
          </table:table-cell>
          <table:table-cell office:value-type="float" office:value="0.24747474747474754" table:formula="of:=([.Y10]-[.Y30])^2/[.Y30]" table:style-name="ce1">
            <text:p>0,247474747</text:p>
          </table:table-cell>
          <table:table-cell office:value-type="float" office:value="8.4175084175084181E-2" table:formula="of:=([.Z10]-[.Z30])^2/[.Z30]" table:style-name="ce1">
            <text:p>0,084175084</text:p>
          </table:table-cell>
          <table:table-cell office:value-type="float" office:value="0.41558441558441561" table:formula="of:=([.AA10]-[.AA30])^2/[.AA30]" table:style-name="ce1">
            <text:p>0,415584416</text:p>
          </table:table-cell>
          <table:table-cell office:value-type="float" office:value="0.20779220779220781" table:formula="of:=([.AB10]-[.AB30])^2/[.AB30]" table:style-name="ce1">
            <text:p>0,207792208</text:p>
          </table:table-cell>
          <table:table-cell office:value-type="float" office:value="0.95502645502645511" table:formula="of:=SUM([.Y67:.AB67])" table:style-name="ce1">
            <text:p>0,955026455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BEACOPP</text:p>
          </table:table-cell>
          <table:table-cell office:value-type="error" office:string-value="#REF!" table:formula="of:=([.#REF!]-[.Y31])^2/[.Y31]" table:style-name="ce1">
            <text:p>#ADR!</text:p>
          </table:table-cell>
          <table:table-cell office:value-type="error" office:string-value="#REF!" table:formula="of:=([.#REF!]-[.Z31])^2/[.Z31]" table:style-name="ce1">
            <text:p>#ADR!</text:p>
          </table:table-cell>
          <table:table-cell office:value-type="error" office:string-value="#REF!" table:formula="of:=([.#REF!]-[.AA31])^2/[.AA31]" table:style-name="ce1">
            <text:p>#ADR!</text:p>
          </table:table-cell>
          <table:table-cell office:value-type="error" office:string-value="#REF!" table:formula="of:=([.#REF!]-[.AB31])^2/[.AB31]" table:style-name="ce1">
            <text:p>#ADR!</text:p>
          </table:table-cell>
          <table:table-cell office:value-type="error" office:string-value="#REF!" table:formula="of:=SUM([.Y68:.AB68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AVD</text:p>
          </table:table-cell>
          <table:table-cell office:value-type="float" office:value="0.24747474747474754" table:formula="of:=([.Y11]-[.Y32])^2/[.Y32]" table:style-name="ce1">
            <text:p>0,247474747</text:p>
          </table:table-cell>
          <table:table-cell office:value-type="float" office:value="0.12121212121212119" table:formula="of:=([.Z11]-[.Z32])^2/[.Z32]" table:style-name="ce1">
            <text:p>0,121212121</text:p>
          </table:table-cell>
          <table:table-cell office:value-type="float" office:value="5.8441558441558433E-2" table:formula="of:=([.AA11]-[.AA32])^2/[.AA32]" table:style-name="ce1">
            <text:p>0,058441558</text:p>
          </table:table-cell>
          <table:table-cell office:value-type="float" office:value="0.20779220779220781" table:formula="of:=([.AB11]-[.AB32])^2/[.AB32]" table:style-name="ce1">
            <text:p>0,207792208</text:p>
          </table:table-cell>
          <table:table-cell office:value-type="float" office:value="0.63492063492063489" table:formula="of:=SUM([.Y69:.AB69])" table:style-name="ce1">
            <text:p>0,634920635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CVP</text:p>
          </table:table-cell>
          <table:table-cell office:value-type="float" office:value="1.5151515151515156" table:formula="of:=([.Y12]-[.Y33])^2/[.Y33]" table:style-name="ce1">
            <text:p>1,515151515</text:p>
          </table:table-cell>
          <table:table-cell office:value-type="float" office:value="0.49494949494949508" table:formula="of:=([.Z12]-[.Z33])^2/[.Z33]" table:style-name="ce1">
            <text:p>0,494949495</text:p>
          </table:table-cell>
          <table:table-cell office:value-type="float" office:value="0.28625541125541126" table:formula="of:=([.AA12]-[.AA33])^2/[.AA33]" table:style-name="ce1">
            <text:p>0,286255411</text:p>
          </table:table-cell>
          <table:table-cell office:value-type="float" office:value="2.7056277056277046E-2" table:formula="of:=([.AB12]-[.AB33])^2/[.AB33]" table:style-name="ce1">
            <text:p>0,027056277</text:p>
          </table:table-cell>
          <table:table-cell office:value-type="float" office:value="2.323412698412699" table:formula="of:=SUM([.Y70:.AB70])" table:style-name="ce1">
            <text:p>2,323412698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OCVP</text:p>
          </table:table-cell>
          <table:table-cell office:value-type="error" office:string-value="#REF!" table:formula="of:=([.#REF!]-[.Y34])^2/[.Y34]" table:style-name="ce1">
            <text:p>#ADR!</text:p>
          </table:table-cell>
          <table:table-cell office:value-type="error" office:string-value="#REF!" table:formula="of:=([.#REF!]-[.Z34])^2/[.Z34]" table:style-name="ce1">
            <text:p>#ADR!</text:p>
          </table:table-cell>
          <table:table-cell office:value-type="error" office:string-value="#REF!" table:formula="of:=([.#REF!]-[.AA34])^2/[.AA34]" table:style-name="ce1">
            <text:p>#ADR!</text:p>
          </table:table-cell>
          <table:table-cell office:value-type="error" office:string-value="#REF!" table:formula="of:=([.#REF!]-[.AB34])^2/[.AB34]" table:style-name="ce1">
            <text:p>#ADR!</text:p>
          </table:table-cell>
          <table:table-cell office:value-type="error" office:string-value="#REF!" table:formula="of:=SUM([.Y71:.AB71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CHOEP</text:p>
          </table:table-cell>
          <table:table-cell office:value-type="error" office:string-value="#REF!" table:formula="of:=([.#REF!]-[.Y35])^2/[.Y35]" table:style-name="ce1">
            <text:p>#ADR!</text:p>
          </table:table-cell>
          <table:table-cell office:value-type="error" office:string-value="#REF!" table:formula="of:=([.#REF!]-[.Z35])^2/[.Z35]" table:style-name="ce1">
            <text:p>#ADR!</text:p>
          </table:table-cell>
          <table:table-cell office:value-type="error" office:string-value="#REF!" table:formula="of:=([.#REF!]-[.AA35])^2/[.AA35]" table:style-name="ce1">
            <text:p>#ADR!</text:p>
          </table:table-cell>
          <table:table-cell office:value-type="error" office:string-value="#REF!" table:formula="of:=([.#REF!]-[.AB35])^2/[.AB35]" table:style-name="ce1">
            <text:p>#ADR!</text:p>
          </table:table-cell>
          <table:table-cell office:value-type="error" office:string-value="#REF!" table:formula="of:=SUM([.Y72:.AB72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RHAD</text:p>
          </table:table-cell>
          <table:table-cell office:value-type="error" office:string-value="#REF!" table:formula="of:=([.#REF!]-[.Y36])^2/[.Y36]" table:style-name="ce1">
            <text:p>#ADR!</text:p>
          </table:table-cell>
          <table:table-cell office:value-type="error" office:string-value="#REF!" table:formula="of:=([.#REF!]-[.Z36])^2/[.Z36]" table:style-name="ce1">
            <text:p>#ADR!</text:p>
          </table:table-cell>
          <table:table-cell office:value-type="error" office:string-value="#REF!" table:formula="of:=([.#REF!]-[.AA36])^2/[.AA36]" table:style-name="ce1">
            <text:p>#ADR!</text:p>
          </table:table-cell>
          <table:table-cell office:value-type="error" office:string-value="#REF!" table:formula="of:=([.#REF!]-[.AB36])^2/[.AB36]" table:style-name="ce1">
            <text:p>#ADR!</text:p>
          </table:table-cell>
          <table:table-cell office:value-type="error" office:string-value="#REF!" table:formula="of:=SUM([.Y73:.AB73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BGD</text:p>
          </table:table-cell>
          <table:table-cell office:value-type="error" office:string-value="#REF!" table:formula="of:=([.#REF!]-[.Y37])^2/[.Y37]" table:style-name="ce1">
            <text:p>#ADR!</text:p>
          </table:table-cell>
          <table:table-cell office:value-type="error" office:string-value="#REF!" table:formula="of:=([.#REF!]-[.Z37])^2/[.Z37]" table:style-name="ce1">
            <text:p>#ADR!</text:p>
          </table:table-cell>
          <table:table-cell office:value-type="error" office:string-value="#REF!" table:formula="of:=([.#REF!]-[.AA37])^2/[.AA37]" table:style-name="ce1">
            <text:p>#ADR!</text:p>
          </table:table-cell>
          <table:table-cell office:value-type="error" office:string-value="#REF!" table:formula="of:=([.#REF!]-[.AB37])^2/[.AB37]" table:style-name="ce1">
            <text:p>#ADR!</text:p>
          </table:table-cell>
          <table:table-cell office:value-type="error" office:string-value="#REF!" table:formula="of:=SUM([.Y74:.AB74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CHOP</text:p>
          </table:table-cell>
          <table:table-cell office:value-type="error" office:string-value="#REF!" table:formula="of:=([.#REF!]-[.Y38])^2/[.Y38]" table:style-name="ce1">
            <text:p>#ADR!</text:p>
          </table:table-cell>
          <table:table-cell office:value-type="error" office:string-value="#REF!" table:formula="of:=([.#REF!]-[.Z38])^2/[.Z38]" table:style-name="ce1">
            <text:p>#ADR!</text:p>
          </table:table-cell>
          <table:table-cell office:value-type="error" office:string-value="#REF!" table:formula="of:=([.#REF!]-[.AA38])^2/[.AA38]" table:style-name="ce1">
            <text:p>#ADR!</text:p>
          </table:table-cell>
          <table:table-cell office:value-type="error" office:string-value="#REF!" table:formula="of:=([.#REF!]-[.AB38])^2/[.AB38]" table:style-name="ce1">
            <text:p>#ADR!</text:p>
          </table:table-cell>
          <table:table-cell office:value-type="error" office:string-value="#REF!" table:formula="of:=SUM([.Y75:.AB75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RDAPOCH</text:p>
          </table:table-cell>
          <table:table-cell office:value-type="error" office:string-value="#REF!" table:formula="of:=([.#REF!]-[.Y39])^2/[.Y39]" table:style-name="ce1">
            <text:p>#ADR!</text:p>
          </table:table-cell>
          <table:table-cell office:value-type="error" office:string-value="#REF!" table:formula="of:=([.#REF!]-[.Z39])^2/[.Z39]" table:style-name="ce1">
            <text:p>#ADR!</text:p>
          </table:table-cell>
          <table:table-cell office:value-type="error" office:string-value="#REF!" table:formula="of:=([.#REF!]-[.AA39])^2/[.AA39]" table:style-name="ce1">
            <text:p>#ADR!</text:p>
          </table:table-cell>
          <table:table-cell office:value-type="error" office:string-value="#REF!" table:formula="of:=([.#REF!]-[.AB39])^2/[.AB39]" table:style-name="ce1">
            <text:p>#ADR!</text:p>
          </table:table-cell>
          <table:table-cell office:value-type="error" office:string-value="#REF!" table:formula="of:=SUM([.Y76:.AB76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RCVP</text:p>
          </table:table-cell>
          <table:table-cell office:value-type="error" office:string-value="#REF!" table:formula="of:=([.#REF!]-[.Y40])^2/[.Y40]" table:style-name="ce1">
            <text:p>#ADR!</text:p>
          </table:table-cell>
          <table:table-cell office:value-type="error" office:string-value="#REF!" table:formula="of:=([.#REF!]-[.Z40])^2/[.Z40]" table:style-name="ce1">
            <text:p>#ADR!</text:p>
          </table:table-cell>
          <table:table-cell office:value-type="error" office:string-value="#REF!" table:formula="of:=([.#REF!]-[.AA40])^2/[.AA40]" table:style-name="ce1">
            <text:p>#ADR!</text:p>
          </table:table-cell>
          <table:table-cell office:value-type="error" office:string-value="#REF!" table:formula="of:=([.#REF!]-[.AB40])^2/[.AB40]" table:style-name="ce1">
            <text:p>#ADR!</text:p>
          </table:table-cell>
          <table:table-cell office:value-type="error" office:string-value="#REF!" table:formula="of:=SUM([.Y77:.AB77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suma</text:p>
          </table:table-cell>
          <table:table-cell office:value-type="error" office:string-value="#REF!" table:formula="of:=SUM([.Y65:.Y77])" table:style-name="ce1">
            <text:p>#ADR!</text:p>
          </table:table-cell>
          <table:table-cell office:value-type="error" office:string-value="#REF!" table:formula="of:=SUM([.Z65:.Z77])" table:style-name="ce1">
            <text:p>#ADR!</text:p>
          </table:table-cell>
          <table:table-cell office:value-type="error" office:string-value="#REF!" table:formula="of:=SUM([.AA65:.AA77])" table:style-name="ce1">
            <text:p>#ADR!</text:p>
          </table:table-cell>
          <table:table-cell office:value-type="error" office:string-value="#REF!" table:formula="of:=SUM([.AB65:.AB77])" table:style-name="ce1">
            <text:p>#ADR!</text:p>
          </table:table-cell>
          <table:table-cell office:value-type="error" office:string-value="#REF!" table:formula="of:=SUM([.AC65:.AC77])" table:style-name="ce1">
            <text:p>#ADR!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3"/>
          <table:table-cell office:value-type="string" table:style-name="ce1">
            <text:p>po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czesciowa</text:p>
          </table:table-cell>
          <table:table-cell office:value-type="string" table:style-name="ce1">
            <text:p>progresja</text:p>
          </table:table-cell>
          <table:table-cell table:number-columns-repeated="16356" table:style-name="ce1"/>
        </table:table-row>
        <table:table-row table:style-name="ro1">
          <table:table-cell table:number-columns-repeated="23"/>
          <table:table-cell office:value-type="string" table:style-name="ce1">
            <text:p>RCHOP</text:p>
          </table:table-cell>
          <table:table-cell office:value-type="float" office:value="1.6233766233766204E-3" table:formula="of:=([.Y17]-[.Y45])^2/[.Y45]" table:style-name="ce1">
            <text:p>0,001623377</text:p>
          </table:table-cell>
          <table:table-cell office:value-type="float" office:value="2.3809523809523808E-2" table:formula="of:=([.Z17]-[.Z45])^2/[.Z45]" table:style-name="ce1">
            <text:p>0,023809524</text:p>
          </table:table-cell>
          <table:table-cell office:value-type="float" office:value="4.3290043290043212E-3" table:formula="of:=([.AA17]-[.AA45])^2/[.AA45]" table:style-name="ce1">
            <text:p>0,004329004</text:p>
          </table:table-cell>
          <table:table-cell office:value-type="float" office:value="7.1428571428571425E-2" table:formula="of:=([.AB17]-[.AB45])^2/[.AB45]" table:style-name="ce1">
            <text:p>0,071428571</text:p>
          </table:table-cell>
          <table:table-cell office:value-type="float" office:value="0.10119047619047618" table:formula="of:=SUM([.Y82:.AB82])" table:style-name="ce1">
            <text:p>0,101190476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abvd</text:p>
          </table:table-cell>
          <table:table-cell office:value-type="float" office:value="0.18560606060606058" table:formula="of:=([.Y18]-[.Y46])^2/[.Y46]" table:style-name="ce1">
            <text:p>0,185606061</text:p>
          </table:table-cell>
          <table:table-cell office:value-type="float" office:value="0.5" table:formula="of:=([.Z18]-[.Z46])^2/[.Z46]" table:style-name="ce1">
            <text:p>0,5</text:p>
          </table:table-cell>
          <table:table-cell office:value-type="float" office:value="0.71272727272727288" table:formula="of:=([.AA18]-[.AA46])^2/[.AA46]" table:style-name="ce1">
            <text:p>0,712727273</text:p>
          </table:table-cell>
          <table:table-cell office:value-type="float" office:value="6.6666666666666896E-3" table:formula="of:=([.AB18]-[.AB46])^2/[.AB46]" table:style-name="ce1">
            <text:p>0,006666667</text:p>
          </table:table-cell>
          <table:table-cell office:value-type="float" office:value="1.405" table:formula="of:=SUM([.Y83:.AB83])" table:style-name="ce1">
            <text:p>1,405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ifrt</text:p>
          </table:table-cell>
          <table:table-cell office:value-type="float" office:value="5.4112554112554091E-2" table:formula="of:=([.Y19]-[.Y47])^2/[.Y47]" table:style-name="ce1">
            <text:p>0,054112554</text:p>
          </table:table-cell>
          <table:table-cell office:value-type="float" office:value="7.1428571428571425E-2" table:formula="of:=([.Z19]-[.Z47])^2/[.Z47]" table:style-name="ce1">
            <text:p>0,071428571</text:p>
          </table:table-cell>
          <table:table-cell office:value-type="float" office:value="0.20779220779220781" table:formula="of:=([.AA19]-[.AA47])^2/[.AA47]" table:style-name="ce1">
            <text:p>0,207792208</text:p>
          </table:table-cell>
          <table:table-cell office:value-type="float" office:value="2.3809523809523829E-2" table:formula="of:=([.AB19]-[.AB47])^2/[.AB47]" table:style-name="ce1">
            <text:p>0,023809524</text:p>
          </table:table-cell>
          <table:table-cell office:value-type="float" office:value="0.35714285714285715" table:formula="of:=SUM([.Y84:.AB84])" table:style-name="ce1">
            <text:p>0,357142857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BEACOPP</text:p>
          </table:table-cell>
          <table:table-cell office:value-type="error" office:string-value="#REF!" table:formula="of:=([.#REF!]-[.Y48])^2/[.Y48]" table:style-name="ce1">
            <text:p>#ADR!</text:p>
          </table:table-cell>
          <table:table-cell office:value-type="error" office:string-value="#REF!" table:formula="of:=([.#REF!]-[.Z48])^2/[.Z48]" table:style-name="ce1">
            <text:p>#ADR!</text:p>
          </table:table-cell>
          <table:table-cell office:value-type="error" office:string-value="#REF!" table:formula="of:=([.#REF!]-[.AA48])^2/[.AA48]" table:style-name="ce1">
            <text:p>#ADR!</text:p>
          </table:table-cell>
          <table:table-cell office:value-type="error" office:string-value="#REF!" table:formula="of:=([.#REF!]-[.AB48])^2/[.AB48]" table:style-name="ce1">
            <text:p>#ADR!</text:p>
          </table:table-cell>
          <table:table-cell office:value-type="error" office:string-value="#REF!" table:formula="of:=SUM([.Y85:.AB85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AVD</text:p>
          </table:table-cell>
          <table:table-cell office:value-type="float" office:value="0.14204545454545456" table:formula="of:=([.Y20]-[.Y49])^2/[.Y49]" table:style-name="ce1">
            <text:p>0,142045455</text:p>
          </table:table-cell>
          <table:table-cell office:value-type="float" office:value="0.33333333333333331" table:formula="of:=([.Z20]-[.Z49])^2/[.Z49]" table:style-name="ce1">
            <text:p>0,333333333</text:p>
          </table:table-cell>
          <table:table-cell office:value-type="float" office:value="0.3787878787878789" table:formula="of:=([.AA20]-[.AA49])^2/[.AA49]" table:style-name="ce1">
            <text:p>0,378787879</text:p>
          </table:table-cell>
          <table:table-cell office:value-type="float" office:value="1" table:formula="of:=([.AB20]-[.AB49])^2/[.AB49]" table:style-name="ce1">
            <text:p>1</text:p>
          </table:table-cell>
          <table:table-cell office:value-type="float" office:value="1.8541666666666667" table:formula="of:=SUM([.Y86:.AB86])" table:style-name="ce1">
            <text:p>1,854166667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CVP</text:p>
          </table:table-cell>
          <table:table-cell office:value-type="float" office:value="1.0005411255411254" table:formula="of:=([.Y21]-[.Y50])^2/[.Y50]" table:style-name="ce1">
            <text:p>1,000541126</text:p>
          </table:table-cell>
          <table:table-cell office:value-type="float" office:value="0.6428571428571429" table:formula="of:=([.Z21]-[.Z50])^2/[.Z50]" table:style-name="ce1">
            <text:p>0,642857143</text:p>
          </table:table-cell>
          <table:table-cell office:value-type="float" office:value="0.20779220779220781" table:formula="of:=([.AA21]-[.AA50])^2/[.AA50]" table:style-name="ce1">
            <text:p>0,207792208</text:p>
          </table:table-cell>
          <table:table-cell office:value-type="float" office:value="2.3809523809523829E-2" table:formula="of:=([.AB21]-[.AB50])^2/[.AB50]" table:style-name="ce1">
            <text:p>0,023809524</text:p>
          </table:table-cell>
          <table:table-cell office:value-type="float" office:value="1.875" table:formula="of:=SUM([.Y87:.AB87])" table:style-name="ce1">
            <text:p>1,875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OCVP</text:p>
          </table:table-cell>
          <table:table-cell office:value-type="error" office:string-value="#REF!" table:formula="of:=([.#REF!]-[.Y51])^2/[.Y51]" table:style-name="ce1">
            <text:p>#ADR!</text:p>
          </table:table-cell>
          <table:table-cell office:value-type="error" office:string-value="#REF!" table:formula="of:=([.#REF!]-[.Z51])^2/[.Z51]" table:style-name="ce1">
            <text:p>#ADR!</text:p>
          </table:table-cell>
          <table:table-cell office:value-type="error" office:string-value="#REF!" table:formula="of:=([.#REF!]-[.AA51])^2/[.AA51]" table:style-name="ce1">
            <text:p>#ADR!</text:p>
          </table:table-cell>
          <table:table-cell office:value-type="error" office:string-value="#REF!" table:formula="of:=([.#REF!]-[.AB51])^2/[.AB51]" table:style-name="ce1">
            <text:p>#ADR!</text:p>
          </table:table-cell>
          <table:table-cell office:value-type="error" office:string-value="#REF!" table:formula="of:=SUM([.Y88:.AB88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CHOEP</text:p>
          </table:table-cell>
          <table:table-cell office:value-type="error" office:string-value="#REF!" table:formula="of:=([.#REF!]-[.Y52])^2/[.Y52]" table:style-name="ce1">
            <text:p>#ADR!</text:p>
          </table:table-cell>
          <table:table-cell office:value-type="error" office:string-value="#REF!" table:formula="of:=([.#REF!]-[.Z52])^2/[.Z52]" table:style-name="ce1">
            <text:p>#ADR!</text:p>
          </table:table-cell>
          <table:table-cell office:value-type="error" office:string-value="#REF!" table:formula="of:=([.#REF!]-[.AA52])^2/[.AA52]" table:style-name="ce1">
            <text:p>#ADR!</text:p>
          </table:table-cell>
          <table:table-cell office:value-type="error" office:string-value="#REF!" table:formula="of:=([.#REF!]-[.AB52])^2/[.AB52]" table:style-name="ce1">
            <text:p>#ADR!</text:p>
          </table:table-cell>
          <table:table-cell office:value-type="error" office:string-value="#REF!" table:formula="of:=SUM([.Y89:.AB89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RHAD</text:p>
          </table:table-cell>
          <table:table-cell office:value-type="error" office:string-value="#REF!" table:formula="of:=([.#REF!]-[.Y53])^2/[.Y53]" table:style-name="ce1">
            <text:p>#ADR!</text:p>
          </table:table-cell>
          <table:table-cell office:value-type="error" office:string-value="#REF!" table:formula="of:=([.#REF!]-[.Z53])^2/[.Z53]" table:style-name="ce1">
            <text:p>#ADR!</text:p>
          </table:table-cell>
          <table:table-cell office:value-type="error" office:string-value="#REF!" table:formula="of:=([.#REF!]-[.AA53])^2/[.AA53]" table:style-name="ce1">
            <text:p>#ADR!</text:p>
          </table:table-cell>
          <table:table-cell office:value-type="error" office:string-value="#REF!" table:formula="of:=([.#REF!]-[.AB53])^2/[.AB53]" table:style-name="ce1">
            <text:p>#ADR!</text:p>
          </table:table-cell>
          <table:table-cell office:value-type="error" office:string-value="#REF!" table:formula="of:=SUM([.Y90:.AB90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BGD</text:p>
          </table:table-cell>
          <table:table-cell office:value-type="error" office:string-value="#REF!" table:formula="of:=([.#REF!]-[.Y54])^2/[.Y54]" table:style-name="ce1">
            <text:p>#ADR!</text:p>
          </table:table-cell>
          <table:table-cell office:value-type="error" office:string-value="#REF!" table:formula="of:=([.#REF!]-[.Z54])^2/[.Z54]" table:style-name="ce1">
            <text:p>#ADR!</text:p>
          </table:table-cell>
          <table:table-cell office:value-type="error" office:string-value="#REF!" table:formula="of:=([.#REF!]-[.AA54])^2/[.AA54]" table:style-name="ce1">
            <text:p>#ADR!</text:p>
          </table:table-cell>
          <table:table-cell office:value-type="error" office:string-value="#REF!" table:formula="of:=([.#REF!]-[.AB54])^2/[.AB54]" table:style-name="ce1">
            <text:p>#ADR!</text:p>
          </table:table-cell>
          <table:table-cell office:value-type="error" office:string-value="#REF!" table:formula="of:=SUM([.Y91:.AB91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CHOP</text:p>
          </table:table-cell>
          <table:table-cell office:value-type="error" office:string-value="#REF!" table:formula="of:=([.#REF!]-[.Y55])^2/[.Y55]" table:style-name="ce1">
            <text:p>#ADR!</text:p>
          </table:table-cell>
          <table:table-cell office:value-type="error" office:string-value="#REF!" table:formula="of:=([.#REF!]-[.Z55])^2/[.Z55]" table:style-name="ce1">
            <text:p>#ADR!</text:p>
          </table:table-cell>
          <table:table-cell office:value-type="error" office:string-value="#REF!" table:formula="of:=([.#REF!]-[.AA55])^2/[.AA55]" table:style-name="ce1">
            <text:p>#ADR!</text:p>
          </table:table-cell>
          <table:table-cell office:value-type="error" office:string-value="#REF!" table:formula="of:=([.#REF!]-[.AB55])^2/[.AB55]" table:style-name="ce1">
            <text:p>#ADR!</text:p>
          </table:table-cell>
          <table:table-cell office:value-type="error" office:string-value="#REF!" table:formula="of:=SUM([.Y92:.AB92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RDAPOCH</text:p>
          </table:table-cell>
          <table:table-cell office:value-type="error" office:string-value="#REF!" table:formula="of:=([.#REF!]-[.Y56])^2/[.Y56]" table:style-name="ce1">
            <text:p>#ADR!</text:p>
          </table:table-cell>
          <table:table-cell office:value-type="error" office:string-value="#REF!" table:formula="of:=([.#REF!]-[.Z56])^2/[.Z56]" table:style-name="ce1">
            <text:p>#ADR!</text:p>
          </table:table-cell>
          <table:table-cell office:value-type="error" office:string-value="#REF!" table:formula="of:=([.#REF!]-[.AA56])^2/[.AA56]" table:style-name="ce1">
            <text:p>#ADR!</text:p>
          </table:table-cell>
          <table:table-cell office:value-type="error" office:string-value="#REF!" table:formula="of:=([.#REF!]-[.AB56])^2/[.AB56]" table:style-name="ce1">
            <text:p>#ADR!</text:p>
          </table:table-cell>
          <table:table-cell office:value-type="error" office:string-value="#REF!" table:formula="of:=SUM([.Y93:.AB93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RCVP</text:p>
          </table:table-cell>
          <table:table-cell office:value-type="error" office:string-value="#REF!" table:formula="of:=([.#REF!]-[.Y57])^2/[.Y57]" table:style-name="ce1">
            <text:p>#ADR!</text:p>
          </table:table-cell>
          <table:table-cell office:value-type="error" office:string-value="#REF!" table:formula="of:=([.#REF!]-[.Z57])^2/[.Z57]" table:style-name="ce1">
            <text:p>#ADR!</text:p>
          </table:table-cell>
          <table:table-cell office:value-type="error" office:string-value="#REF!" table:formula="of:=([.#REF!]-[.AA57])^2/[.AA57]" table:style-name="ce1">
            <text:p>#ADR!</text:p>
          </table:table-cell>
          <table:table-cell office:value-type="error" office:string-value="#REF!" table:formula="of:=([.#REF!]-[.AB57])^2/[.AB57]" table:style-name="ce1">
            <text:p>#ADR!</text:p>
          </table:table-cell>
          <table:table-cell office:value-type="error" office:string-value="#REF!" table:formula="of:=SUM([.Y94:.AB94])" table:style-name="ce1">
            <text:p>#ADR!</text:p>
          </table:table-cell>
          <table:table-cell table:number-columns-repeated="16355"/>
        </table:table-row>
        <table:table-row table:style-name="ro1">
          <table:table-cell table:number-columns-repeated="23"/>
          <table:table-cell office:value-type="string" table:style-name="ce1">
            <text:p>suma</text:p>
          </table:table-cell>
          <table:table-cell office:value-type="error" office:string-value="#REF!" table:formula="of:=SUM([.Y82:.Y94])" table:style-name="ce1">
            <text:p>#ADR!</text:p>
          </table:table-cell>
          <table:table-cell office:value-type="error" office:string-value="#REF!" table:formula="of:=SUM([.Z82:.Z94])" table:style-name="ce1">
            <text:p>#ADR!</text:p>
          </table:table-cell>
          <table:table-cell office:value-type="error" office:string-value="#REF!" table:formula="of:=SUM([.AA82:.AA94])" table:style-name="ce1">
            <text:p>#ADR!</text:p>
          </table:table-cell>
          <table:table-cell office:value-type="error" office:string-value="#REF!" table:formula="of:=SUM([.AB82:.AB94])" table:style-name="ce1">
            <text:p>#ADR!</text:p>
          </table:table-cell>
          <table:table-cell office:value-type="error" office:string-value="#REF!" table:formula="of:=SUM([.AC82:.AC94])" table:style-name="ce1">
            <text:p>#ADR!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3"/>
          <table:table-cell office:value-type="string" table:style-name="ce1">
            <text:p>SS</text:p>
          </table:table-cell>
          <table:table-cell office:value-type="float" office:value="36" table:formula="of:=3*12" table:style-name="ce1">
            <text:p>36</text:p>
          </table:table-cell>
          <table:table-cell table:number-columns-repeated="16359" table:style-name="ce1"/>
        </table:table-row>
        <table:table-row table:style-name="ro2">
          <table:table-cell table:number-columns-repeated="23"/>
          <table:table-cell office:value-type="string" table:style-name="ce1">
            <text:p>WARTORS TABLICOWA</text:p>
          </table:table-cell>
          <table:table-cell table:style-name="ce1"/>
          <table:table-cell office:value-type="string" table:style-name="ce47">
            <text:p>50.9985</text:p>
          </table:table-cell>
          <table:table-cell table:number-columns-repeated="16358"/>
        </table:table-row>
        <table:table-row table:number-rows-repeated="1048477" table:style-name="ro1">
          <table:table-cell table:number-columns-repeated="16384"/>
        </table:table-row>
      </table:table>
      <table:table table:name="Arkusz2" table:style-name="ta1">
        <table:table-column table:style-name="co29" table:default-cell-style-name="ce1"/>
        <table:table-column table:style-name="co24" table:default-cell-style-name="ce1"/>
        <table:table-column table:style-name="co30" table:default-cell-style-name="ce1"/>
        <table:table-column table:style-name="co19" table:default-cell-style-name="ce1"/>
        <table:table-column table:style-name="co31" table:default-cell-style-name="ce1"/>
        <table:table-column table:style-name="co32" table:default-cell-style-name="ce1"/>
        <table:table-column table:style-name="co19" table:number-columns-repeated="3" table:default-cell-style-name="ce1"/>
        <table:table-column table:style-name="co33" table:default-cell-style-name="ce1"/>
        <table:table-column table:style-name="co19" table:number-columns-repeated="16374" table:default-cell-style-name="ce1"/>
        <table:table-row table:style-name="ro2">
          <table:table-cell table:style-name="ce48"/>
          <table:table-cell office:value-type="string" table:style-name="ce1">
            <text:p>hl</text:p>
          </table:table-cell>
          <table:table-cell office:value-type="string" table:style-name="ce48">
            <text:p>PŁEĆ</text:p>
          </table:table-cell>
          <table:table-cell office:value-type="string" table:style-name="ce1">
            <text:p>wiek</text:p>
          </table:table-cell>
          <table:table-cell office:value-type="string" table:style-name="ce1">
            <text:p>odpowiedz</text:p>
          </table:table-cell>
          <table:table-cell table:number-columns-repeated="3" table:style-name="ce1"/>
          <table:table-cell office:value-type="string" table:style-name="ce1">
            <text:p>nhl</text:p>
          </table:table-cell>
          <table:table-cell office:value-type="string" table:style-name="ce48">
            <text:p>PŁEĆ, WIEK</text:p>
          </table:table-cell>
          <table:table-cell table:number-columns-repeated="16374" table:style-name="ce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56" table:style-name="ce49">
            <text:p>56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22" table:style-name="ce49">
            <text:p>22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wznow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34" table:style-name="ce49">
            <text:p>34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progresj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progresj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Kobieta</text:p>
          </table:table-cell>
          <table:table-cell office:value-type="float" office:value="45" table:style-name="ce49">
            <text:p>45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wznow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Kobieta</text:p>
          </table:table-cell>
          <table:table-cell office:value-type="float" office:value="20" table:style-name="ce49">
            <text:p>20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50"/>
          <table:table-cell table:style-name="ce1"/>
          <table:table-cell office:value-type="string" table:style-name="ce50">
            <text:p>Kobieta</text:p>
          </table:table-cell>
          <table:table-cell office:value-type="float" office:value="26" table:style-name="ce49">
            <text:p>26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50"/>
          <table:table-cell table:style-name="ce1"/>
          <table:table-cell office:value-type="string" table:style-name="ce50">
            <text:p>Mężczyzna</text:p>
          </table:table-cell>
          <table:table-cell office:value-type="float" office:value="19" table:style-name="ce49">
            <text:p>19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style-name="ce1">
            <draw:frame draw:z-index="2" draw:id="id3" draw:style-name="a3" draw:name="Wykres 3" svg:x="0.56667in" svg:y="0.15833in" svg:width="4.99444in" svg:height="2.9166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Kobiet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style-name="ce50"/>
          <table:table-cell table:style-name="ce1"/>
          <table:table-cell office:value-type="string" table:style-name="ce50">
            <text:p>Kobiet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style-name="ce50"/>
          <table:table-cell table:style-name="ce1"/>
          <table:table-cell office:value-type="string" table:style-name="ce50">
            <text:p>Mężczyzna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bardzo 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wznow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wznow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Kobiet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ogresja</text:p>
          </table:table-cell>
          <table:table-cell office:value-type="string" table:style-name="ce1">
            <text:p>częściow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bardzo 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wznow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progresj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bardzo 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1"/>
          <table:table-cell office:value-type="string" table:style-name="ce50">
            <text:p>Mężczyzn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style-name="ce50"/>
          <table:table-cell table:style-name="ce1"/>
          <table:table-cell office:value-type="string" table:style-name="ce50">
            <text:p>Mężczyzn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bardzo 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50">
            <text:p>Kobiet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50">
            <text:p>Kobiet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bardzo 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bardzo dobra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50">
            <text:p>Kobiet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bardzo dobra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50">
            <text:p>Mężczyzna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wznow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bardzo dobra</text:p>
          </table:table-cell>
          <table:table-cell table:style-name="ce1">
            <draw:frame draw:z-index="1" draw:id="id2" draw:style-name="a2" draw:name="Wykres 2" svg:x="0.25833in" svg:y="0.11667in" svg:width="5in" svg:height="2.916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50">
            <text:p>Mężczyzn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zęściow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50">
            <text:p>Mężczyzn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wznowa</text:p>
          </table:table-cell>
          <table:table-cell table:number-columns-repeated="3" table:style-name="ce1"/>
          <table:table-cell office:value-type="string" table:style-name="ce50">
            <text:p>Kobiet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bardzo dobra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50">
            <text:p>Kobiet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3" table:style-name="ce1"/>
          <table:table-cell office:value-type="string" table:style-name="ce50">
            <text:p>Mężczyzna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number-columns-repeated="9" table:style-name="ce1"/>
          <table:table-cell office:value-type="string" table:style-name="ce50">
            <text:p>Kobiet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bardzo dobra</text:p>
          </table:table-cell>
          <table:table-cell table:number-columns-repeated="16371"/>
        </table:table-row>
        <table:table-row table:style-name="ro1">
          <table:table-cell office:value-type="float" office:value="2" table:formula="of:=COUNTIFS([.$E$2:.$E$26];&quot;=bardzo dobra&quot;;[.$D$2:.$D$26];&quot;&gt;15&quot;;[.$D$2:.$D$26];&quot;&lt;=30&quot;)" table:style-name="ce1">
            <text:p>2</text:p>
          </table:table-cell>
          <table:table-cell office:value-type="float" office:value="0" table:formula="of:=COUNTIFS([.$E$2:.$E$26];&quot;= dobra&quot;;[.$D$2:.$D$26];&quot;&gt;15&quot;;[.$D$2:.$D$26];&quot;&lt;=30&quot;)" table:style-name="ce1">
            <text:p>0</text:p>
          </table:table-cell>
          <table:table-cell office:value-type="float" office:value="4" table:formula="of:=COUNTIFS([.$E$2:.$E$26];&quot;=częściowa&quot;;[.$D$2:.$D$26];&quot;&gt;15&quot;;[.$D$2:.$D$26];&quot;&lt;=30&quot;)" table:style-name="ce1">
            <text:p>4</text:p>
          </table:table-cell>
          <table:table-cell office:value-type="float" office:value="1" table:formula="of:=COUNTIFS([.$E$2:.$E$26];&quot;=progresja&quot;;[.$D$2:.$D$26];&quot;&gt;15&quot;;[.$D$2:.$D$26];&quot;&lt;=30&quot;)" table:style-name="ce1">
            <text:p>1</text:p>
          </table:table-cell>
          <table:table-cell table:number-columns-repeated="5" table:style-name="ce1"/>
          <table:table-cell office:value-type="string" table:style-name="ce50">
            <text:p>Mężczyzna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progresja</text:p>
          </table:table-cell>
          <table:table-cell table:number-columns-repeated="16371"/>
        </table:table-row>
        <table:table-row table:style-name="ro1">
          <table:table-cell table:number-columns-repeated="9" table:style-name="ce1"/>
          <table:table-cell office:value-type="string" table:style-name="ce50">
            <text:p>Mężczyzn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wznowa</text:p>
          </table:table-cell>
          <table:table-cell table:number-columns-repeated="16371"/>
        </table:table-row>
        <table:table-row table:style-name="ro1">
          <table:table-cell table:number-columns-repeated="9" table:style-name="ce1"/>
          <table:table-cell office:value-type="string" table:style-name="ce50">
            <text:p>Mężczyzna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number-columns-repeated="9" table:style-name="ce1"/>
          <table:table-cell office:value-type="string" table:style-name="ce50">
            <text:p>Kobiet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bardzo dobra</text:p>
          </table:table-cell>
          <table:table-cell office:value-type="string" table:style-name="ce1">
            <text:p>dobra</text:p>
          </table:table-cell>
          <table:table-cell table:number-columns-repeated="16371"/>
        </table:table-row>
        <table:table-row table:style-name="ro1">
          <table:table-cell table:number-columns-repeated="9" table:style-name="ce1"/>
          <table:table-cell office:value-type="string" table:style-name="ce50">
            <text:p>Mężczyzn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obra</text:p>
          </table:table-cell>
          <table:table-cell office:value-type="string" table:style-name="ce1">
            <text:p>wznowa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L</text:p>
          </table:table-cell>
          <table:table-cell table:style-name="ce1"/>
          <table:table-cell office:value-type="string" table:style-name="ce1">
            <text:p>NH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w trakcie leczenia</text:p>
          </table:table-cell>
          <table:table-cell office:value-type="string" table:style-name="ce1">
            <text:p>po zakończeniu leczenia</text:p>
          </table:table-cell>
          <table:table-cell office:value-type="string" table:style-name="ce1">
            <text:p>w trakcie leczenia</text:p>
          </table:table-cell>
          <table:table-cell office:value-type="string" table:style-name="ce1">
            <text:p>Po zakończeniu lecze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dzo dobra</text:p>
          </table:table-cell>
          <table:table-cell office:value-type="float" office:value="5" table:formula="of:=COUNTIF([.$E$2:.$E$26];&quot;=bardzo dobra&quot;)" table:style-name="ce1">
            <text:p>5</text:p>
          </table:table-cell>
          <table:table-cell office:value-type="float" office:value="5" table:formula="of:=COUNTIF([.$F$2:.$F$26];&quot;=bardzo dobra&quot;)" table:style-name="ce1">
            <text:p>5</text:p>
          </table:table-cell>
          <table:table-cell office:value-type="float" office:value="7" table:formula="of:=COUNTIF([.$L$2:.$L$32];&quot;=bardzo dobra&quot;)" table:style-name="ce1">
            <text:p>7</text:p>
          </table:table-cell>
          <table:table-cell office:value-type="float" office:value="5" table:formula="of:=COUNTIF([.$M$2:.$M$32];&quot;=bardzo dobra&quot;)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bra</text:p>
          </table:table-cell>
          <table:table-cell office:value-type="float" office:value="11" table:formula="of:=COUNTIF([.$E$2:.$E$26];&quot;=dobra&quot;)" table:style-name="ce1">
            <text:p>11</text:p>
          </table:table-cell>
          <table:table-cell office:value-type="float" office:value="13" table:formula="of:=COUNTIF([.$F$2:.$F$26];&quot;=dobra&quot;)" table:style-name="ce1">
            <text:p>13</text:p>
          </table:table-cell>
          <table:table-cell office:value-type="float" office:value="17" table:formula="of:=COUNTIF([.$L$2:.$L$32];&quot;=dobra&quot;)" table:style-name="ce1">
            <text:p>17</text:p>
          </table:table-cell>
          <table:table-cell office:value-type="float" office:value="20" table:formula="of:=COUNTIF([.$M$2:.$M$32];&quot;=dobra&quot;)" table:style-name="ce1">
            <text:p>20</text:p>
          </table:table-cell>
          <table:table-cell table:number-columns-repeated="4"/>
          <table:table-cell table:style-name="ce1">
            <draw:frame draw:z-index="5" draw:id="id6" draw:style-name="a6" draw:name="Wykres 14" svg:x="0.02604in" svg:y="0.15625in" svg:width="5.00347in" svg:height="2.9479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czesciowa</text:p>
          </table:table-cell>
          <table:table-cell office:value-type="float" office:value="7" table:formula="of:=COUNTIF([.$E$2:.$E$26];&quot;=częściowa&quot;)" table:style-name="ce1">
            <text:p>7</text:p>
          </table:table-cell>
          <table:table-cell office:value-type="float" office:value="1" table:formula="of:=COUNTIF([.$F$2:.$F$26];&quot;=częściowa&quot;)" table:style-name="ce1">
            <text:p>1</text:p>
          </table:table-cell>
          <table:table-cell office:value-type="float" office:value="6" table:formula="of:=COUNTIF([.$L$2:.$L$32];&quot;=częściowa&quot;)" table:style-name="ce1">
            <text:p>6</text:p>
          </table:table-cell>
          <table:table-cell office:value-type="float" office:value="0" table:formula="of:=COUNTIF([.$M$2:.$M$32];&quot;=częściowa&quot;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grasja</text:p>
          </table:table-cell>
          <table:table-cell office:value-type="float" office:value="1" table:formula="of:=COUNTIF([.$E$2:.$E$26];&quot;=progresja&quot;)" table:style-name="ce1">
            <text:p>1</text:p>
          </table:table-cell>
          <table:table-cell office:value-type="float" office:value="1" table:formula="of:=COUNTIF([.$F$2:.$F$26];&quot;=progresja&quot;)" table:style-name="ce1">
            <text:p>1</text:p>
          </table:table-cell>
          <table:table-cell office:value-type="float" office:value="1" table:formula="of:=COUNTIF([.$L$2:.$L$32];&quot;=progresja&quot;)" table:style-name="ce1">
            <text:p>1</text:p>
          </table:table-cell>
          <table:table-cell office:value-type="float" office:value="2" table:formula="of:=COUNTIF([.$M$2:.$M$32];&quot;=progresja&quot;)" table:style-name="ce1">
            <text:p>2</text:p>
          </table:table-cell>
          <table:table-cell table:number-columns-repeated="23"/>
          <table:table-cell table:style-name="ce1">
            <draw:frame draw:z-index="4" draw:id="id5" draw:style-name="a5" draw:name="Wykres 11" svg:x="0.28333in" svg:y="0.17708in" svg:width="4.69583in" svg:height="3.556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55"/>
        </table:table-row>
        <table:table-row table:style-name="ro1">
          <table:table-cell office:value-type="string" table:style-name="ce1">
            <text:p>wznowa</text:p>
          </table:table-cell>
          <table:table-cell office:value-type="float" office:value="0" table:formula="of:=COUNTIF([.$E$2:.$E$26];&quot;=wznowa&quot;)" table:style-name="ce1">
            <text:p>0</text:p>
          </table:table-cell>
          <table:table-cell office:value-type="float" office:value="5" table:formula="of:=COUNTIF([.$F$2:.$F$26];&quot;=wznowa&quot;)" table:style-name="ce1">
            <text:p>5</text:p>
          </table:table-cell>
          <table:table-cell office:value-type="float" office:value="0" table:formula="of:=COUNTIF([.$L$2:.$L$32];&quot;=wznowa&quot;)" table:style-name="ce1">
            <text:p>0</text:p>
          </table:table-cell>
          <table:table-cell office:value-type="float" office:value="4" table:formula="of:=COUNTIF([.$M$2:.$M$32];&quot;=wznowa&quot;)" table:style-name="ce1">
            <text:p>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4" table:formula="of:=SUM([.B36:.B40])" table:style-name="ce1">
            <text:p>24</text:p>
          </table:table-cell>
          <table:table-cell office:value-type="float" office:value="25" table:formula="of:=SUM([.C36:.C40])" table:style-name="ce1">
            <text:p>25</text:p>
          </table:table-cell>
          <table:table-cell office:value-type="float" office:value="31" table:formula="of:=SUM([.D36:.D40])" table:style-name="ce1">
            <text:p>31</text:p>
          </table:table-cell>
          <table:table-cell office:value-type="float" office:value="31" table:formula="of:=SUM([.E36:.E40])" table:style-name="ce1">
            <text:p>3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1">
            <text:p>zależność od płci</text:p>
          </table:table-cell>
          <table:table-cell table:number-columns-repeated="4" table:style-name="ce51"/>
          <table:table-cell table:number-columns-repeated="16379"/>
        </table:table-row>
        <table:table-row table:style-name="ro1">
          <table:table-cell table:style-name="ce51"/>
          <table:table-cell office:value-type="string" table:style-name="ce51">
            <text:p>hl</text:p>
          </table:table-cell>
          <table:table-cell table:style-name="ce51"/>
          <table:table-cell office:value-type="string" table:style-name="ce51">
            <text:p>hl</text:p>
          </table:table-cell>
          <table:table-cell table:style-name="ce51"/>
          <table:table-cell table:number-columns-repeated="16379"/>
        </table:table-row>
        <table:table-row table:style-name="ro1">
          <table:table-cell table:style-name="ce51"/>
          <table:table-cell office:value-type="string" table:style-name="ce51">
            <text:p>w trakcie leczenia</text:p>
          </table:table-cell>
          <table:table-cell table:style-name="ce51"/>
          <table:table-cell office:value-type="string" table:style-name="ce51">
            <text:p>po leczeniu</text:p>
          </table:table-cell>
          <table:table-cell table:style-name="ce51"/>
          <table:table-cell table:number-columns-repeated="16379"/>
        </table:table-row>
        <table:table-row table:style-name="ro1">
          <table:table-cell table:style-name="ce51"/>
          <table:table-cell office:value-type="string" table:style-name="ce51">
            <text:p>kobieta</text:p>
          </table:table-cell>
          <table:table-cell office:value-type="string" table:style-name="ce51">
            <text:p>mężczyzna</text:p>
          </table:table-cell>
          <table:table-cell office:value-type="string" table:style-name="ce51">
            <text:p>kobieta</text:p>
          </table:table-cell>
          <table:table-cell office:value-type="string" table:style-name="ce51">
            <text:p>mężczyzna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bardzo dobra</text:p>
          </table:table-cell>
          <table:table-cell office:value-type="float" office:value="1" table:formula="of:=COUNTIFS([.$E$2:.$E$26];&quot;=bardzo dobra&quot;;[.$C$2:.$C$26];&quot;=Kobieta&quot;)" table:style-name="ce51">
            <text:p>1</text:p>
          </table:table-cell>
          <table:table-cell office:value-type="float" office:value="4" table:formula="of:=COUNTIFS([.$E$2:.$E$26];&quot;=bardzo dobra&quot;;[.$C$2:.$C$26];&quot;=Mężczyzna&quot;)" table:style-name="ce51">
            <text:p>4</text:p>
          </table:table-cell>
          <table:table-cell office:value-type="float" office:value="1" table:formula="of:=COUNTIFS([.$F$2:.$F$26];&quot;=bardzo dobra&quot;;[.$C$2:.$C$26];&quot;=Kobieta&quot;)" table:style-name="ce51">
            <text:p>1</text:p>
          </table:table-cell>
          <table:table-cell office:value-type="float" office:value="4" table:formula="of:=COUNTIFS([.$F$2:.$F$26];&quot;=bardzo dobra&quot;;[.$C$2:.$C$26];&quot;=Mężczyzna&quot;)" table:style-name="ce5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dobra</text:p>
          </table:table-cell>
          <table:table-cell office:value-type="float" office:value="3" table:formula="of:=COUNTIFS([.$E$2:.$E$26];&quot;=dobra&quot;;[.$C$2:.$C$26];&quot;=Kobieta&quot;)" table:style-name="ce51">
            <text:p>3</text:p>
          </table:table-cell>
          <table:table-cell office:value-type="float" office:value="8" table:formula="of:=COUNTIFS([.$E$2:.$E$26];&quot;=dobra&quot;;[.$C$2:.$C$26];&quot;=Mężczyzna&quot;)" table:style-name="ce51">
            <text:p>8</text:p>
          </table:table-cell>
          <table:table-cell office:value-type="float" office:value="8" table:formula="of:=COUNTIFS([.$F$2:.$F$26];&quot;=dobra&quot;;[.$C$2:.$C$26];&quot;=Kobieta&quot;)" table:style-name="ce51">
            <text:p>8</text:p>
          </table:table-cell>
          <table:table-cell office:value-type="float" office:value="5" table:formula="of:=COUNTIFS([.$F$2:.$F$26];&quot;=dobra&quot;;[.$C$2:.$C$26];&quot;=Mężczyzna&quot;)" table:style-name="ce5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częściowa</text:p>
          </table:table-cell>
          <table:table-cell office:value-type="float" office:value="5" table:formula="of:=COUNTIFS([.$E$2:.$E$26];&quot;=częściowa&quot;;[.$C$2:.$C$26];&quot;=Kobieta&quot;)" table:style-name="ce51">
            <text:p>5</text:p>
          </table:table-cell>
          <table:table-cell office:value-type="float" office:value="2" table:formula="of:=COUNTIFS([.$E$2:.$E$26];&quot;=częściowa&quot;;[.$C$2:.$C$26];&quot;=Mężczyzna&quot;)" table:style-name="ce51">
            <text:p>2</text:p>
          </table:table-cell>
          <table:table-cell office:value-type="float" office:value="1" table:formula="of:=COUNTIFS([.$F$2:.$F$26];&quot;=częściowa&quot;;[.$C$2:.$C$26];&quot;=Kobieta&quot;)" table:style-name="ce51">
            <text:p>1</text:p>
          </table:table-cell>
          <table:table-cell office:value-type="float" office:value="0" table:formula="of:=COUNTIFS([.$F$2:.$F$26];&quot;=częściowa&quot;;[.$C$2:.$C$26];&quot;=Mężczyzna&quot;)" table:style-name="ce5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prograsja</text:p>
          </table:table-cell>
          <table:table-cell office:value-type="float" office:value="1" table:formula="of:=COUNTIFS([.$E$2:.$E$26];&quot;=progresja&quot;;[.$C$2:.$C$26];&quot;=Kobieta&quot;)" table:style-name="ce51">
            <text:p>1</text:p>
          </table:table-cell>
          <table:table-cell office:value-type="float" office:value="0" table:formula="of:=COUNTIFS([.$E$2:.$E$26];&quot;=progresja&quot;;[.$C$2:.$C$26];&quot;=Mężczyzna&quot;)" table:style-name="ce51">
            <text:p>0</text:p>
          </table:table-cell>
          <table:table-cell office:value-type="float" office:value="0" table:formula="of:=COUNTIFS([.$F$2:.$F$26];&quot;=progresja&quot;;[.$C$2:.$C$26];&quot;=Kobieta&quot;)" table:style-name="ce51">
            <text:p>0</text:p>
          </table:table-cell>
          <table:table-cell office:value-type="float" office:value="1" table:formula="of:=COUNTIFS([.$F$2:.$F$26];&quot;=progresja&quot;;[.$C$2:.$C$26];&quot;=Mężczyzna&quot;)" table:style-name="ce5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wznowa</text:p>
          </table:table-cell>
          <table:table-cell office:value-type="float" office:value="0" table:formula="of:=COUNTIFS([.$E$2:.$E$26];&quot;=wznowa&quot;;[.$C$2:.$C$26];&quot;=Kobieta&quot;)" table:style-name="ce51">
            <text:p>0</text:p>
          </table:table-cell>
          <table:table-cell office:value-type="float" office:value="0" table:formula="of:=COUNTIFS([.$E$2:.$E$26];&quot;=wznowa&quot;;[.$C$2:.$C$26];&quot;=Mężczyzna&quot;)" table:style-name="ce51">
            <text:p>0</text:p>
          </table:table-cell>
          <table:table-cell office:value-type="float" office:value="0" table:formula="of:=COUNTIFS([.$F$2:.$F$26];&quot;=wznowa&quot;;[.$C$2:.$C$26];&quot;=Kobieta&quot;)" table:style-name="ce51">
            <text:p>0</text:p>
          </table:table-cell>
          <table:table-cell office:value-type="float" office:value="5" table:formula="of:=COUNTIFS([.$F$2:.$F$26];&quot;=wznowa&quot;;[.$C$2:.$C$26];&quot;=Mężczyzna&quot;)" table:style-name="ce5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suma</text:p>
          </table:table-cell>
          <table:table-cell office:value-type="float" office:value="10" table:formula="of:=SUM([.B47:.B51])" table:style-name="ce51">
            <text:p>10</text:p>
          </table:table-cell>
          <table:table-cell office:value-type="float" office:value="14" table:formula="of:=SUM([.C47:.C51])" table:style-name="ce51">
            <text:p>14</text:p>
          </table:table-cell>
          <table:table-cell office:value-type="float" office:value="10" table:formula="of:=SUM([.D47:.D51])" table:style-name="ce51">
            <text:p>10</text:p>
          </table:table-cell>
          <table:table-cell office:value-type="float" office:value="15" table:formula="of:=SUM([.E47:.E51])" table:style-name="ce51">
            <text:p>1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2">
            <text:p>zależność od wieku</text:p>
          </table:table-cell>
          <table:table-cell office:value-type="string" table:style-name="ce52">
            <text:p>hl w trakcie</text:p>
          </table:table-cell>
          <table:table-cell table:number-columns-repeated="7" table:style-name="ce52"/>
          <table:table-cell office:value-type="string" table:style-name="ce52">
            <text:p>hl po</text:p>
          </table:table-cell>
          <table:table-cell table:number-columns-repeated="7" table:style-name="ce52"/>
          <table:table-cell table:number-columns-repeated="16367" table:style-name="ce1"/>
        </table:table-row>
        <table:table-row table:style-name="ro1">
          <table:table-cell table:style-name="ce52"/>
          <table:table-cell office:value-type="string" table:style-name="ce52">
            <text:p>&lt;21</text:p>
          </table:table-cell>
          <table:table-cell office:value-type="string" table:style-name="ce52">
            <text:p>21-30</text:p>
          </table:table-cell>
          <table:table-cell office:value-type="string" table:style-name="ce52">
            <text:p>31-40</text:p>
          </table:table-cell>
          <table:table-cell office:value-type="string" table:style-name="ce52">
            <text:p>41-50</text:p>
          </table:table-cell>
          <table:table-cell office:value-type="string" table:style-name="ce52">
            <text:p>51-60</text:p>
          </table:table-cell>
          <table:table-cell office:value-type="string" table:style-name="ce52">
            <text:p>61-70</text:p>
          </table:table-cell>
          <table:table-cell office:value-type="string" table:style-name="ce52">
            <text:p>71-80</text:p>
          </table:table-cell>
          <table:table-cell office:value-type="string" table:style-name="ce52">
            <text:p>&gt;80</text:p>
          </table:table-cell>
          <table:table-cell office:value-type="string" table:style-name="ce52">
            <text:p>&lt;21</text:p>
          </table:table-cell>
          <table:table-cell office:value-type="string" table:style-name="ce52">
            <text:p>21-30</text:p>
          </table:table-cell>
          <table:table-cell office:value-type="string" table:style-name="ce52">
            <text:p>31-40</text:p>
          </table:table-cell>
          <table:table-cell office:value-type="string" table:style-name="ce52">
            <text:p>41-50</text:p>
          </table:table-cell>
          <table:table-cell office:value-type="string" table:style-name="ce52">
            <text:p>51-60</text:p>
          </table:table-cell>
          <table:table-cell office:value-type="string" table:style-name="ce52">
            <text:p>61-70</text:p>
          </table:table-cell>
          <table:table-cell office:value-type="string" table:style-name="ce52">
            <text:p>71-80</text:p>
          </table:table-cell>
          <table:table-cell office:value-type="string" table:style-name="ce52">
            <text:p>&gt;80</text:p>
          </table:table-cell>
          <table:table-cell table:style-name="ce1"/>
          <table:table-cell table:style-name="ce1">
            <draw:frame draw:z-index="8" draw:id="id9" draw:style-name="a9" draw:name="Wykres 9" svg:x="0.53542in" svg:y="0.01458in" svg:width="8.94167in" svg:height="4.07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string" table:style-name="ce52">
            <text:p>bardzo dobra</text:p>
          </table:table-cell>
          <table:table-cell office:value-type="float" office:value="0" table:formula="of:=COUNTIFS([.$E$2:.$E$26];&quot;=bardzo dobra&quot;;[.$D$2:.$D$26];&quot;&lt;=20&quot;)" table:style-name="ce52">
            <text:p>0</text:p>
          </table:table-cell>
          <table:table-cell office:value-type="float" office:value="2" table:formula="of:=COUNTIFS([.$E$2:.$E$26];&quot;=bardzo dobra&quot;;[.$D$2:.$D$26];&quot;&gt;20&quot;;[.$D$2:.$D$26];&quot;&lt;=30&quot;)" table:style-name="ce52">
            <text:p>2</text:p>
          </table:table-cell>
          <table:table-cell office:value-type="float" office:value="0" table:formula="of:=COUNTIFS([.$E$2:.$E$26];&quot;=bardzo dobra&quot;;[.$D$2:.$D$26];&quot;&gt;30&quot;;[.$D$2:.$D$26];&quot;&lt;=40&quot;)" table:style-name="ce52">
            <text:p>0</text:p>
          </table:table-cell>
          <table:table-cell office:value-type="float" office:value="1" table:formula="of:=COUNTIFS([.$E$2:.$E$26];&quot;=bardzo dobra&quot;;[.$D$2:.$D$26];&quot;&gt;40&quot;;[.$D$2:.$D$26];&quot;&lt;=50&quot;)" table:style-name="ce52">
            <text:p>1</text:p>
          </table:table-cell>
          <table:table-cell office:value-type="float" office:value="1" table:formula="of:=COUNTIFS([.$E$2:.$E$26];&quot;=bardzo dobra&quot;;[.$D$2:.$D$26];&quot;&gt;50&quot;;[.$D$2:.$D$26];&quot;&lt;=60&quot;)" table:style-name="ce52">
            <text:p>1</text:p>
          </table:table-cell>
          <table:table-cell office:value-type="float" office:value="1" table:formula="of:=COUNTIFS([.$E$2:.$E$26];&quot;=bardzo dobra&quot;;[.$D$2:.$D$26];&quot;&gt;60&quot;;[.$D$2:.$D$26];&quot;&lt;=70&quot;)" table:style-name="ce52">
            <text:p>1</text:p>
          </table:table-cell>
          <table:table-cell office:value-type="float" office:value="0" table:formula="of:=COUNTIFS([.$E$2:.$E$26];&quot;=bardzo dobra&quot;;[.$D$2:.$D$26];&quot;&gt;70&quot;;[.$D$2:.$D$26];&quot;&lt;=80&quot;)" table:style-name="ce52">
            <text:p>0</text:p>
          </table:table-cell>
          <table:table-cell office:value-type="float" office:value="0" table:formula="of:=COUNTIFS([.$E$2:.$E$26];&quot;=bardzo dobra&quot;;[.$D$2:.$D$26];&quot;&gt;80&quot;)" table:style-name="ce52">
            <text:p>0</text:p>
          </table:table-cell>
          <table:table-cell office:value-type="float" office:value="0" table:formula="of:=COUNTIFS([.$F$2:.$F$26];&quot;=bardzo dobra&quot;;[.$D$2:.$D$26];&quot;&lt;=20&quot;)" table:style-name="ce52">
            <text:p>0</text:p>
          </table:table-cell>
          <table:table-cell office:value-type="float" office:value="3" table:formula="of:=COUNTIFS([.$F$2:.$F$26];&quot;=bardzo dobra&quot;;[.$D$2:.$D$26];&quot;&gt;20&quot;;[.$D$2:.$D$26];&quot;&lt;=30&quot;)" table:style-name="ce52">
            <text:p>3</text:p>
          </table:table-cell>
          <table:table-cell office:value-type="float" office:value="0" table:formula="of:=COUNTIFS([.$F$2:.$F$26];&quot;=bardzo dobra&quot;;[.$D$2:.$D$26];&quot;&gt;30&quot;;[.$D$2:.$D$26];&quot;&lt;=40&quot;)" table:style-name="ce52">
            <text:p>0</text:p>
          </table:table-cell>
          <table:table-cell office:value-type="float" office:value="1" table:formula="of:=COUNTIFS([.$F$2:.$F$26];&quot;=bardzo dobra&quot;;[.$D$2:.$D$26];&quot;&gt;40&quot;;[.$D$2:.$D$26];&quot;&lt;=50&quot;)" table:style-name="ce52">
            <text:p>1</text:p>
          </table:table-cell>
          <table:table-cell office:value-type="float" office:value="1" table:formula="of:=COUNTIFS([.$F$2:.$F$26];&quot;=bardzo dobra&quot;;[.$D$2:.$D$26];&quot;&gt;50&quot;;[.$D$2:.$D$26];&quot;&lt;=60&quot;)" table:style-name="ce52">
            <text:p>1</text:p>
          </table:table-cell>
          <table:table-cell office:value-type="float" office:value="0" table:formula="of:=COUNTIFS([.$F$2:.$F$26];&quot;=bardzo dobra&quot;;[.$D$2:.$D$26];&quot;&gt;60&quot;;[.$D$2:.$D$26];&quot;&lt;=70&quot;)" table:style-name="ce52">
            <text:p>0</text:p>
          </table:table-cell>
          <table:table-cell office:value-type="float" office:value="0" table:formula="of:=COUNTIFS([.$F$2:.$F$26];&quot;=bardzo dobra&quot;;[.$D$2:.$D$26];&quot;&gt;70&quot;;[.$D$2:.$D$26];&quot;&lt;=80&quot;)" table:style-name="ce52">
            <text:p>0</text:p>
          </table:table-cell>
          <table:table-cell office:value-type="float" office:value="0" table:formula="of:=COUNTIFS([.$F$2:.$F$26];&quot;=bardzo dobra&quot;;[.$D$2:.$D$26];&quot;&gt;80&quot;)" table:style-name="ce52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2">
            <text:p>dobra</text:p>
          </table:table-cell>
          <table:table-cell office:value-type="float" office:value="0" table:formula="of:=COUNTIFS([.$E$2:.$E$26];&quot;=dobra&quot;;[.$D$2:.$D$26];&quot;&lt;=20&quot;)" table:style-name="ce52">
            <text:p>0</text:p>
          </table:table-cell>
          <table:table-cell office:value-type="float" office:value="3" table:formula="of:=COUNTIFS([.$E$2:.$E$26];&quot;=dobra&quot;;[.$D$2:.$D$26];&quot;&gt;20&quot;;[.$D$2:.$D$26];&quot;&lt;=30&quot;)" table:style-name="ce52">
            <text:p>3</text:p>
          </table:table-cell>
          <table:table-cell office:value-type="float" office:value="4" table:formula="of:=COUNTIFS([.$E$2:.$E$26];&quot;=dobra&quot;;[.$D$2:.$D$26];&quot;&gt;30&quot;;[.$D$2:.$D$26];&quot;&lt;=40&quot;)" table:style-name="ce52">
            <text:p>4</text:p>
          </table:table-cell>
          <table:table-cell office:value-type="float" office:value="1" table:formula="of:=COUNTIFS([.$E$2:.$E$26];&quot;=dobra&quot;;[.$D$2:.$D$26];&quot;&gt;40&quot;;[.$D$2:.$D$26];&quot;&lt;=50&quot;)" table:style-name="ce52">
            <text:p>1</text:p>
          </table:table-cell>
          <table:table-cell office:value-type="float" office:value="1" table:formula="of:=COUNTIFS([.$E$2:.$E$26];&quot;=dobra&quot;;[.$D$2:.$D$26];&quot;&gt;50&quot;;[.$D$2:.$D$26];&quot;&lt;=60&quot;)" table:style-name="ce52">
            <text:p>1</text:p>
          </table:table-cell>
          <table:table-cell office:value-type="float" office:value="0" table:formula="of:=COUNTIFS([.$E$2:.$E$26];&quot;=dobra&quot;;[.$D$2:.$D$26];&quot;&gt;60&quot;;[.$D$2:.$D$26];&quot;&lt;=70&quot;)" table:style-name="ce52">
            <text:p>0</text:p>
          </table:table-cell>
          <table:table-cell office:value-type="float" office:value="2" table:formula="of:=COUNTIFS([.$E$2:.$E$26];&quot;=dobra&quot;;[.$D$2:.$D$26];&quot;&gt;70&quot;;[.$D$2:.$D$26];&quot;&lt;=80&quot;)" table:style-name="ce52">
            <text:p>2</text:p>
          </table:table-cell>
          <table:table-cell office:value-type="float" office:value="0" table:formula="of:=COUNTIFS([.$E$2:.$E$26];&quot;=dobra&quot;;[.$D$2:.$D$26];&quot;&gt;80&quot;)" table:style-name="ce52">
            <text:p>0</text:p>
          </table:table-cell>
          <table:table-cell office:value-type="float" office:value="2" table:formula="of:=COUNTIFS([.$F$2:.$F$26];&quot;=dobra&quot;;[.$D$2:.$D$26];&quot;&lt;=20&quot;)" table:style-name="ce52">
            <text:p>2</text:p>
          </table:table-cell>
          <table:table-cell office:value-type="float" office:value="3" table:formula="of:=COUNTIFS([.$F$2:.$F$26];&quot;=dobra&quot;;[.$D$2:.$D$26];&quot;&gt;20&quot;;[.$D$2:.$D$26];&quot;&lt;=30&quot;)" table:style-name="ce52">
            <text:p>3</text:p>
          </table:table-cell>
          <table:table-cell office:value-type="float" office:value="3" table:formula="of:=COUNTIFS([.$F$2:.$F$26];&quot;=dobra&quot;;[.$D$2:.$D$26];&quot;&gt;30&quot;;[.$D$2:.$D$26];&quot;&lt;=40&quot;)" table:style-name="ce52">
            <text:p>3</text:p>
          </table:table-cell>
          <table:table-cell office:value-type="float" office:value="3" table:formula="of:=COUNTIFS([.$F$2:.$F$26];&quot;=dobra&quot;;[.$D$2:.$D$26];&quot;&gt;40&quot;;[.$D$2:.$D$26];&quot;&lt;=50&quot;)" table:style-name="ce52">
            <text:p>3</text:p>
          </table:table-cell>
          <table:table-cell office:value-type="float" office:value="1" table:formula="of:=COUNTIFS([.$F$2:.$F$26];&quot;=dobra&quot;;[.$D$2:.$D$26];&quot;&gt;50&quot;;[.$D$2:.$D$26];&quot;&lt;=60&quot;)" table:style-name="ce52">
            <text:p>1</text:p>
          </table:table-cell>
          <table:table-cell office:value-type="float" office:value="1" table:formula="of:=COUNTIFS([.$F$2:.$F$26];&quot;=dobra&quot;;[.$D$2:.$D$26];&quot;&gt;60&quot;;[.$D$2:.$D$26];&quot;&lt;=70&quot;)" table:style-name="ce52">
            <text:p>1</text:p>
          </table:table-cell>
          <table:table-cell office:value-type="float" office:value="0" table:formula="of:=COUNTIFS([.$F$2:.$F$26];&quot;=dobra&quot;;[.$D$2:.$D$26];&quot;&gt;70&quot;;[.$D$2:.$D$26];&quot;&lt;=80&quot;)" table:style-name="ce52">
            <text:p>0</text:p>
          </table:table-cell>
          <table:table-cell office:value-type="float" office:value="0" table:formula="of:=COUNTIFS([.$F$2:.$F$26];&quot;=dobra&quot;;[.$D$2:.$D$26];&quot;&gt;80&quot;)" table:style-name="ce52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2">
            <text:p>częściowa</text:p>
          </table:table-cell>
          <table:table-cell office:value-type="float" office:value="2" table:formula="of:=COUNTIFS([.$E$2:.$E$26];&quot;=częściowa&quot;;[.$D$2:.$D$26];&quot;&lt;=20&quot;)" table:style-name="ce52">
            <text:p>2</text:p>
          </table:table-cell>
          <table:table-cell office:value-type="float" office:value="2" table:formula="of:=COUNTIFS([.$E$2:.$E$26];&quot;=częściowa&quot;;[.$D$2:.$D$26];&quot;&gt;20&quot;;[.$D$2:.$D$26];&quot;&lt;=30&quot;)" table:style-name="ce52">
            <text:p>2</text:p>
          </table:table-cell>
          <table:table-cell office:value-type="float" office:value="0" table:formula="of:=COUNTIFS([.$E$2:.$E$26];&quot;=częściowa&quot;;[.$D$2:.$D$26];&quot;&gt;30&quot;;[.$D$2:.$D$26];&quot;&lt;=40&quot;)" table:style-name="ce52">
            <text:p>0</text:p>
          </table:table-cell>
          <table:table-cell office:value-type="float" office:value="3" table:formula="of:=COUNTIFS([.$E$2:.$E$26];&quot;=częściowa&quot;;[.$D$2:.$D$26];&quot;&gt;40&quot;;[.$D$2:.$D$26];&quot;&lt;=50&quot;)" table:style-name="ce52">
            <text:p>3</text:p>
          </table:table-cell>
          <table:table-cell office:value-type="float" office:value="0" table:formula="of:=COUNTIFS([.$E$2:.$E$26];&quot;=częściowa&quot;;[.$D$2:.$D$26];&quot;&gt;50&quot;;[.$D$2:.$D$26];&quot;&lt;=60&quot;)" table:style-name="ce52">
            <text:p>0</text:p>
          </table:table-cell>
          <table:table-cell office:value-type="float" office:value="0" table:formula="of:=COUNTIFS([.$E$2:.$E$26];&quot;=częściowa&quot;;[.$D$2:.$D$26];&quot;&gt;60&quot;;[.$D$2:.$D$26];&quot;&lt;=70&quot;)" table:style-name="ce52">
            <text:p>0</text:p>
          </table:table-cell>
          <table:table-cell office:value-type="float" office:value="0" table:formula="of:=COUNTIFS([.$E$2:.$E$26];&quot;=częściowa&quot;;[.$D$2:.$D$26];&quot;&gt;70&quot;;[.$D$2:.$D$26];&quot;&lt;=80&quot;)" table:style-name="ce52">
            <text:p>0</text:p>
          </table:table-cell>
          <table:table-cell office:value-type="float" office:value="0" table:formula="of:=COUNTIFS([.$E$2:.$E$26];&quot;=częściowa&quot;;[.$D$2:.$D$26];&quot;&gt;80&quot;)" table:style-name="ce52">
            <text:p>0</text:p>
          </table:table-cell>
          <table:table-cell office:value-type="float" office:value="0" table:formula="of:=COUNTIFS([.$F$2:.$F$26];&quot;=częściowa&quot;;[.$D$2:.$D$26];&quot;&lt;=20&quot;)" table:style-name="ce52">
            <text:p>0</text:p>
          </table:table-cell>
          <table:table-cell office:value-type="float" office:value="1" table:formula="of:=COUNTIFS([.$F$2:.$F$26];&quot;=częściowa&quot;;[.$D$2:.$D$26];&quot;&gt;20&quot;;[.$D$2:.$D$26];&quot;&lt;=30&quot;)" table:style-name="ce52">
            <text:p>1</text:p>
          </table:table-cell>
          <table:table-cell office:value-type="float" office:value="0" table:formula="of:=COUNTIFS([.$F$2:.$F$26];&quot;=częściowa&quot;;[.$D$2:.$D$26];&quot;&gt;30&quot;;[.$D$2:.$D$26];&quot;&lt;=40&quot;)" table:style-name="ce52">
            <text:p>0</text:p>
          </table:table-cell>
          <table:table-cell office:value-type="float" office:value="0" table:formula="of:=COUNTIFS([.$F$2:.$F$26];&quot;=częściowa&quot;;[.$D$2:.$D$26];&quot;&gt;40&quot;;[.$D$2:.$D$26];&quot;&lt;=50&quot;)" table:style-name="ce52">
            <text:p>0</text:p>
          </table:table-cell>
          <table:table-cell office:value-type="float" office:value="0" table:formula="of:=COUNTIFS([.$F$2:.$F$26];&quot;=częściowa&quot;;[.$D$2:.$D$26];&quot;&gt;50&quot;;[.$D$2:.$D$26];&quot;&lt;=60&quot;)" table:style-name="ce52">
            <text:p>0</text:p>
          </table:table-cell>
          <table:table-cell office:value-type="float" office:value="0" table:formula="of:=COUNTIFS([.$F$2:.$F$26];&quot;=częściowa&quot;;[.$D$2:.$D$26];&quot;&gt;60&quot;;[.$D$2:.$D$26];&quot;&lt;=70&quot;)" table:style-name="ce52">
            <text:p>0</text:p>
          </table:table-cell>
          <table:table-cell office:value-type="float" office:value="0" table:formula="of:=COUNTIFS([.$F$2:.$F$26];&quot;=częściowa&quot;;[.$D$2:.$D$26];&quot;&gt;70&quot;;[.$D$2:.$D$26];&quot;&lt;=80&quot;)" table:style-name="ce52">
            <text:p>0</text:p>
          </table:table-cell>
          <table:table-cell office:value-type="float" office:value="0" table:formula="of:=COUNTIFS([.$F$2:.$F$26];&quot;=częściowa&quot;;[.$D$2:.$D$26];&quot;&gt;80&quot;)" table:style-name="ce52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2">
            <text:p>progresja</text:p>
          </table:table-cell>
          <table:table-cell office:value-type="float" office:value="0" table:formula="of:=COUNTIFS([.$E$2:.$E$26];&quot;=progresja&quot;;[.$D$2:.$D$26];&quot;&lt;=20&quot;)" table:style-name="ce52">
            <text:p>0</text:p>
          </table:table-cell>
          <table:table-cell office:value-type="float" office:value="1" table:formula="of:=COUNTIFS([.$E$2:.$E$26];&quot;=progresja&quot;;[.$D$2:.$D$26];&quot;&gt;20&quot;;[.$D$2:.$D$26];&quot;&lt;=30&quot;)" table:style-name="ce52">
            <text:p>1</text:p>
          </table:table-cell>
          <table:table-cell office:value-type="float" office:value="0" table:formula="of:=COUNTIFS([.$E$2:.$E$26];&quot;=progresja&quot;;[.$D$2:.$D$26];&quot;&gt;30&quot;;[.$D$2:.$D$26];&quot;&lt;=40&quot;)" table:style-name="ce52">
            <text:p>0</text:p>
          </table:table-cell>
          <table:table-cell office:value-type="float" office:value="0" table:formula="of:=COUNTIFS([.$E$2:.$E$26];&quot;=progresja&quot;;[.$D$2:.$D$26];&quot;&gt;40&quot;;[.$D$2:.$D$26];&quot;&lt;=50&quot;)" table:style-name="ce52">
            <text:p>0</text:p>
          </table:table-cell>
          <table:table-cell office:value-type="float" office:value="0" table:formula="of:=COUNTIFS([.$E$2:.$E$26];&quot;=progresja&quot;;[.$D$2:.$D$26];&quot;&gt;50&quot;;[.$D$2:.$D$26];&quot;&lt;=60&quot;)" table:style-name="ce52">
            <text:p>0</text:p>
          </table:table-cell>
          <table:table-cell office:value-type="float" office:value="0" table:formula="of:=COUNTIFS([.$E$2:.$E$26];&quot;=progresja&quot;;[.$D$2:.$D$26];&quot;&gt;60&quot;;[.$D$2:.$D$26];&quot;&lt;=70&quot;)" table:style-name="ce52">
            <text:p>0</text:p>
          </table:table-cell>
          <table:table-cell office:value-type="float" office:value="0" table:formula="of:=COUNTIFS([.$E$2:.$E$26];&quot;=progresja&quot;;[.$D$2:.$D$26];&quot;&gt;70&quot;;[.$D$2:.$D$26];&quot;&lt;=80&quot;)" table:style-name="ce52">
            <text:p>0</text:p>
          </table:table-cell>
          <table:table-cell office:value-type="float" office:value="0" table:formula="of:=COUNTIFS([.$E$2:.$E$26];&quot;=progresja&quot;;[.$D$2:.$D$26];&quot;&gt;80&quot;)" table:style-name="ce52">
            <text:p>0</text:p>
          </table:table-cell>
          <table:table-cell office:value-type="float" office:value="0" table:formula="of:=COUNTIFS([.$F$2:.$F$26];&quot;=progresja&quot;;[.$D$2:.$D$26];&quot;&lt;=20&quot;)" table:style-name="ce52">
            <text:p>0</text:p>
          </table:table-cell>
          <table:table-cell office:value-type="float" office:value="0" table:formula="of:=COUNTIFS([.$F$2:.$F$26];&quot;=progresja&quot;;[.$D$2:.$D$26];&quot;&gt;20&quot;;[.$D$2:.$D$26];&quot;&lt;=30&quot;)" table:style-name="ce52">
            <text:p>0</text:p>
          </table:table-cell>
          <table:table-cell office:value-type="float" office:value="1" table:formula="of:=COUNTIFS([.$F$2:.$F$26];&quot;=progresja&quot;;[.$D$2:.$D$26];&quot;&gt;30&quot;;[.$D$2:.$D$26];&quot;&lt;=40&quot;)" table:style-name="ce52">
            <text:p>1</text:p>
          </table:table-cell>
          <table:table-cell office:value-type="float" office:value="0" table:formula="of:=COUNTIFS([.$F$2:.$F$26];&quot;=progresja&quot;;[.$D$2:.$D$26];&quot;&gt;40&quot;;[.$D$2:.$D$26];&quot;&lt;=50&quot;)" table:style-name="ce52">
            <text:p>0</text:p>
          </table:table-cell>
          <table:table-cell office:value-type="float" office:value="0" table:formula="of:=COUNTIFS([.$F$2:.$F$26];&quot;=progresja&quot;;[.$D$2:.$D$26];&quot;&gt;50&quot;;[.$D$2:.$D$26];&quot;&lt;=60&quot;)" table:style-name="ce52">
            <text:p>0</text:p>
          </table:table-cell>
          <table:table-cell office:value-type="float" office:value="0" table:formula="of:=COUNTIFS([.$F$2:.$F$26];&quot;=progresja&quot;;[.$D$2:.$D$26];&quot;&gt;60&quot;;[.$D$2:.$D$26];&quot;&lt;=70&quot;)" table:style-name="ce52">
            <text:p>0</text:p>
          </table:table-cell>
          <table:table-cell office:value-type="float" office:value="0" table:formula="of:=COUNTIFS([.$F$2:.$F$26];&quot;=progresja&quot;;[.$D$2:.$D$26];&quot;&gt;70&quot;;[.$D$2:.$D$26];&quot;&lt;=80&quot;)" table:style-name="ce52">
            <text:p>0</text:p>
          </table:table-cell>
          <table:table-cell office:value-type="float" office:value="0" table:formula="of:=COUNTIFS([.$F$2:.$F$26];&quot;=progresja&quot;;[.$D$2:.$D$26];&quot;&gt;80&quot;)" table:style-name="ce52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2">
            <text:p>wznowa</text:p>
          </table:table-cell>
          <table:table-cell office:value-type="float" office:value="0" table:formula="of:=COUNTIFS([.$E$2:.$E$26];&quot;=wznowa&quot;;[.$D$2:.$D$26];&quot;&lt;=20&quot;)" table:style-name="ce52">
            <text:p>0</text:p>
          </table:table-cell>
          <table:table-cell office:value-type="float" office:value="0" table:formula="of:=COUNTIFS([.$E$2:.$E$26];&quot;=wznowa&quot;;[.$D$2:.$D$26];&quot;&gt;20&quot;;[.$D$2:.$D$26];&quot;&lt;=30&quot;)" table:style-name="ce52">
            <text:p>0</text:p>
          </table:table-cell>
          <table:table-cell office:value-type="float" office:value="0" table:formula="of:=COUNTIFS([.$E$2:.$E$26];&quot;=wznowa&quot;;[.$D$2:.$D$26];&quot;&gt;30&quot;;[.$D$2:.$D$26];&quot;&lt;=40&quot;)" table:style-name="ce52">
            <text:p>0</text:p>
          </table:table-cell>
          <table:table-cell office:value-type="float" office:value="0" table:formula="of:=COUNTIFS([.$E$2:.$E$26];&quot;=wznowa&quot;;[.$D$2:.$D$26];&quot;&gt;40&quot;;[.$D$2:.$D$26];&quot;&lt;=50&quot;)" table:style-name="ce52">
            <text:p>0</text:p>
          </table:table-cell>
          <table:table-cell office:value-type="float" office:value="0" table:formula="of:=COUNTIFS([.$E$2:.$E$26];&quot;=wznowa&quot;;[.$D$2:.$D$26];&quot;&gt;50&quot;;[.$D$2:.$D$26];&quot;&lt;=60&quot;)" table:style-name="ce52">
            <text:p>0</text:p>
          </table:table-cell>
          <table:table-cell office:value-type="float" office:value="0" table:formula="of:=COUNTIFS([.$E$2:.$E$26];&quot;=wznowa&quot;;[.$D$2:.$D$26];&quot;&gt;60&quot;;[.$D$2:.$D$26];&quot;&lt;=70&quot;)" table:style-name="ce52">
            <text:p>0</text:p>
          </table:table-cell>
          <table:table-cell office:value-type="float" office:value="0" table:formula="of:=COUNTIFS([.$E$2:.$E$26];&quot;=wznowa&quot;;[.$D$2:.$D$26];&quot;&gt;70&quot;;[.$D$2:.$D$26];&quot;&lt;=80&quot;)" table:style-name="ce52">
            <text:p>0</text:p>
          </table:table-cell>
          <table:table-cell office:value-type="float" office:value="0" table:formula="of:=COUNTIFS([.$E$2:.$E$26];&quot;=wznowa&quot;;[.$D$2:.$D$26];&quot;&gt;80&quot;)" table:style-name="ce52">
            <text:p>0</text:p>
          </table:table-cell>
          <table:table-cell office:value-type="float" office:value="0" table:formula="of:=COUNTIFS([.$F$2:.$F$26];&quot;=wznowa&quot;;[.$D$2:.$D$26];&quot;&lt;=20&quot;)" table:style-name="ce52">
            <text:p>0</text:p>
          </table:table-cell>
          <table:table-cell office:value-type="float" office:value="2" table:formula="of:=COUNTIFS([.$F$2:.$F$26];&quot;=wznowa&quot;;[.$D$2:.$D$26];&quot;&gt;20&quot;;[.$D$2:.$D$26];&quot;&lt;=30&quot;)" table:style-name="ce52">
            <text:p>2</text:p>
          </table:table-cell>
          <table:table-cell office:value-type="float" office:value="0" table:formula="of:=COUNTIFS([.$F$2:.$F$26];&quot;=wznowa&quot;;[.$D$2:.$D$26];&quot;&gt;30&quot;;[.$D$2:.$D$26];&quot;&lt;=40&quot;)" table:style-name="ce52">
            <text:p>0</text:p>
          </table:table-cell>
          <table:table-cell office:value-type="float" office:value="1" table:formula="of:=COUNTIFS([.$F$2:.$F$26];&quot;=wznowa&quot;;[.$D$2:.$D$26];&quot;&gt;40&quot;;[.$D$2:.$D$26];&quot;&lt;=50&quot;)" table:style-name="ce52">
            <text:p>1</text:p>
          </table:table-cell>
          <table:table-cell office:value-type="float" office:value="0" table:formula="of:=COUNTIFS([.$F$2:.$F$26];&quot;=wznowa&quot;;[.$D$2:.$D$26];&quot;&gt;50&quot;;[.$D$2:.$D$26];&quot;&lt;=60&quot;)" table:style-name="ce52">
            <text:p>0</text:p>
          </table:table-cell>
          <table:table-cell office:value-type="float" office:value="0" table:formula="of:=COUNTIFS([.$F$2:.$F$26];&quot;=wznowa&quot;;[.$D$2:.$D$26];&quot;&gt;60&quot;;[.$D$2:.$D$26];&quot;&lt;=70&quot;)" table:style-name="ce52">
            <text:p>0</text:p>
          </table:table-cell>
          <table:table-cell office:value-type="float" office:value="2" table:formula="of:=COUNTIFS([.$F$2:.$F$26];&quot;=wznowa&quot;;[.$D$2:.$D$26];&quot;&gt;70&quot;;[.$D$2:.$D$26];&quot;&lt;=80&quot;)" table:style-name="ce52">
            <text:p>2</text:p>
          </table:table-cell>
          <table:table-cell office:value-type="float" office:value="0" table:formula="of:=COUNTIFS([.$F$2:.$F$26];&quot;=wznowa&quot;;[.$D$2:.$D$26];&quot;&gt;80&quot;)" table:style-name="ce52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2">
            <text:p>suma</text:p>
          </table:table-cell>
          <table:table-cell office:value-type="float" office:value="2" table:formula="of:=SUM([.B56:.B60])" table:style-name="ce52">
            <text:p>2</text:p>
          </table:table-cell>
          <table:table-cell office:value-type="float" office:value="8" table:formula="of:=SUM([.C56:.C60])" table:style-name="ce52">
            <text:p>8</text:p>
          </table:table-cell>
          <table:table-cell office:value-type="float" office:value="4" table:formula="of:=SUM([.D56:.D60])" table:style-name="ce52">
            <text:p>4</text:p>
          </table:table-cell>
          <table:table-cell office:value-type="float" office:value="5" table:formula="of:=SUM([.E56:.E60])" table:style-name="ce52">
            <text:p>5</text:p>
          </table:table-cell>
          <table:table-cell office:value-type="float" office:value="2" table:formula="of:=SUM([.F56:.F60])" table:style-name="ce52">
            <text:p>2</text:p>
          </table:table-cell>
          <table:table-cell office:value-type="float" office:value="1" table:formula="of:=SUM([.G56:.G60])" table:style-name="ce52">
            <text:p>1</text:p>
          </table:table-cell>
          <table:table-cell office:value-type="float" office:value="2" table:formula="of:=SUM([.H56:.H60])" table:style-name="ce52">
            <text:p>2</text:p>
          </table:table-cell>
          <table:table-cell office:value-type="float" office:value="0" table:formula="of:=SUM([.I56:.I60])" table:style-name="ce52">
            <text:p>0</text:p>
          </table:table-cell>
          <table:table-cell office:value-type="float" office:value="2" table:formula="of:=SUM([.J56:.J60])" table:style-name="ce52">
            <text:p>2</text:p>
          </table:table-cell>
          <table:table-cell office:value-type="float" office:value="9" table:formula="of:=SUM([.K56:.K60])" table:style-name="ce52">
            <text:p>9</text:p>
          </table:table-cell>
          <table:table-cell office:value-type="float" office:value="4" table:formula="of:=SUM([.L56:.L60])" table:style-name="ce52">
            <text:p>4</text:p>
          </table:table-cell>
          <table:table-cell office:value-type="float" office:value="5" table:formula="of:=SUM([.M56:.M60])" table:style-name="ce52">
            <text:p>5</text:p>
          </table:table-cell>
          <table:table-cell office:value-type="float" office:value="2" table:formula="of:=SUM([.N56:.N60])" table:style-name="ce52">
            <text:p>2</text:p>
          </table:table-cell>
          <table:table-cell office:value-type="float" office:value="1" table:formula="of:=SUM([.O56:.O60])" table:style-name="ce52">
            <text:p>1</text:p>
          </table:table-cell>
          <table:table-cell office:value-type="float" office:value="2" table:formula="of:=SUM([.P56:.P60])" table:style-name="ce52">
            <text:p>2</text:p>
          </table:table-cell>
          <table:table-cell office:value-type="float" office:value="0" table:formula="of:=SUM([.Q56:.Q60])" table:style-name="ce52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8" table:style-name="ce52"/>
          <table:table-cell office:value-type="float" office:value="24" table:formula="of:=SUM([.B61:.I61])" table:style-name="ce52">
            <text:p>24</text:p>
          </table:table-cell>
          <table:table-cell table:number-columns-repeated="7" table:style-name="ce52"/>
          <table:table-cell office:value-type="float" office:value="25" table:formula="of:=SUM([.J61:.Q61])" table:style-name="ce52">
            <text:p>2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3">
            <text:p>zaleznosc od wieku i plci</text:p>
          </table:table-cell>
          <table:table-cell table:style-name="ce53"/>
          <table:table-cell office:value-type="string" table:style-name="ce53">
            <text:p>hl w trakcie</text:p>
          </table:table-cell>
          <table:table-cell office:value-type="string" table:style-name="ce53">
            <text:p>kobiety</text:p>
          </table:table-cell>
          <table:table-cell table:number-columns-repeated="6" table:style-name="ce53"/>
          <table:table-cell office:value-type="string" table:style-name="ce53">
            <text:p>kl po</text:p>
          </table:table-cell>
          <table:table-cell office:value-type="string" table:style-name="ce53">
            <text:p>kobiety</text:p>
          </table:table-cell>
          <table:table-cell table:number-columns-repeated="6" table:style-name="ce53"/>
          <table:table-cell table:number-columns-repeated="16366"/>
        </table:table-row>
        <table:table-row table:style-name="ro1"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bardzo dobra</text:p>
          </table:table-cell>
          <table:table-cell office:value-type="float" office:value="0" table:formula="of:=COUNTIFS([.$E$2:.$E$26];&quot;=bardzo dobra&quot;;[.$D$2:.$D$26];&quot;&lt;=20&quot;;[.$C$2:.$C$26];&quot;=kobieta&quot;)" table:style-name="ce53">
            <text:p>0</text:p>
          </table:table-cell>
          <table:table-cell office:value-type="float" office:value="0" table:formula="of:=COUNTIFS([.$E$2:.$E$26];&quot;=bardzo dobra&quot;;[.$D$2:.$D$26];&quot;&gt;20&quot;;[.$D$2:.$D$26];&quot;&lt;=30&quot;;[.$C$2:.$C$26];&quot;=Kobieta&quot;)" table:style-name="ce53">
            <text:p>0</text:p>
          </table:table-cell>
          <table:table-cell office:value-type="float" office:value="0" table:formula="of:=COUNTIFS([.$E$2:.$E$26];&quot;=bardzo dobra&quot;;[.$D$2:.$D$26];&quot;&gt;30&quot;;[.$D$2:.$D$26];&quot;&lt;=40&quot;;[.$C$2:.$C$26];&quot;=Kobieta&quot;)" table:style-name="ce53">
            <text:p>0</text:p>
          </table:table-cell>
          <table:table-cell office:value-type="float" office:value="1" table:formula="of:=COUNTIFS([.$E$2:.$E$26];&quot;=bardzo dobra&quot;;[.$D$2:.$D$26];&quot;&gt;40&quot;;[.$D$2:.$D$26];&quot;&lt;=50&quot;;[.$C$2:.$C$26];&quot;=Kobieta&quot;)" table:style-name="ce53">
            <text:p>1</text:p>
          </table:table-cell>
          <table:table-cell office:value-type="float" office:value="0" table:formula="of:=COUNTIFS([.$E$2:.$E$26];&quot;=bardzo dobr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E$2:.$E$26];&quot;=bardzo dobr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E$2:.$E$26];&quot;=bardzo dobr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E$2:.$E$26];&quot;=bardzo dobra&quot;;[.$D$2:.$D$26];&quot;&gt;80&quot;;[.$C$2:.$C$26];&quot;=Kobieta&quot;)" table:style-name="ce53">
            <text:p>0</text:p>
          </table:table-cell>
          <table:table-cell table:style-name="ce53"/>
          <table:table-cell office:value-type="float" office:value="0" table:formula="of:=COUNTIFS([.$F$2:.$F$26];&quot;=bardzo dobra&quot;;[.$D$2:.$D$26];&quot;&lt;=20&quot;;[.$C$2:.$C$26];&quot;=kobieta&quot;)" table:style-name="ce53">
            <text:p>0</text:p>
          </table:table-cell>
          <table:table-cell office:value-type="float" office:value="1" table:formula="of:=COUNTIFS([.$F$2:.$F$26];&quot;=bardzo dobra&quot;;[.$D$2:.$D$26];&quot;&gt;20&quot;;[.$D$2:.$D$26];&quot;&lt;=30&quot;;[.$C$2:.$C$26];&quot;=kobieta&quot;)" table:style-name="ce53">
            <text:p>1</text:p>
          </table:table-cell>
          <table:table-cell office:value-type="float" office:value="0" table:formula="of:=COUNTIFS([.$F$2:.$F$26];&quot;=bardzo dobra&quot;;[.$D$2:.$D$26];&quot;&gt;30&quot;;[.$D$2:.$D$26];&quot;&lt;=40&quot;;[.$C$2:.$C$26];&quot;=kobieta&quot;)" table:style-name="ce53">
            <text:p>0</text:p>
          </table:table-cell>
          <table:table-cell office:value-type="float" office:value="0" table:formula="of:=COUNTIFS([.$F$2:.$F$26];&quot;=bardzo dobra&quot;;[.$D$2:.$D$26];&quot;&gt;40&quot;;[.$D$2:.$D$26];&quot;&lt;=50&quot;;[.$C$2:.$C$26];&quot;=kobieta&quot;)" table:style-name="ce53">
            <text:p>0</text:p>
          </table:table-cell>
          <table:table-cell office:value-type="float" office:value="0" table:formula="of:=COUNTIFS([.$F$2:.$F$26];&quot;=bardzo dobr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F$2:.$F$26];&quot;=bardzo dobr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F$2:.$F$26];&quot;=bardzo dobr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F$2:.$F$26];&quot;=bardzo dobra&quot;;[.$D$2:.$D$26];&quot;&gt;80&quot;;[.$C$2:.$C$26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dobra</text:p>
          </table:table-cell>
          <table:table-cell office:value-type="float" office:value="0" table:formula="of:=COUNTIFS([.$E$2:.$E$26];&quot;=dobra&quot;;[.$D$2:.$D$26];&quot;&lt;=20&quot;;[.$C$2:.$C$26];&quot;=kobieta&quot;)" table:style-name="ce53">
            <text:p>0</text:p>
          </table:table-cell>
          <table:table-cell office:value-type="float" office:value="1" table:formula="of:=COUNTIFS([.$E$2:.$E$26];&quot;=dobra&quot;;[.$D$2:.$D$26];&quot;&gt;20&quot;;[.$D$2:.$D$26];&quot;&lt;=30&quot;;[.$C$2:.$C$26];&quot;=Kobieta&quot;)" table:style-name="ce53">
            <text:p>1</text:p>
          </table:table-cell>
          <table:table-cell office:value-type="float" office:value="2" table:formula="of:=COUNTIFS([.$E$2:.$E$26];&quot;=dobra&quot;;[.$D$2:.$D$26];&quot;&gt;30&quot;;[.$D$2:.$D$26];&quot;&lt;=40&quot;;[.$C$2:.$C$26];&quot;=Kobieta&quot;)" table:style-name="ce53">
            <text:p>2</text:p>
          </table:table-cell>
          <table:table-cell office:value-type="float" office:value="0" table:formula="of:=COUNTIFS([.$E$2:.$E$26];&quot;=dobra&quot;;[.$D$2:.$D$26];&quot;&gt;40&quot;;[.$D$2:.$D$26];&quot;&lt;=50&quot;;[.$C$2:.$C$26];&quot;=Kobieta&quot;)" table:style-name="ce53">
            <text:p>0</text:p>
          </table:table-cell>
          <table:table-cell office:value-type="float" office:value="0" table:formula="of:=COUNTIFS([.$E$2:.$E$26];&quot;=dobr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E$2:.$E$26];&quot;=dobr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E$2:.$E$26];&quot;=dobr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E$2:.$E$26];&quot;=dobra&quot;;[.$D$2:.$D$26];&quot;&gt;80&quot;;[.$C$2:.$C$26];&quot;=Kobieta&quot;)" table:style-name="ce53">
            <text:p>0</text:p>
          </table:table-cell>
          <table:table-cell table:style-name="ce53"/>
          <table:table-cell office:value-type="float" office:value="1" table:formula="of:=COUNTIFS([.$F$2:.$F$26];&quot;=dobra&quot;;[.$D$2:.$D$26];&quot;&lt;=20&quot;;[.$C$2:.$C$26];&quot;=kobieta&quot;)" table:style-name="ce53">
            <text:p>1</text:p>
          </table:table-cell>
          <table:table-cell office:value-type="float" office:value="2" table:formula="of:=COUNTIFS([.$F$2:.$F$26];&quot;=dobra&quot;;[.$D$2:.$D$26];&quot;&gt;20&quot;;[.$D$2:.$D$26];&quot;&lt;=30&quot;;[.$C$2:.$C$26];&quot;=kobieta&quot;)" table:style-name="ce53">
            <text:p>2</text:p>
          </table:table-cell>
          <table:table-cell office:value-type="float" office:value="2" table:formula="of:=COUNTIFS([.$F$2:.$F$26];&quot;=dobra&quot;;[.$D$2:.$D$26];&quot;&gt;30&quot;;[.$D$2:.$D$26];&quot;&lt;=40&quot;;[.$C$2:.$C$26];&quot;=kobieta&quot;)" table:style-name="ce53">
            <text:p>2</text:p>
          </table:table-cell>
          <table:table-cell office:value-type="float" office:value="3" table:formula="of:=COUNTIFS([.$F$2:.$F$26];&quot;=dobra&quot;;[.$D$2:.$D$26];&quot;&gt;40&quot;;[.$D$2:.$D$26];&quot;&lt;=50&quot;;[.$C$2:.$C$26];&quot;=kobieta&quot;)" table:style-name="ce53">
            <text:p>3</text:p>
          </table:table-cell>
          <table:table-cell office:value-type="float" office:value="0" table:formula="of:=COUNTIFS([.$F$2:.$F$26];&quot;=dobr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F$2:.$F$26];&quot;=dobr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F$2:.$F$26];&quot;=dobr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F$2:.$F$26];&quot;=dobra&quot;;[.$D$2:.$D$26];&quot;&gt;80&quot;;[.$C$2:.$C$26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częściowa</text:p>
          </table:table-cell>
          <table:table-cell office:value-type="float" office:value="1" table:formula="of:=COUNTIFS([.$E$2:.$E$26];&quot;=częściowa&quot;;[.$D$2:.$D$26];&quot;&lt;=20&quot;;[.$C$2:.$C$26];&quot;=kobieta&quot;)" table:style-name="ce53">
            <text:p>1</text:p>
          </table:table-cell>
          <table:table-cell office:value-type="float" office:value="2" table:formula="of:=COUNTIFS([.$E$2:.$E$26];&quot;=częściowa&quot;;[.$D$2:.$D$26];&quot;&gt;20&quot;;[.$D$2:.$D$26];&quot;&lt;=30&quot;;[.$C$2:.$C$26];&quot;=Kobieta&quot;)" table:style-name="ce53">
            <text:p>2</text:p>
          </table:table-cell>
          <table:table-cell office:value-type="float" office:value="0" table:formula="of:=COUNTIFS([.$E$2:.$E$26];&quot;=częściowa&quot;;[.$D$2:.$D$26];&quot;&gt;30&quot;;[.$D$2:.$D$26];&quot;&lt;=40&quot;;[.$C$2:.$C$26];&quot;=Kobieta&quot;)" table:style-name="ce53">
            <text:p>0</text:p>
          </table:table-cell>
          <table:table-cell office:value-type="float" office:value="2" table:formula="of:=COUNTIFS([.$E$2:.$E$26];&quot;=częściowa&quot;;[.$D$2:.$D$26];&quot;&gt;40&quot;;[.$D$2:.$D$26];&quot;&lt;=50&quot;;[.$C$2:.$C$26];&quot;=Kobieta&quot;)" table:style-name="ce53">
            <text:p>2</text:p>
          </table:table-cell>
          <table:table-cell office:value-type="float" office:value="0" table:formula="of:=COUNTIFS([.$E$2:.$E$26];&quot;=częściow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E$2:.$E$26];&quot;=częściow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E$2:.$E$26];&quot;=częściow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E$2:.$E$26];&quot;=częściowa&quot;;[.$D$2:.$D$26];&quot;&gt;80&quot;;[.$C$2:.$C$26];&quot;=Kobieta&quot;)" table:style-name="ce53">
            <text:p>0</text:p>
          </table:table-cell>
          <table:table-cell table:style-name="ce53"/>
          <table:table-cell office:value-type="float" office:value="0" table:formula="of:=COUNTIFS([.$F$2:.$F$26];&quot;=częściowa&quot;;[.$D$2:.$D$26];&quot;&lt;=20&quot;;[.$C$2:.$C$26];&quot;=kobieta&quot;)" table:style-name="ce53">
            <text:p>0</text:p>
          </table:table-cell>
          <table:table-cell office:value-type="float" office:value="1" table:formula="of:=COUNTIFS([.$F$2:.$F$26];&quot;=częściowa&quot;;[.$D$2:.$D$26];&quot;&gt;20&quot;;[.$D$2:.$D$26];&quot;&lt;=30&quot;;[.$C$2:.$C$26];&quot;=kobieta&quot;)" table:style-name="ce53">
            <text:p>1</text:p>
          </table:table-cell>
          <table:table-cell office:value-type="float" office:value="0" table:formula="of:=COUNTIFS([.$F$2:.$F$26];&quot;=częściowa&quot;;[.$D$2:.$D$26];&quot;&gt;30&quot;;[.$D$2:.$D$26];&quot;&lt;=40&quot;;[.$C$2:.$C$26];&quot;=kobieta&quot;)" table:style-name="ce53">
            <text:p>0</text:p>
          </table:table-cell>
          <table:table-cell office:value-type="float" office:value="0" table:formula="of:=COUNTIFS([.$F$2:.$F$26];&quot;=częściowa&quot;;[.$D$2:.$D$26];&quot;&gt;40&quot;;[.$D$2:.$D$26];&quot;&lt;=50&quot;;[.$C$2:.$C$26];&quot;=kobieta&quot;)" table:style-name="ce53">
            <text:p>0</text:p>
          </table:table-cell>
          <table:table-cell office:value-type="float" office:value="0" table:formula="of:=COUNTIFS([.$F$2:.$F$26];&quot;=częściow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F$2:.$F$26];&quot;=częściow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F$2:.$F$26];&quot;=częściow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F$2:.$F$26];&quot;=częściowa&quot;;[.$D$2:.$D$26];&quot;&gt;80&quot;;[.$C$2:.$C$26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progresja</text:p>
          </table:table-cell>
          <table:table-cell office:value-type="float" office:value="0" table:formula="of:=COUNTIFS([.$E$2:.$E$26];&quot;=progresja&quot;;[.$D$2:.$D$26];&quot;&lt;=20&quot;;[.$C$2:.$C$26];&quot;=kobieta&quot;)" table:style-name="ce53">
            <text:p>0</text:p>
          </table:table-cell>
          <table:table-cell office:value-type="float" office:value="1" table:formula="of:=COUNTIFS([.$E$2:.$E$26];&quot;=progresja&quot;;[.$D$2:.$D$26];&quot;&gt;20&quot;;[.$D$2:.$D$26];&quot;&lt;=30&quot;;[.$C$2:.$C$26];&quot;=Kobieta&quot;)" table:style-name="ce53">
            <text:p>1</text:p>
          </table:table-cell>
          <table:table-cell office:value-type="float" office:value="0" table:formula="of:=COUNTIFS([.$E$2:.$E$26];&quot;=progresja&quot;;[.$D$2:.$D$26];&quot;&gt;30&quot;;[.$D$2:.$D$26];&quot;&lt;=40&quot;;[.$C$2:.$C$26];&quot;=Kobieta&quot;)" table:style-name="ce53">
            <text:p>0</text:p>
          </table:table-cell>
          <table:table-cell office:value-type="float" office:value="0" table:formula="of:=COUNTIFS([.$E$2:.$E$26];&quot;=progresja&quot;;[.$D$2:.$D$26];&quot;&gt;40&quot;;[.$D$2:.$D$26];&quot;&lt;=50&quot;;[.$C$2:.$C$26];&quot;=Kobieta&quot;)" table:style-name="ce53">
            <text:p>0</text:p>
          </table:table-cell>
          <table:table-cell office:value-type="float" office:value="0" table:formula="of:=COUNTIFS([.$E$2:.$E$26];&quot;=progresj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E$2:.$E$26];&quot;=progresj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E$2:.$E$26];&quot;=progresj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E$2:.$E$26];&quot;=progresja&quot;;[.$D$2:.$D$26];&quot;&gt;80&quot;;[.$C$2:.$C$26];&quot;=Kobieta&quot;)" table:style-name="ce53">
            <text:p>0</text:p>
          </table:table-cell>
          <table:table-cell table:style-name="ce53"/>
          <table:table-cell office:value-type="float" office:value="0" table:formula="of:=COUNTIFS([.$F$2:.$F$26];&quot;=progresja&quot;;[.$D$2:.$D$26];&quot;&lt;=20&quot;;[.$C$2:.$C$26];&quot;=kobieta&quot;)" table:style-name="ce53">
            <text:p>0</text:p>
          </table:table-cell>
          <table:table-cell office:value-type="float" office:value="0" table:formula="of:=COUNTIFS([.$F$2:.$F$26];&quot;=progresja&quot;;[.$D$2:.$D$26];&quot;&gt;20&quot;;[.$D$2:.$D$26];&quot;&lt;=30&quot;;[.$C$2:.$C$26];&quot;=kobieta&quot;)" table:style-name="ce53">
            <text:p>0</text:p>
          </table:table-cell>
          <table:table-cell office:value-type="float" office:value="0" table:formula="of:=COUNTIFS([.$F$2:.$F$26];&quot;=progresja&quot;;[.$D$2:.$D$26];&quot;&gt;30&quot;;[.$D$2:.$D$26];&quot;&lt;=40&quot;;[.$C$2:.$C$26];&quot;=kobieta&quot;)" table:style-name="ce53">
            <text:p>0</text:p>
          </table:table-cell>
          <table:table-cell office:value-type="float" office:value="0" table:formula="of:=COUNTIFS([.$F$2:.$F$26];&quot;=progresja&quot;;[.$D$2:.$D$26];&quot;&gt;40&quot;;[.$D$2:.$D$26];&quot;&lt;=50&quot;;[.$C$2:.$C$26];&quot;=kobieta&quot;)" table:style-name="ce53">
            <text:p>0</text:p>
          </table:table-cell>
          <table:table-cell office:value-type="float" office:value="0" table:formula="of:=COUNTIFS([.$F$2:.$F$26];&quot;=progresj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F$2:.$F$26];&quot;=progresj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F$2:.$F$26];&quot;=progresj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F$2:.$F$26];&quot;=progresja&quot;;[.$D$2:.$D$26];&quot;&gt;80&quot;;[.$C$2:.$C$26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wznowa</text:p>
          </table:table-cell>
          <table:table-cell office:value-type="float" office:value="0" table:formula="of:=COUNTIFS([.$E$2:.$E$26];&quot;=wznowa&quot;;[.$D$2:.$D$26];&quot;&lt;=20&quot;;[.$C$2:.$C$26];&quot;=kobieta&quot;)" table:style-name="ce53">
            <text:p>0</text:p>
          </table:table-cell>
          <table:table-cell office:value-type="float" office:value="0" table:formula="of:=COUNTIFS([.$E$2:.$E$26];&quot;=wznowa&quot;;[.$D$2:.$D$26];&quot;&gt;20&quot;;[.$D$2:.$D$26];&quot;&lt;=30&quot;;[.$C$2:.$C$26];&quot;=Kobieta&quot;)" table:style-name="ce53">
            <text:p>0</text:p>
          </table:table-cell>
          <table:table-cell office:value-type="float" office:value="0" table:formula="of:=COUNTIFS([.$E$2:.$E$26];&quot;=wznowa&quot;;[.$D$2:.$D$26];&quot;&gt;30&quot;;[.$D$2:.$D$26];&quot;&lt;=40&quot;;[.$C$2:.$C$26];&quot;=Kobieta&quot;)" table:style-name="ce53">
            <text:p>0</text:p>
          </table:table-cell>
          <table:table-cell office:value-type="float" office:value="0" table:formula="of:=COUNTIFS([.$E$2:.$E$26];&quot;=wznowa&quot;;[.$D$2:.$D$26];&quot;&gt;40&quot;;[.$D$2:.$D$26];&quot;&lt;=50&quot;;[.$C$2:.$C$26];&quot;=Kobieta&quot;)" table:style-name="ce53">
            <text:p>0</text:p>
          </table:table-cell>
          <table:table-cell office:value-type="float" office:value="0" table:formula="of:=COUNTIFS([.$E$2:.$E$26];&quot;=wznow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E$2:.$E$26];&quot;=wznow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E$2:.$E$26];&quot;=wznow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E$2:.$E$26];&quot;=wznowa&quot;;[.$D$2:.$D$26];&quot;&gt;80&quot;;[.$C$2:.$C$26];&quot;=Kobieta&quot;)" table:style-name="ce53">
            <text:p>0</text:p>
          </table:table-cell>
          <table:table-cell table:style-name="ce53"/>
          <table:table-cell office:value-type="float" office:value="0" table:formula="of:=COUNTIFS([.$F$2:.$F$26];&quot;=wznowa&quot;;[.$D$2:.$D$26];&quot;&lt;=20&quot;;[.$C$2:.$C$26];&quot;=kobieta&quot;)" table:style-name="ce53">
            <text:p>0</text:p>
          </table:table-cell>
          <table:table-cell office:value-type="float" office:value="0" table:formula="of:=COUNTIFS([.$F$2:.$F$26];&quot;=wznowa&quot;;[.$D$2:.$D$26];&quot;&gt;20&quot;;[.$D$2:.$D$26];&quot;&lt;=30&quot;;[.$C$2:.$C$26];&quot;=kobieta&quot;)" table:style-name="ce53">
            <text:p>0</text:p>
          </table:table-cell>
          <table:table-cell office:value-type="float" office:value="0" table:formula="of:=COUNTIFS([.$F$2:.$F$26];&quot;=wznowa&quot;;[.$D$2:.$D$26];&quot;&gt;30&quot;;[.$D$2:.$D$26];&quot;&lt;=40&quot;;[.$C$2:.$C$26];&quot;=kobieta&quot;)" table:style-name="ce53">
            <text:p>0</text:p>
          </table:table-cell>
          <table:table-cell office:value-type="float" office:value="0" table:formula="of:=COUNTIFS([.$F$2:.$F$26];&quot;=wznowa&quot;;[.$D$2:.$D$26];&quot;&gt;40&quot;;[.$D$2:.$D$26];&quot;&lt;=50&quot;;[.$C$2:.$C$26];&quot;=kobieta&quot;)" table:style-name="ce53">
            <text:p>0</text:p>
          </table:table-cell>
          <table:table-cell office:value-type="float" office:value="0" table:formula="of:=COUNTIFS([.$F$2:.$F$26];&quot;=wznowa&quot;;[.$D$2:.$D$26];&quot;&gt;50&quot;;[.$D$2:.$D$26];&quot;&lt;=60&quot;;[.$C$2:.$C$26];&quot;=kobieta&quot;)" table:style-name="ce53">
            <text:p>0</text:p>
          </table:table-cell>
          <table:table-cell office:value-type="float" office:value="0" table:formula="of:=COUNTIFS([.$F$2:.$F$26];&quot;=wznowa&quot;;[.$D$2:.$D$26];&quot;&gt;60&quot;;[.$D$2:.$D$26];&quot;&lt;=70&quot;;[.$C$2:.$C$26];&quot;=kobieta&quot;)" table:style-name="ce53">
            <text:p>0</text:p>
          </table:table-cell>
          <table:table-cell office:value-type="float" office:value="0" table:formula="of:=COUNTIFS([.$F$2:.$F$26];&quot;=wznowa&quot;;[.$D$2:.$D$26];&quot;&gt;70&quot;;[.$D$2:.$D$26];&quot;&lt;=80&quot;;[.$C$2:.$C$26];&quot;=kobieta&quot;)" table:style-name="ce53">
            <text:p>0</text:p>
          </table:table-cell>
          <table:table-cell office:value-type="float" office:value="0" table:formula="of:=COUNTIFS([.$F$2:.$F$26];&quot;=wznowa&quot;;[.$D$2:.$D$26];&quot;&gt;80&quot;;[.$C$2:.$C$26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suma</text:p>
          </table:table-cell>
          <table:table-cell office:value-type="float" office:value="1" table:formula="of:=SUM([.B65:.B69])" table:style-name="ce53">
            <text:p>1</text:p>
          </table:table-cell>
          <table:table-cell office:value-type="float" office:value="4" table:formula="of:=SUM([.C65:.C69])" table:style-name="ce53">
            <text:p>4</text:p>
          </table:table-cell>
          <table:table-cell office:value-type="float" office:value="2" table:formula="of:=SUM([.D65:.D69])" table:style-name="ce53">
            <text:p>2</text:p>
          </table:table-cell>
          <table:table-cell office:value-type="float" office:value="3" table:formula="of:=SUM([.E65:.E69])" table:style-name="ce53">
            <text:p>3</text:p>
          </table:table-cell>
          <table:table-cell office:value-type="float" office:value="0" table:formula="of:=SUM([.F65:.F69])" table:style-name="ce53">
            <text:p>0</text:p>
          </table:table-cell>
          <table:table-cell office:value-type="float" office:value="0" table:formula="of:=SUM([.G65:.G69])" table:style-name="ce53">
            <text:p>0</text:p>
          </table:table-cell>
          <table:table-cell office:value-type="float" office:value="0" table:formula="of:=SUM([.H65:.H69])" table:style-name="ce53">
            <text:p>0</text:p>
          </table:table-cell>
          <table:table-cell office:value-type="float" office:value="0" table:formula="of:=SUM([.I65:.I69])" table:style-name="ce53">
            <text:p>0</text:p>
          </table:table-cell>
          <table:table-cell table:style-name="ce53"/>
          <table:table-cell office:value-type="float" office:value="1" table:formula="of:=SUM([.K65:.K69])" table:style-name="ce53">
            <text:p>1</text:p>
          </table:table-cell>
          <table:table-cell office:value-type="float" office:value="4" table:formula="of:=SUM([.L65:.L69])" table:style-name="ce53">
            <text:p>4</text:p>
          </table:table-cell>
          <table:table-cell office:value-type="float" office:value="2" table:formula="of:=SUM([.M65:.M69])" table:style-name="ce53">
            <text:p>2</text:p>
          </table:table-cell>
          <table:table-cell office:value-type="float" office:value="3" table:formula="of:=SUM([.N65:.N69])" table:style-name="ce53">
            <text:p>3</text:p>
          </table:table-cell>
          <table:table-cell office:value-type="float" office:value="0" table:formula="of:=SUM([.O65:.O69])" table:style-name="ce53">
            <text:p>0</text:p>
          </table:table-cell>
          <table:table-cell office:value-type="float" office:value="0" table:formula="of:=SUM([.P65:.P69])" table:style-name="ce53">
            <text:p>0</text:p>
          </table:table-cell>
          <table:table-cell office:value-type="float" office:value="0" table:formula="of:=SUM([.Q65:.Q69])" table:style-name="ce53">
            <text:p>0</text:p>
          </table:table-cell>
          <table:table-cell office:value-type="float" office:value="0" table:formula="of:=SUM([.R65:.R69])" table:style-name="ce53">
            <text:p>0</text:p>
          </table:table-cell>
          <table:table-cell table:number-columns-repeated="16366"/>
        </table:table-row>
        <table:table-row table:style-name="ro1">
          <table:table-cell table:number-columns-repeated="2" table:style-name="ce53"/>
          <table:table-cell office:value-type="string" table:style-name="ce53">
            <text:p>hl w trakcie<text:s/></text:p>
          </table:table-cell>
          <table:table-cell office:value-type="string" table:style-name="ce53">
            <text:p>mezczyżni</text:p>
          </table:table-cell>
          <table:table-cell table:number-columns-repeated="6" table:style-name="ce53"/>
          <table:table-cell office:value-type="string" table:style-name="ce53">
            <text:p>hl po</text:p>
          </table:table-cell>
          <table:table-cell office:value-type="string" table:style-name="ce53">
            <text:p>mężczyżni</text:p>
          </table:table-cell>
          <table:table-cell table:number-columns-repeated="6" table:style-name="ce53"/>
          <table:table-cell table:number-columns-repeated="16366"/>
        </table:table-row>
        <table:table-row table:style-name="ro1"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bardzo dobra</text:p>
          </table:table-cell>
          <table:table-cell office:value-type="float" office:value="0" table:formula="of:=COUNTIFS([.$E$2:.$E$26];&quot;=bardzo dobra&quot;;[.$D$2:.$D$26];&quot;&lt;=20&quot;;[.$C$2:.$C$26];&quot;=Mężczyzna&quot;)" table:style-name="ce53">
            <text:p>0</text:p>
          </table:table-cell>
          <table:table-cell office:value-type="float" office:value="2" table:formula="of:=COUNTIFS([.$E$2:.$E$26];&quot;=bardzo dobra&quot;;[.$D$2:.$D$26];&quot;&gt;20&quot;;[.$D$2:.$D$26];&quot;&lt;=30&quot;;[.$C$2:.$C$26];&quot;=Mężczyzna&quot;)" table:style-name="ce53">
            <text:p>2</text:p>
          </table:table-cell>
          <table:table-cell office:value-type="float" office:value="0" table:formula="of:=COUNTIFS([.$E$2:.$E$26];&quot;=bardzo dobra&quot;;[.$D$2:.$D$26];&quot;&gt;30&quot;;[.$D$2:.$D$26];&quot;&lt;=40&quot;;[.$C$2:.$C$26];&quot;=Mężczyzna&quot;)" table:style-name="ce53">
            <text:p>0</text:p>
          </table:table-cell>
          <table:table-cell office:value-type="float" office:value="0" table:formula="of:=COUNTIFS([.$E$2:.$E$26];&quot;=bardzo dobra&quot;;[.$D$2:.$D$26];&quot;&gt;40&quot;;[.$D$2:.$D$26];&quot;&lt;=50&quot;;[.$C$2:.$C$26];&quot;=Mężczyzna&quot;)" table:style-name="ce53">
            <text:p>0</text:p>
          </table:table-cell>
          <table:table-cell office:value-type="float" office:value="1" table:formula="of:=COUNTIFS([.$E$2:.$E$26];&quot;=bardzo dobra&quot;;[.$D$2:.$D$26];&quot;&gt;50&quot;;[.$D$2:.$D$26];&quot;&lt;=60&quot;;[.$C$2:.$C$26];&quot;=Mężczyzna&quot;)" table:style-name="ce53">
            <text:p>1</text:p>
          </table:table-cell>
          <table:table-cell office:value-type="float" office:value="1" table:formula="of:=COUNTIFS([.$E$2:.$E$26];&quot;=bardzo dobra&quot;;[.$D$2:.$D$26];&quot;&gt;60&quot;;[.$D$2:.$D$26];&quot;&lt;=70&quot;;[.$C$2:.$C$26];&quot;=Mężczyzna&quot;)" table:style-name="ce53">
            <text:p>1</text:p>
          </table:table-cell>
          <table:table-cell office:value-type="float" office:value="0" table:formula="of:=COUNTIFS([.$E$2:.$E$26];&quot;=bardzo dobr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E$2:.$E$26];&quot;=bardzo dobra&quot;;[.$D$2:.$D$26];&quot;&gt;80&quot;;[.$C$2:.$C$26];&quot;=Mężczyzna&quot;)" table:style-name="ce53">
            <text:p>0</text:p>
          </table:table-cell>
          <table:table-cell table:style-name="ce53"/>
          <table:table-cell office:value-type="float" office:value="0" table:formula="of:=COUNTIFS([.$F$2:.$F$26];&quot;=bardzo dobra&quot;;[.$D$2:.$D$26];&quot;&lt;=20&quot;;[.$C$2:.$C$26];&quot;=Mężczyzna&quot;)" table:style-name="ce53">
            <text:p>0</text:p>
          </table:table-cell>
          <table:table-cell office:value-type="float" office:value="2" table:formula="of:=COUNTIFS([.$F$2:.$F$26];&quot;=bardzo dobra&quot;;[.$D$2:.$D$26];&quot;&gt;20&quot;;[.$D$2:.$D$26];&quot;&lt;=30&quot;;[.$C$2:.$C$26];&quot;=Mężczyzna&quot;)" table:style-name="ce53">
            <text:p>2</text:p>
          </table:table-cell>
          <table:table-cell office:value-type="float" office:value="0" table:formula="of:=COUNTIFS([.$F$2:.$F$26];&quot;=bardzo dobra&quot;;[.$D$2:.$D$26];&quot;&gt;30&quot;;[.$D$2:.$D$26];&quot;&lt;=40&quot;;[.$C$2:.$C$26];&quot;=Mężczyzna&quot;)" table:style-name="ce53">
            <text:p>0</text:p>
          </table:table-cell>
          <table:table-cell office:value-type="float" office:value="1" table:formula="of:=COUNTIFS([.$F$2:.$F$26];&quot;=bardzo dobra&quot;;[.$D$2:.$D$26];&quot;&gt;40&quot;;[.$D$2:.$D$26];&quot;&lt;=50&quot;;[.$C$2:.$C$26];&quot;=Mężczyzna&quot;)" table:style-name="ce53">
            <text:p>1</text:p>
          </table:table-cell>
          <table:table-cell office:value-type="float" office:value="1" table:formula="of:=COUNTIFS([.$F$2:.$F$26];&quot;=bardzo dobra&quot;;[.$D$2:.$D$26];&quot;&gt;50&quot;;[.$D$2:.$D$26];&quot;&lt;=60&quot;;[.$C$2:.$C$26];&quot;=Mężczyzna&quot;)" table:style-name="ce53">
            <text:p>1</text:p>
          </table:table-cell>
          <table:table-cell office:value-type="float" office:value="0" table:formula="of:=COUNTIFS([.$F$2:.$F$26];&quot;=bardzo dobra&quot;;[.$D$2:.$D$26];&quot;&gt;60&quot;;[.$D$2:.$D$26];&quot;&lt;=70&quot;;[.$C$2:.$C$26];&quot;=Mężczyzna&quot;)" table:style-name="ce53">
            <text:p>0</text:p>
          </table:table-cell>
          <table:table-cell office:value-type="float" office:value="0" table:formula="of:=COUNTIFS([.$F$2:.$F$26];&quot;=bardzo dobr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F$2:.$F$26];&quot;=bardzo dobra&quot;;[.$D$2:.$D$26];&quot;&gt;80&quot;;[.$C$2:.$C$26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dobra</text:p>
          </table:table-cell>
          <table:table-cell office:value-type="float" office:value="0" table:formula="of:=COUNTIFS([.$E$2:.$E$26];&quot;=dobra&quot;;[.$D$2:.$D$26];&quot;&lt;=20&quot;;[.$C$2:.$C$26];&quot;=Mężczyzna&quot;)" table:style-name="ce53">
            <text:p>0</text:p>
          </table:table-cell>
          <table:table-cell office:value-type="float" office:value="2" table:formula="of:=COUNTIFS([.$E$2:.$E$26];&quot;=dobra&quot;;[.$D$2:.$D$26];&quot;&gt;20&quot;;[.$D$2:.$D$26];&quot;&lt;=30&quot;;[.$C$2:.$C$26];&quot;=Mężczyzna&quot;)" table:style-name="ce53">
            <text:p>2</text:p>
          </table:table-cell>
          <table:table-cell office:value-type="float" office:value="2" table:formula="of:=COUNTIFS([.$E$2:.$E$26];&quot;=dobra&quot;;[.$D$2:.$D$26];&quot;&gt;30&quot;;[.$D$2:.$D$26];&quot;&lt;=40&quot;;[.$C$2:.$C$26];&quot;=Mężczyzna&quot;)" table:style-name="ce53">
            <text:p>2</text:p>
          </table:table-cell>
          <table:table-cell office:value-type="float" office:value="1" table:formula="of:=COUNTIFS([.$E$2:.$E$26];&quot;=dobra&quot;;[.$D$2:.$D$26];&quot;&gt;40&quot;;[.$D$2:.$D$26];&quot;&lt;=50&quot;;[.$C$2:.$C$26];&quot;=Mężczyzna&quot;)" table:style-name="ce53">
            <text:p>1</text:p>
          </table:table-cell>
          <table:table-cell office:value-type="float" office:value="1" table:formula="of:=COUNTIFS([.$E$2:.$E$26];&quot;=dobra&quot;;[.$D$2:.$D$26];&quot;&gt;50&quot;;[.$D$2:.$D$26];&quot;&lt;=60&quot;;[.$C$2:.$C$26];&quot;=Mężczyzna&quot;)" table:style-name="ce53">
            <text:p>1</text:p>
          </table:table-cell>
          <table:table-cell office:value-type="float" office:value="0" table:formula="of:=COUNTIFS([.$E$2:.$E$26];&quot;=dobra&quot;;[.$D$2:.$D$26];&quot;&gt;60&quot;;[.$D$2:.$D$26];&quot;&lt;=70&quot;;[.$C$2:.$C$26];&quot;=Mężczyzna&quot;)" table:style-name="ce53">
            <text:p>0</text:p>
          </table:table-cell>
          <table:table-cell office:value-type="float" office:value="2" table:formula="of:=COUNTIFS([.$E$2:.$E$26];&quot;=dobra&quot;;[.$D$2:.$D$26];&quot;&gt;70&quot;;[.$D$2:.$D$26];&quot;&lt;=80&quot;;[.$C$2:.$C$26];&quot;=Mężczyzna&quot;)" table:style-name="ce53">
            <text:p>2</text:p>
          </table:table-cell>
          <table:table-cell office:value-type="float" office:value="0" table:formula="of:=COUNTIFS([.$E$2:.$E$26];&quot;=dobra&quot;;[.$D$2:.$D$26];&quot;&gt;80&quot;;[.$C$2:.$C$26];&quot;=Mężczyzna&quot;)" table:style-name="ce53">
            <text:p>0</text:p>
          </table:table-cell>
          <table:table-cell table:style-name="ce53"/>
          <table:table-cell office:value-type="float" office:value="1" table:formula="of:=COUNTIFS([.$F$2:.$F$26];&quot;=dobra&quot;;[.$D$2:.$D$26];&quot;&lt;=20&quot;;[.$C$2:.$C$26];&quot;=Mężczyzna&quot;)" table:style-name="ce53">
            <text:p>1</text:p>
          </table:table-cell>
          <table:table-cell office:value-type="float" office:value="1" table:formula="of:=COUNTIFS([.$F$2:.$F$26];&quot;=dobra&quot;;[.$D$2:.$D$26];&quot;&gt;20&quot;;[.$D$2:.$D$26];&quot;&lt;=30&quot;;[.$C$2:.$C$26];&quot;=Mężczyzna&quot;)" table:style-name="ce53">
            <text:p>1</text:p>
          </table:table-cell>
          <table:table-cell office:value-type="float" office:value="1" table:formula="of:=COUNTIFS([.$F$2:.$F$26];&quot;=dobra&quot;;[.$D$2:.$D$26];&quot;&gt;30&quot;;[.$D$2:.$D$26];&quot;&lt;=40&quot;;[.$C$2:.$C$26];&quot;=Mężczyzna&quot;)" table:style-name="ce53">
            <text:p>1</text:p>
          </table:table-cell>
          <table:table-cell office:value-type="float" office:value="0" table:formula="of:=COUNTIFS([.$F$2:.$F$26];&quot;=dobra&quot;;[.$D$2:.$D$26];&quot;&gt;40&quot;;[.$D$2:.$D$26];&quot;&lt;=50&quot;;[.$C$2:.$C$26];&quot;=Mężczyzna&quot;)" table:style-name="ce53">
            <text:p>0</text:p>
          </table:table-cell>
          <table:table-cell office:value-type="float" office:value="1" table:formula="of:=COUNTIFS([.$F$2:.$F$26];&quot;=dobra&quot;;[.$D$2:.$D$26];&quot;&gt;50&quot;;[.$D$2:.$D$26];&quot;&lt;=60&quot;;[.$C$2:.$C$26];&quot;=Mężczyzna&quot;)" table:style-name="ce53">
            <text:p>1</text:p>
          </table:table-cell>
          <table:table-cell office:value-type="float" office:value="1" table:formula="of:=COUNTIFS([.$F$2:.$F$26];&quot;=dobra&quot;;[.$D$2:.$D$26];&quot;&gt;60&quot;;[.$D$2:.$D$26];&quot;&lt;=70&quot;;[.$C$2:.$C$26];&quot;=Mężczyzna&quot;)" table:style-name="ce53">
            <text:p>1</text:p>
          </table:table-cell>
          <table:table-cell office:value-type="float" office:value="0" table:formula="of:=COUNTIFS([.$F$2:.$F$26];&quot;=dobr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F$2:.$F$26];&quot;=dobra&quot;;[.$D$2:.$D$26];&quot;&gt;80&quot;;[.$C$2:.$C$26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częściowa</text:p>
          </table:table-cell>
          <table:table-cell office:value-type="float" office:value="1" table:formula="of:=COUNTIFS([.$E$2:.$E$26];&quot;=częściowa&quot;;[.$D$2:.$D$26];&quot;&lt;=20&quot;;[.$C$2:.$C$26];&quot;=Mężczyzna&quot;)" table:style-name="ce53">
            <text:p>1</text:p>
          </table:table-cell>
          <table:table-cell office:value-type="float" office:value="0" table:formula="of:=COUNTIFS([.$E$2:.$E$26];&quot;=częściowa&quot;;[.$D$2:.$D$26];&quot;&gt;20&quot;;[.$D$2:.$D$26];&quot;&lt;=30&quot;;[.C12:.C36];&quot;=Mężczyzna&quot;)" table:style-name="ce53">
            <text:p>0</text:p>
          </table:table-cell>
          <table:table-cell office:value-type="float" office:value="0" table:formula="of:=COUNTIFS([.$E$2:.$E$26];&quot;=częściowa&quot;;[.$D$2:.$D$26];&quot;&gt;30&quot;;[.$D$2:.$D$26];&quot;&lt;=40&quot;;[.$C$2:.$C$26];&quot;=Mężczyzna&quot;)" table:style-name="ce53">
            <text:p>0</text:p>
          </table:table-cell>
          <table:table-cell office:value-type="float" office:value="1" table:formula="of:=COUNTIFS([.$E$2:.$E$26];&quot;=częściowa&quot;;[.$D$2:.$D$26];&quot;&gt;40&quot;;[.$D$2:.$D$26];&quot;&lt;=50&quot;;[.$C$2:.$C$26];&quot;=Mężczyzna&quot;)" table:style-name="ce53">
            <text:p>1</text:p>
          </table:table-cell>
          <table:table-cell office:value-type="float" office:value="0" table:formula="of:=COUNTIFS([.$E$2:.$E$26];&quot;=częściowa&quot;;[.$D$2:.$D$26];&quot;&gt;50&quot;;[.$D$2:.$D$26];&quot;&lt;=60&quot;;[.$C$2:.$C$26];&quot;=Mężczyzna&quot;)" table:style-name="ce53">
            <text:p>0</text:p>
          </table:table-cell>
          <table:table-cell office:value-type="float" office:value="0" table:formula="of:=COUNTIFS([.$E$2:.$E$26];&quot;=częściowa&quot;;[.$D$2:.$D$26];&quot;&gt;60&quot;;[.$D$2:.$D$26];&quot;&lt;=70&quot;;[.$C$2:.$C$26];&quot;=Mężczyzna&quot;)" table:style-name="ce53">
            <text:p>0</text:p>
            <draw:frame draw:z-index="9" draw:id="id10" draw:style-name="a10" draw:name="Wykres 11" svg:x="0.16146in" svg:y="0.11458in" svg:width="5.50521in" svg:height="3.5520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office:value-type="float" office:value="0" table:formula="of:=COUNTIFS([.$E$2:.$E$26];&quot;=częściow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E$2:.$E$26];&quot;=częściowa&quot;;[.$D$2:.$D$26];&quot;&gt;80&quot;;[.$C$2:.$C$26];&quot;=&quot;&quot;Mężczyzna&quot;)" table:style-name="ce53">
            <text:p>0</text:p>
          </table:table-cell>
          <table:table-cell table:style-name="ce53"/>
          <table:table-cell office:value-type="float" office:value="0" table:formula="of:=COUNTIFS([.$F$2:.$F$26];&quot;=częściowa&quot;;[.$D$2:.$D$26];&quot;&lt;=20&quot;;[.$C$2:.$C$26];&quot;=Mężczyzna&quot;)" table:style-name="ce53">
            <text:p>0</text:p>
          </table:table-cell>
          <table:table-cell office:value-type="float" office:value="0" table:formula="of:=COUNTIFS([.$F$2:.$F$26];&quot;=częściowa&quot;;[.$D$2:.$D$26];&quot;&gt;20&quot;;[.$D$2:.$D$26];&quot;&lt;=30&quot;;[.$C$2:.$C$26];&quot;=Mężczyzna&quot;)" table:style-name="ce53">
            <text:p>0</text:p>
          </table:table-cell>
          <table:table-cell office:value-type="float" office:value="0" table:formula="of:=COUNTIFS([.$F$2:.$F$26];&quot;=częściowa&quot;;[.$D$2:.$D$26];&quot;&gt;30&quot;;[.$D$2:.$D$26];&quot;&lt;=40&quot;;[.$C$2:.$C$26];&quot;=Mężczyzna&quot;)" table:style-name="ce53">
            <text:p>0</text:p>
          </table:table-cell>
          <table:table-cell office:value-type="float" office:value="0" table:formula="of:=COUNTIFS([.$F$2:.$F$26];&quot;=częściowa&quot;;[.$D$2:.$D$26];&quot;&gt;40&quot;;[.$D$2:.$D$26];&quot;&lt;=50&quot;;[.$C$2:.$C$26];&quot;=Mężczyzna&quot;)" table:style-name="ce53">
            <text:p>0</text:p>
          </table:table-cell>
          <table:table-cell office:value-type="float" office:value="0" table:formula="of:=COUNTIFS([.$F$2:.$F$26];&quot;=częściowa&quot;;[.$D$2:.$D$26];&quot;&gt;50&quot;;[.$D$2:.$D$26];&quot;&lt;=60&quot;;[.$C$2:.$C$26];&quot;=Mężczyzna&quot;)" table:style-name="ce53">
            <text:p>0</text:p>
          </table:table-cell>
          <table:table-cell office:value-type="float" office:value="0" table:formula="of:=COUNTIFS([.$F$2:.$F$26];&quot;=częściowa&quot;;[.$D$2:.$D$26];&quot;&gt;60&quot;;[.$D$2:.$D$26];&quot;&lt;=70&quot;;[.$C$2:.$C$26];&quot;=Mężczyzna&quot;)" table:style-name="ce53">
            <text:p>0</text:p>
          </table:table-cell>
          <table:table-cell office:value-type="float" office:value="0" table:formula="of:=COUNTIFS([.$F$2:.$F$26];&quot;=częściow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F$2:.$F$26];&quot;=częściowa&quot;;[.$D$2:.$D$26];&quot;&gt;80&quot;;[.$C$2:.$C$26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progresja</text:p>
          </table:table-cell>
          <table:table-cell office:value-type="float" office:value="0" table:formula="of:=COUNTIFS([.$E$2:.$E$26];&quot;=progresja&quot;;[.$D$2:.$D$26];&quot;&lt;=20&quot;;[.$C$2:.$C$26];&quot;=Mężczyzna&quot;)" table:style-name="ce53">
            <text:p>0</text:p>
          </table:table-cell>
          <table:table-cell office:value-type="float" office:value="0" table:formula="of:=COUNTIFS([.$E$2:.$E$26];&quot;=progresja&quot;;[.$D$2:.$D$26];&quot;&gt;20&quot;;[.$D$2:.$D$26];&quot;&lt;=30&quot;;[.$C$2:.$C$26];&quot;=Mężczyzna&quot;)" table:style-name="ce53">
            <text:p>0</text:p>
          </table:table-cell>
          <table:table-cell office:value-type="float" office:value="0" table:formula="of:=COUNTIFS([.$E$2:.$E$26];&quot;=progresja&quot;;[.$D$2:.$D$26];&quot;&gt;30&quot;;[.$D$2:.$D$26];&quot;&lt;=40&quot;;[.$C$2:.$C$26];&quot;=Mężczyzna&quot;)" table:style-name="ce53">
            <text:p>0</text:p>
          </table:table-cell>
          <table:table-cell office:value-type="float" office:value="0" table:formula="of:=COUNTIFS([.$E$2:.$E$26];&quot;=progresja&quot;;[.$D$2:.$D$26];&quot;&gt;40&quot;;[.$D$2:.$D$26];&quot;&lt;=50&quot;;[.$C$2:.$C$26];&quot;=Mężczyzna&quot;)" table:style-name="ce53">
            <text:p>0</text:p>
          </table:table-cell>
          <table:table-cell office:value-type="float" office:value="0" table:formula="of:=COUNTIFS([.$E$2:.$E$26];&quot;=progresja&quot;;[.$D$2:.$D$26];&quot;&gt;50&quot;;[.$D$2:.$D$26];&quot;&lt;=60&quot;;[.$C$2:.$C$26];&quot;=Mężczyzna&quot;)" table:style-name="ce53">
            <text:p>0</text:p>
          </table:table-cell>
          <table:table-cell office:value-type="float" office:value="0" table:formula="of:=COUNTIFS([.$E$2:.$E$26];&quot;=progresja&quot;;[.$D$2:.$D$26];&quot;&gt;60&quot;;[.$D$2:.$D$26];&quot;&lt;=70&quot;;[.$C$2:.$C$26];&quot;=Mężczyzna&quot;)" table:style-name="ce53">
            <text:p>0</text:p>
          </table:table-cell>
          <table:table-cell office:value-type="float" office:value="0" table:formula="of:=COUNTIFS([.$E$2:.$E$26];&quot;=progresj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E$2:.$E$26];&quot;=progresja&quot;;[.$D$2:.$D$26];&quot;&gt;80&quot;;[.$C$2:.$C$26];&quot;=Mężczyzna&quot;)" table:style-name="ce53">
            <text:p>0</text:p>
          </table:table-cell>
          <table:table-cell table:style-name="ce53"/>
          <table:table-cell office:value-type="float" office:value="0" table:formula="of:=COUNTIFS([.$F$2:.$F$26];&quot;=progresja&quot;;[.$D$2:.$D$26];&quot;&lt;=20&quot;;[.$C$2:.$C$26];&quot;=Mężczyzna&quot;)" table:style-name="ce53">
            <text:p>0</text:p>
          </table:table-cell>
          <table:table-cell office:value-type="float" office:value="0" table:formula="of:=COUNTIFS([.$F$2:.$F$26];&quot;=progresja&quot;;[.$D$2:.$D$26];&quot;&gt;20&quot;;[.$D$2:.$D$26];&quot;&lt;=30&quot;;[.$C$2:.$C$26];&quot;=Mężczyzna&quot;)" table:style-name="ce53">
            <text:p>0</text:p>
          </table:table-cell>
          <table:table-cell office:value-type="float" office:value="1" table:formula="of:=COUNTIFS([.$F$2:.$F$26];&quot;=progresja&quot;;[.$D$2:.$D$26];&quot;&gt;30&quot;;[.$D$2:.$D$26];&quot;&lt;=40&quot;;[.$C$2:.$C$26];&quot;=Mężczyzna&quot;)" table:style-name="ce53">
            <text:p>1</text:p>
          </table:table-cell>
          <table:table-cell office:value-type="float" office:value="0" table:formula="of:=COUNTIFS([.$F$2:.$F$26];&quot;=progresja&quot;;[.$D$2:.$D$26];&quot;&gt;40&quot;;[.$D$2:.$D$26];&quot;&lt;=50&quot;;[.$C$2:.$C$26];&quot;=Mężczyzna&quot;)" table:style-name="ce53">
            <text:p>0</text:p>
          </table:table-cell>
          <table:table-cell office:value-type="float" office:value="0" table:formula="of:=COUNTIFS([.$F$2:.$F$26];&quot;=progresja&quot;;[.$D$2:.$D$26];&quot;&gt;50&quot;;[.$D$2:.$D$26];&quot;&lt;=60&quot;;[.$C$2:.$C$26];&quot;=Mężczyzna&quot;)" table:style-name="ce53">
            <text:p>0</text:p>
          </table:table-cell>
          <table:table-cell office:value-type="float" office:value="0" table:formula="of:=COUNTIFS([.$F$2:.$F$26];&quot;=progresja&quot;;[.$D$2:.$D$26];&quot;&gt;60&quot;;[.$D$2:.$D$26];&quot;&lt;=70&quot;;[.$C$2:.$C$26];&quot;=Mężczyzna&quot;)" table:style-name="ce53">
            <text:p>0</text:p>
          </table:table-cell>
          <table:table-cell office:value-type="float" office:value="0" table:formula="of:=COUNTIFS([.$F$2:.$F$26];&quot;=progresj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F$2:.$F$26];&quot;=progresja&quot;;[.$D$2:.$D$26];&quot;&gt;80&quot;;[.$C$2:.$C$26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wznowa</text:p>
          </table:table-cell>
          <table:table-cell office:value-type="float" office:value="0" table:formula="of:=COUNTIFS([.$E$2:.$E$26];&quot;=wznowa&quot;;[.$D$2:.$D$26];&quot;&lt;=20&quot;;[.$C$2:.$C$26];&quot;=Mężczyzna&quot;)" table:style-name="ce53">
            <text:p>0</text:p>
          </table:table-cell>
          <table:table-cell office:value-type="float" office:value="0" table:formula="of:=COUNTIFS([.$E$2:.$E$26];&quot;=wznowa&quot;;[.$D$2:.$D$26];&quot;&gt;20&quot;;[.$D$2:.$D$26];&quot;&lt;=30&quot;;[.$C$2:.$C$26];&quot;=Mężczyzna&quot;)" table:style-name="ce53">
            <text:p>0</text:p>
          </table:table-cell>
          <table:table-cell office:value-type="float" office:value="0" table:formula="of:=COUNTIFS([.$E$2:.$E$26];&quot;=wznowa&quot;;[.$D$2:.$D$26];&quot;&gt;30&quot;;[.$D$2:.$D$26];&quot;&lt;=40&quot;;[.$C$2:.$C$26];&quot;=Mężczyzna&quot;)" table:style-name="ce53">
            <text:p>0</text:p>
          </table:table-cell>
          <table:table-cell office:value-type="float" office:value="0" table:formula="of:=COUNTIFS([.$E$2:.$E$26];&quot;=wznowa&quot;;[.$D$2:.$D$26];&quot;&gt;40&quot;;[.$D$2:.$D$26];&quot;&lt;=50&quot;;[.$C$2:.$C$26];&quot;=Mężczyzna&quot;)" table:style-name="ce53">
            <text:p>0</text:p>
          </table:table-cell>
          <table:table-cell office:value-type="float" office:value="0" table:formula="of:=COUNTIFS([.$E$2:.$E$26];&quot;=wznowa&quot;;[.$D$2:.$D$26];&quot;&gt;50&quot;;[.$D$2:.$D$26];&quot;&lt;=60&quot;;[.$C$2:.$C$26];&quot;=Mężczyzna&quot;)" table:style-name="ce53">
            <text:p>0</text:p>
          </table:table-cell>
          <table:table-cell office:value-type="float" office:value="0" table:formula="of:=COUNTIFS([.$E$2:.$E$26];&quot;=wznowa&quot;;[.$D$2:.$D$26];&quot;&gt;60&quot;;[.$D$2:.$D$26];&quot;&lt;=70&quot;;[.$C$2:.$C$26];&quot;=Mężczyzna&quot;)" table:style-name="ce53">
            <text:p>0</text:p>
          </table:table-cell>
          <table:table-cell office:value-type="float" office:value="0" table:formula="of:=COUNTIFS([.$E$2:.$E$26];&quot;=wznowa&quot;;[.$D$2:.$D$26];&quot;&gt;70&quot;;[.$D$2:.$D$26];&quot;&lt;=80&quot;;[.$C$2:.$C$26];&quot;=Mężczyzna&quot;)" table:style-name="ce53">
            <text:p>0</text:p>
          </table:table-cell>
          <table:table-cell office:value-type="float" office:value="0" table:formula="of:=COUNTIFS([.$E$2:.$E$26];&quot;=wznowa&quot;;[.$D$2:.$D$26];&quot;&gt;80&quot;;[.$C$2:.$C$26];&quot;=Mężczyzna&quot;)" table:style-name="ce53">
            <text:p>0</text:p>
          </table:table-cell>
          <table:table-cell table:style-name="ce53"/>
          <table:table-cell office:value-type="float" office:value="0" table:formula="of:=COUNTIFS([.$F$2:.$F$26];&quot;=wznowa&quot;;[.$D$2:.$D$26];&quot;&lt;=20&quot;;[.$C$2:.$C$26];&quot;=Mężczyzna&quot;)" table:style-name="ce53">
            <text:p>0</text:p>
          </table:table-cell>
          <table:table-cell office:value-type="float" office:value="2" table:formula="of:=COUNTIFS([.$F$2:.$F$26];&quot;=wznowa&quot;;[.$D$2:.$D$26];&quot;&gt;20&quot;;[.$D$2:.$D$26];&quot;&lt;=30&quot;;[.$C$2:.$C$26];&quot;=Mężczyzna&quot;)" table:style-name="ce53">
            <text:p>2</text:p>
          </table:table-cell>
          <table:table-cell office:value-type="float" office:value="0" table:formula="of:=COUNTIFS([.$F$2:.$F$26];&quot;=wznowa&quot;;[.$D$2:.$D$26];&quot;&gt;30&quot;;[.$D$2:.$D$26];&quot;&lt;=40&quot;;[.$C$2:.$C$26];&quot;=Mężczyzna&quot;)" table:style-name="ce53">
            <text:p>0</text:p>
          </table:table-cell>
          <table:table-cell office:value-type="float" office:value="1" table:formula="of:=COUNTIFS([.$F$2:.$F$26];&quot;=wznowa&quot;;[.$D$2:.$D$26];&quot;&gt;40&quot;;[.$D$2:.$D$26];&quot;&lt;=50&quot;;[.$C$2:.$C$26];&quot;=Mężczyzna&quot;)" table:style-name="ce53">
            <text:p>1</text:p>
          </table:table-cell>
          <table:table-cell office:value-type="float" office:value="0" table:formula="of:=COUNTIFS([.$F$2:.$F$26];&quot;=wznowa&quot;;[.$D$2:.$D$26];&quot;&gt;50&quot;;[.$D$2:.$D$26];&quot;&lt;=60&quot;;[.$C$2:.$C$26];&quot;=Mężczyzna&quot;)" table:style-name="ce53">
            <text:p>0</text:p>
          </table:table-cell>
          <table:table-cell office:value-type="float" office:value="0" table:formula="of:=COUNTIFS([.$F$2:.$F$26];&quot;=wznowa&quot;;[.$D$2:.$D$26];&quot;&gt;60&quot;;[.$D$2:.$D$26];&quot;&lt;=70&quot;;[.$C$2:.$C$26];&quot;=Mężczyzna&quot;)" table:style-name="ce53">
            <text:p>0</text:p>
          </table:table-cell>
          <table:table-cell office:value-type="float" office:value="2" table:formula="of:=COUNTIFS([.$F$2:.$F$26];&quot;=wznowa&quot;;[.$D$2:.$D$26];&quot;&gt;70&quot;;[.$D$2:.$D$26];&quot;&lt;=80&quot;;[.$C$2:.$C$26];&quot;=Mężczyzna&quot;)" table:style-name="ce53">
            <text:p>2</text:p>
          </table:table-cell>
          <table:table-cell office:value-type="float" office:value="0" table:formula="of:=COUNTIFS([.$F$2:.$F$26];&quot;=wznowa&quot;;[.$D$2:.$D$26];&quot;&gt;80&quot;;[.$C$2:.$C$26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suma</text:p>
          </table:table-cell>
          <table:table-cell office:value-type="float" office:value="1" table:formula="of:=SUM([.B73:.B77])" table:style-name="ce53">
            <text:p>1</text:p>
          </table:table-cell>
          <table:table-cell office:value-type="float" office:value="4" table:formula="of:=SUM([.C73:.C77])" table:style-name="ce53">
            <text:p>4</text:p>
          </table:table-cell>
          <table:table-cell office:value-type="float" office:value="2" table:formula="of:=SUM([.D73:.D77])" table:style-name="ce53">
            <text:p>2</text:p>
          </table:table-cell>
          <table:table-cell office:value-type="float" office:value="2" table:formula="of:=SUM([.E73:.E77])" table:style-name="ce53">
            <text:p>2</text:p>
          </table:table-cell>
          <table:table-cell office:value-type="float" office:value="2" table:formula="of:=SUM([.F73:.F77])" table:style-name="ce53">
            <text:p>2</text:p>
          </table:table-cell>
          <table:table-cell office:value-type="float" office:value="1" table:formula="of:=SUM([.G73:.G77])" table:style-name="ce53">
            <text:p>1</text:p>
          </table:table-cell>
          <table:table-cell office:value-type="float" office:value="2" table:formula="of:=SUM([.H73:.H77])" table:style-name="ce53">
            <text:p>2</text:p>
          </table:table-cell>
          <table:table-cell office:value-type="float" office:value="0" table:formula="of:=SUM([.I73:.I77])" table:style-name="ce53">
            <text:p>0</text:p>
          </table:table-cell>
          <table:table-cell table:style-name="ce53"/>
          <table:table-cell office:value-type="float" office:value="1" table:formula="of:=SUM([.K73:.K77])" table:style-name="ce53">
            <text:p>1</text:p>
          </table:table-cell>
          <table:table-cell office:value-type="float" office:value="5" table:formula="of:=SUM([.L73:.L77])" table:style-name="ce53">
            <text:p>5</text:p>
          </table:table-cell>
          <table:table-cell office:value-type="float" office:value="2" table:formula="of:=SUM([.M73:.M77])" table:style-name="ce53">
            <text:p>2</text:p>
          </table:table-cell>
          <table:table-cell office:value-type="float" office:value="2" table:formula="of:=SUM([.N73:.N77])" table:style-name="ce53">
            <text:p>2</text:p>
          </table:table-cell>
          <table:table-cell office:value-type="float" office:value="2" table:formula="of:=SUM([.O73:.O77])" table:style-name="ce53">
            <text:p>2</text:p>
          </table:table-cell>
          <table:table-cell office:value-type="float" office:value="1" table:formula="of:=SUM([.P73:.P77])" table:style-name="ce53">
            <text:p>1</text:p>
          </table:table-cell>
          <table:table-cell office:value-type="float" office:value="2" table:formula="of:=SUM([.Q73:.Q77])" table:style-name="ce53">
            <text:p>2</text:p>
          </table:table-cell>
          <table:table-cell office:value-type="float" office:value="0" table:formula="of:=SUM([.R73:.R77])" table:style-name="ce53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3">
            <text:p>SUMA</text:p>
          </table:table-cell>
          <table:table-cell office:value-type="float" office:value="24" table:formula="of:=SUM([.B65:.I69];[.B73:.I77])" table:style-name="ce1">
            <text:p>24</text:p>
          </table:table-cell>
          <table:table-cell table:number-columns-repeated="8" table:style-name="ce1"/>
          <table:table-cell office:value-type="string" table:style-name="ce53">
            <text:p>SUMA</text:p>
          </table:table-cell>
          <table:table-cell office:value-type="float" office:value="25" table:formula="of:=SUM([.K65:.R69];[.K73:.R77])" table:style-name="ce1">
            <text:p>25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51">
            <text:p>zalezność od płci</text:p>
          </table:table-cell>
          <table:table-cell table:number-columns-repeated="3" table:style-name="ce51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51">
            <text:p>nhl</text:p>
          </table:table-cell>
          <table:table-cell table:style-name="ce51"/>
          <table:table-cell office:value-type="string" table:style-name="ce51">
            <text:p>nhl</text:p>
          </table:table-cell>
          <table:table-cell table:style-name="ce51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51">
            <text:p>trakcie</text:p>
          </table:table-cell>
          <table:table-cell table:style-name="ce51"/>
          <table:table-cell office:value-type="string" table:style-name="ce51">
            <text:p>po</text:p>
          </table:table-cell>
          <table:table-cell table:style-name="ce51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51">
            <text:p>kobieta</text:p>
          </table:table-cell>
          <table:table-cell office:value-type="string" table:style-name="ce51">
            <text:p>mezczyzna</text:p>
          </table:table-cell>
          <table:table-cell office:value-type="string" table:style-name="ce51">
            <text:p>kobieta</text:p>
          </table:table-cell>
          <table:table-cell office:value-type="string" table:style-name="ce51">
            <text:p>mezczyzna</text:p>
          </table:table-cell>
          <table:table-cell table:number-columns-repeated="13" table:style-name="ce1"/>
          <table:table-cell table:style-name="ce1">
            <draw:frame draw:z-index="7" draw:id="id8" draw:style-name="a8" draw:name="Wykres 18" svg:x="0.11806in" svg:y="0.05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string" table:style-name="ce51">
            <text:p>bardzo dobra</text:p>
          </table:table-cell>
          <table:table-cell office:value-type="float" office:value="6" table:formula="of:=COUNTIFS([.$L$2:.$L$32];&quot;=bardzo dobra&quot;;[.$J$2:.$J$32];&quot;=Kobieta&quot;)" table:style-name="ce51">
            <text:p>6</text:p>
          </table:table-cell>
          <table:table-cell office:value-type="float" office:value="1" table:formula="of:=COUNTIFS([.$L$2:.$L$32];&quot;=bardzo dobra&quot;;[.$J$2:.$J$32];&quot;=Mężczyzna&quot;)" table:style-name="ce51">
            <text:p>1</text:p>
          </table:table-cell>
          <table:table-cell office:value-type="float" office:value="4" table:formula="of:=COUNTIFS([.$M$2:.$M$32];&quot;=bardzo dobra&quot;;[.$J$2:.$J$32];&quot;=Kobieta&quot;)" table:style-name="ce51">
            <text:p>4</text:p>
          </table:table-cell>
          <table:table-cell office:value-type="float" office:value="1" table:formula="of:=COUNTIFS([.$M$2:.$M$32];&quot;=bardzo dobra&quot;;[.$J$2:.$J$32];&quot;=Mężczyzna&quot;)" table:style-name="ce5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dobra</text:p>
          </table:table-cell>
          <table:table-cell office:value-type="float" office:value="6" table:formula="of:=COUNTIFS([.$L$2:.$L$32];&quot;=dobra&quot;;[.$J$2:.$J$32];&quot;=Kobieta&quot;)" table:style-name="ce51">
            <text:p>6</text:p>
          </table:table-cell>
          <table:table-cell office:value-type="float" office:value="11" table:formula="of:=COUNTIFS([.$L$2:.$L$32];&quot;=dobra&quot;;[.$J$2:.$J$32];&quot;=Mężczyzna&quot;)" table:style-name="ce51">
            <text:p>11</text:p>
          </table:table-cell>
          <table:table-cell office:value-type="float" office:value="11" table:formula="of:=COUNTIFS([.$M$2:.$M$32];&quot;=dobra&quot;;[.$J$2:.$J$32];&quot;=Kobieta&quot;)" table:style-name="ce51">
            <text:p>11</text:p>
          </table:table-cell>
          <table:table-cell office:value-type="float" office:value="9" table:formula="of:=COUNTIFS([.$M$2:.$M$32];&quot;=dobra&quot;;[.$J$2:.$J$32];&quot;=Mężczyzna&quot;)" table:style-name="ce51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częściowa</text:p>
          </table:table-cell>
          <table:table-cell office:value-type="float" office:value="3" table:formula="of:=COUNTIFS([.$L$2:.$L$32];&quot;=częściowa&quot;;[.$J$2:.$J$32];&quot;=Kobieta&quot;)" table:style-name="ce51">
            <text:p>3</text:p>
          </table:table-cell>
          <table:table-cell office:value-type="float" office:value="3" table:formula="of:=COUNTIFS([.$L$2:.$L$32];&quot;=częściowa&quot;;[.$J$2:.$J$32];&quot;=Mężczyzna&quot;)" table:style-name="ce51">
            <text:p>3</text:p>
          </table:table-cell>
          <table:table-cell office:value-type="float" office:value="0" table:formula="of:=COUNTIFS([.$M$2:.$M$32];&quot;=częściowa&quot;;[.$J$2:.$J$32];&quot;=Kobieta&quot;)" table:style-name="ce51">
            <text:p>0</text:p>
          </table:table-cell>
          <table:table-cell office:value-type="float" office:value="0" table:formula="of:=COUNTIFS([.$M$2:.$M$32];&quot;=częściowa&quot;;[.$J$2:.$J$32];&quot;=Mężczyzna&quot;)" table:style-name="ce5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progresja</text:p>
          </table:table-cell>
          <table:table-cell office:value-type="float" office:value="1" table:formula="of:=COUNTIFS([.$L$2:.$L$32];&quot;=progresja&quot;;[.$J$2:.$J$32];&quot;=Kobieta&quot;)" table:style-name="ce51">
            <text:p>1</text:p>
          </table:table-cell>
          <table:table-cell office:value-type="float" office:value="0" table:formula="of:=COUNTIFS([.$L$2:.$L$32];&quot;=progresja&quot;;[.$J$2:.$J$32];&quot;=Mężczyzna&quot;)" table:style-name="ce51">
            <text:p>0</text:p>
          </table:table-cell>
          <table:table-cell office:value-type="float" office:value="0" table:formula="of:=COUNTIFS([.$M$2:.$M$32];&quot;=progresja&quot;;[.$J$2:.$J$32];&quot;=Kobieta&quot;)" table:style-name="ce51">
            <text:p>0</text:p>
          </table:table-cell>
          <table:table-cell office:value-type="float" office:value="2" table:formula="of:=COUNTIFS([.$M$2:.$M$32];&quot;=progresja&quot;;[.$J$2:.$J$32];&quot;=Mężczyzna&quot;)" table:style-name="ce5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wznowa</text:p>
          </table:table-cell>
          <table:table-cell office:value-type="float" office:value="0" table:formula="of:=COUNTIFS([.$L$2:.$L$32];&quot;=wznowa&quot;;[.$J$2:.$J$32];&quot;=Kobieta&quot;)" table:style-name="ce51">
            <text:p>0</text:p>
          </table:table-cell>
          <table:table-cell office:value-type="float" office:value="0" table:formula="of:=COUNTIFS([.$L$2:.$L$32];&quot;=wznowa&quot;;[.$J$2:.$J$32];&quot;=Mężczyzna&quot;)" table:style-name="ce51">
            <text:p>0</text:p>
          </table:table-cell>
          <table:table-cell office:value-type="float" office:value="1" table:formula="of:=COUNTIFS([.$M$2:.$M$32];&quot;=wznowa&quot;;[.$J$2:.$J$32];&quot;=Kobieta&quot;)" table:style-name="ce51">
            <text:p>1</text:p>
          </table:table-cell>
          <table:table-cell office:value-type="float" office:value="3" table:formula="of:=COUNTIFS([.$M$2:.$M$32];&quot;=wznowa&quot;;[.$J$2:.$J$32];&quot;=Mężczyzna&quot;)" table:style-name="ce5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1">
            <text:p>suma</text:p>
          </table:table-cell>
          <table:table-cell office:value-type="float" office:value="16" table:formula="of:=SUM([.B85:.B89])" table:style-name="ce51">
            <text:p>16</text:p>
          </table:table-cell>
          <table:table-cell office:value-type="float" office:value="15" table:formula="of:=SUM([.C85:.C89])" table:style-name="ce51">
            <text:p>15</text:p>
          </table:table-cell>
          <table:table-cell office:value-type="float" office:value="16" table:formula="of:=SUM([.D85:.D89])" table:style-name="ce51">
            <text:p>16</text:p>
          </table:table-cell>
          <table:table-cell office:value-type="float" office:value="15" table:formula="of:=SUM([.E85:.E89])" table:style-name="ce51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4">
            <text:p>zależność od wieki</text:p>
          </table:table-cell>
          <table:table-cell table:number-columns-repeated="3" table:style-name="ce54"/>
          <table:table-cell table:number-columns-repeated="14" table:style-name="ce52"/>
          <table:table-cell table:number-columns-repeated="16366"/>
        </table:table-row>
        <table:table-row table:style-name="ro1">
          <table:table-cell table:style-name="ce52"/>
          <table:table-cell office:value-type="string" table:style-name="ce52">
            <text:p>nhl w trakcie</text:p>
          </table:table-cell>
          <table:table-cell table:number-columns-repeated="8" table:style-name="ce52"/>
          <table:table-cell office:value-type="string" table:style-name="ce52">
            <text:p>nhl po</text:p>
          </table:table-cell>
          <table:table-cell table:number-columns-repeated="7" table:style-name="ce52"/>
          <table:table-cell table:number-columns-repeated="16366"/>
        </table:table-row>
        <table:table-row table:style-name="ro1">
          <table:table-cell table:style-name="ce52"/>
          <table:table-cell office:value-type="string" table:style-name="ce52">
            <text:p>&lt;21</text:p>
          </table:table-cell>
          <table:table-cell office:value-type="string" table:style-name="ce52">
            <text:p>21-30</text:p>
          </table:table-cell>
          <table:table-cell office:value-type="string" table:style-name="ce52">
            <text:p>31-40</text:p>
          </table:table-cell>
          <table:table-cell office:value-type="string" table:style-name="ce52">
            <text:p>41-50</text:p>
          </table:table-cell>
          <table:table-cell office:value-type="string" table:style-name="ce52">
            <text:p>51-60</text:p>
          </table:table-cell>
          <table:table-cell office:value-type="string" table:style-name="ce52">
            <text:p>61-70</text:p>
          </table:table-cell>
          <table:table-cell office:value-type="string" table:style-name="ce52">
            <text:p>71-80</text:p>
          </table:table-cell>
          <table:table-cell office:value-type="string" table:style-name="ce52">
            <text:p>&gt;80</text:p>
          </table:table-cell>
          <table:table-cell table:style-name="ce52"/>
          <table:table-cell office:value-type="string" table:style-name="ce52">
            <text:p>&lt;21</text:p>
          </table:table-cell>
          <table:table-cell office:value-type="string" table:style-name="ce52">
            <text:p>21-30</text:p>
          </table:table-cell>
          <table:table-cell office:value-type="string" table:style-name="ce52">
            <text:p>31-40</text:p>
          </table:table-cell>
          <table:table-cell office:value-type="string" table:style-name="ce52">
            <text:p>41-50</text:p>
          </table:table-cell>
          <table:table-cell office:value-type="string" table:style-name="ce52">
            <text:p>51-60</text:p>
          </table:table-cell>
          <table:table-cell office:value-type="string" table:style-name="ce52">
            <text:p>61-70</text:p>
          </table:table-cell>
          <table:table-cell office:value-type="string" table:style-name="ce52">
            <text:p>71-80</text:p>
          </table:table-cell>
          <table:table-cell office:value-type="string" table:style-name="ce52">
            <text:p>&gt;80</text:p>
          </table:table-cell>
          <table:table-cell table:number-columns-repeated="16366"/>
        </table:table-row>
        <table:table-row table:style-name="ro1">
          <table:table-cell office:value-type="string" table:style-name="ce52">
            <text:p>bardzo dobra</text:p>
          </table:table-cell>
          <table:table-cell office:value-type="float" office:value="0" table:formula="of:=COUNTIFS([.$L$2:.$L$32];&quot;=bardzo dobra&quot;;[.$K$2:.$K$32];&quot;&lt;=20&quot;)" table:style-name="ce52">
            <text:p>0</text:p>
          </table:table-cell>
          <table:table-cell office:value-type="float" office:value="0" table:formula="of:=COUNTIFS([.$L$2:.$L$32];&quot;=bardzo dobra&quot;;[.$K$2:.$K$32];&quot;&gt;20&quot;;[.$K$2:.$K$32];&quot;&lt;=30&quot;)" table:style-name="ce52">
            <text:p>0</text:p>
          </table:table-cell>
          <table:table-cell office:value-type="float" office:value="1" table:formula="of:=COUNTIFS([.$L$2:.$L$32];&quot;=bardzo dobra&quot;;[.$K$2:.$K$32];&quot;&gt;30&quot;;[.$K$2:.$K$32];&quot;&lt;=40&quot;)" table:style-name="ce52">
            <text:p>1</text:p>
          </table:table-cell>
          <table:table-cell office:value-type="float" office:value="2" table:formula="of:=COUNTIFS([.$L$2:.$L$32];&quot;=bardzo dobra&quot;;[.$K$2:.$K$32];&quot;&gt;40&quot;;[.$K$2:.$K$32];&quot;&lt;=50&quot;)" table:style-name="ce52">
            <text:p>2</text:p>
          </table:table-cell>
          <table:table-cell office:value-type="float" office:value="2" table:formula="of:=COUNTIFS([.$L$2:.$L$32];&quot;=bardzo dobra&quot;;[.$K$2:.$K$32];&quot;&gt;50&quot;;[.$K$2:.$K$32];&quot;&lt;=60&quot;)" table:style-name="ce52">
            <text:p>2</text:p>
          </table:table-cell>
          <table:table-cell office:value-type="float" office:value="0" table:formula="of:=COUNTIFS([.$L$2:.$L$32];&quot;=bardzo dobra&quot;;[.$K$2:.$K$32];&quot;&gt;60&quot;;[.$K$2:.$K$32];&quot;&lt;=70&quot;)" table:style-name="ce52">
            <text:p>0</text:p>
          </table:table-cell>
          <table:table-cell office:value-type="float" office:value="2" table:formula="of:=COUNTIFS([.$L$2:.$L$32];&quot;=bardzo dobra&quot;;[.$K$2:.$K$32];&quot;&gt;70&quot;;[.$K$2:.$K$32];&quot;&lt;=80&quot;)" table:style-name="ce52">
            <text:p>2</text:p>
          </table:table-cell>
          <table:table-cell office:value-type="float" office:value="0" table:formula="of:=COUNTIFS([.$L$2:.$L$32];&quot;=bardzo dobra&quot;;[.$K$2:.$K$32];&quot;&gt;80&quot;)" table:style-name="ce52">
            <text:p>0</text:p>
          </table:table-cell>
          <table:table-cell table:style-name="ce52"/>
          <table:table-cell office:value-type="float" office:value="0" table:formula="of:=COUNTIFS([.$M$2:.$M$32];&quot;=bardzo dobra&quot;;[.$K$2:.$K$32];&quot;&lt;=20&quot;)" table:style-name="ce52">
            <text:p>0</text:p>
          </table:table-cell>
          <table:table-cell office:value-type="float" office:value="0" table:formula="of:=COUNTIFS([.$M$2:.$M$32];&quot;=bardzo dobra&quot;;[.$K$2:.$K$32];&quot;&gt;20&quot;;[.$K$2:.$K$32];&quot;&lt;=30&quot;)" table:style-name="ce52">
            <text:p>0</text:p>
          </table:table-cell>
          <table:table-cell office:value-type="float" office:value="1" table:formula="of:=COUNTIFS([.$M$2:.$M$32];&quot;=bardzo dobra&quot;;[.$K$2:.$K$32];&quot;&gt;30&quot;;[.$K$2:.$K$32];&quot;&lt;=40&quot;)" table:style-name="ce52">
            <text:p>1</text:p>
          </table:table-cell>
          <table:table-cell office:value-type="float" office:value="2" table:formula="of:=COUNTIFS([.$M$2:.$M$32];&quot;=bardzo dobra&quot;;[.$K$2:.$K$32];&quot;&gt;40&quot;;[.$K$2:.$K$32];&quot;&lt;=50&quot;)" table:style-name="ce52">
            <text:p>2</text:p>
          </table:table-cell>
          <table:table-cell office:value-type="float" office:value="0" table:formula="of:=COUNTIFS([.$M$2:.$M$32];&quot;=bardzo dobra&quot;;[.$K$2:.$K$32];&quot;&gt;50&quot;;[.$K$2:.$K$32];&quot;&lt;=60&quot;)" table:style-name="ce52">
            <text:p>0</text:p>
          </table:table-cell>
          <table:table-cell office:value-type="float" office:value="2" table:formula="of:=COUNTIFS([.$M$2:.$M$32];&quot;=bardzo dobra&quot;;[.$K$2:.$K$32];&quot;&gt;60&quot;;[.$K$2:.$K$32];&quot;&lt;=70&quot;)" table:style-name="ce52">
            <text:p>2</text:p>
          </table:table-cell>
          <table:table-cell office:value-type="float" office:value="0" table:formula="of:=COUNTIFS([.$M$2:.$M$32];&quot;=bardzo dobra&quot;;[.$K$2:.$K$32];&quot;&gt;70&quot;;[.$K$2:.$K$32];&quot;&lt;=80&quot;)" table:style-name="ce52">
            <text:p>0</text:p>
          </table:table-cell>
          <table:table-cell office:value-type="float" office:value="0" table:formula="of:=COUNTIFS([.$M$2:.$M$32];&quot;=bardzo dobra&quot;;[.$K$2:.$K$32];&quot;&gt;80&quot;)" table:style-name="ce5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2">
            <text:p>dobra</text:p>
          </table:table-cell>
          <table:table-cell office:value-type="float" office:value="0" table:formula="of:=COUNTIFS([.$L$2:.$L$32];&quot;=dobra&quot;;[.$K$2:.$K$32];&quot;&lt;=20&quot;)" table:style-name="ce52">
            <text:p>0</text:p>
          </table:table-cell>
          <table:table-cell office:value-type="float" office:value="0" table:formula="of:=COUNTIFS([.$L$2:.$L$32];&quot;=dobra&quot;;[.$K$2:.$K$32];&quot;&gt;20&quot;;[.$K$2:.$K$32];&quot;&lt;=30&quot;)" table:style-name="ce52">
            <text:p>0</text:p>
          </table:table-cell>
          <table:table-cell office:value-type="float" office:value="1" table:formula="of:=COUNTIFS([.$L$2:.$L$32];&quot;=dobra&quot;;[.$K$2:.$K$32];&quot;&gt;30&quot;;[.$K$2:.$K$32];&quot;&lt;=40&quot;)" table:style-name="ce52">
            <text:p>1</text:p>
          </table:table-cell>
          <table:table-cell office:value-type="float" office:value="3" table:formula="of:=COUNTIFS([.$L$2:.$L$32];&quot;=dobra&quot;;[.$K$2:.$K$32];&quot;&gt;40&quot;;[.$K$2:.$K$32];&quot;&lt;=50&quot;)" table:style-name="ce52">
            <text:p>3</text:p>
          </table:table-cell>
          <table:table-cell office:value-type="float" office:value="4" table:formula="of:=COUNTIFS([.$L$2:.$L$32];&quot;=dobra&quot;;[.$K$2:.$K$32];&quot;&gt;50&quot;;[.$K$2:.$K$32];&quot;&lt;=60&quot;)" table:style-name="ce52">
            <text:p>4</text:p>
          </table:table-cell>
          <table:table-cell office:value-type="float" office:value="5" table:formula="of:=COUNTIFS([.$L$2:.$L$32];&quot;=dobra&quot;;[.$K$2:.$K$32];&quot;&gt;60&quot;;[.$K$2:.$K$32];&quot;&lt;=70&quot;)" table:style-name="ce52">
            <text:p>5</text:p>
          </table:table-cell>
          <table:table-cell office:value-type="float" office:value="3" table:formula="of:=COUNTIFS([.$L$2:.$L$32];&quot;=dobra&quot;;[.$K$2:.$K$32];&quot;&gt;70&quot;;[.$K$2:.$K$32];&quot;&lt;=80&quot;)" table:style-name="ce52">
            <text:p>3</text:p>
          </table:table-cell>
          <table:table-cell office:value-type="float" office:value="1" table:formula="of:=COUNTIFS([.$L$2:.$L$32];&quot;=dobra&quot;;[.$K$2:.$K$32];&quot;&gt;80&quot;)" table:style-name="ce52">
            <text:p>1</text:p>
          </table:table-cell>
          <table:table-cell table:style-name="ce52"/>
          <table:table-cell office:value-type="float" office:value="0" table:formula="of:=COUNTIFS([.$M$2:.$M$32];&quot;=dobra&quot;;[.$K$2:.$K$32];&quot;&lt;=20&quot;)" table:style-name="ce52">
            <text:p>0</text:p>
          </table:table-cell>
          <table:table-cell office:value-type="float" office:value="0" table:formula="of:=COUNTIFS([.$M$2:.$M$32];&quot;=dobra&quot;;[.$K$2:.$K$32];&quot;&gt;20&quot;;[.$K$2:.$K$32];&quot;&lt;=30&quot;)" table:style-name="ce52">
            <text:p>0</text:p>
          </table:table-cell>
          <table:table-cell office:value-type="float" office:value="2" table:formula="of:=COUNTIFS([.$M$2:.$M$32];&quot;=dobra&quot;;[.$K$2:.$K$32];&quot;&gt;30&quot;;[.$K$2:.$K$32];&quot;&lt;=40&quot;)" table:style-name="ce52">
            <text:p>2</text:p>
          </table:table-cell>
          <table:table-cell office:value-type="float" office:value="3" table:formula="of:=COUNTIFS([.$M$2:.$M$32];&quot;=dobra&quot;;[.$K$2:.$K$32];&quot;&gt;40&quot;;[.$K$2:.$K$32];&quot;&lt;=50&quot;)" table:style-name="ce52">
            <text:p>3</text:p>
          </table:table-cell>
          <table:table-cell office:value-type="float" office:value="6" table:formula="of:=COUNTIFS([.$M$2:.$M$32];&quot;=dobra&quot;;[.$K$2:.$K$32];&quot;&gt;50&quot;;[.$K$2:.$K$32];&quot;&lt;=60&quot;)" table:style-name="ce52">
            <text:p>6</text:p>
          </table:table-cell>
          <table:table-cell office:value-type="float" office:value="4" table:formula="of:=COUNTIFS([.$M$2:.$M$32];&quot;=dobra&quot;;[.$K$2:.$K$32];&quot;&gt;60&quot;;[.$K$2:.$K$32];&quot;&lt;=70&quot;)" table:style-name="ce52">
            <text:p>4</text:p>
          </table:table-cell>
          <table:table-cell office:value-type="float" office:value="4" table:formula="of:=COUNTIFS([.$M$2:.$M$32];&quot;=dobra&quot;;[.$K$2:.$K$32];&quot;&gt;70&quot;;[.$K2:.$K$32];&quot;&lt;=80&quot;)" table:style-name="ce52">
            <text:p>4</text:p>
          </table:table-cell>
          <table:table-cell office:value-type="float" office:value="1" table:formula="of:=COUNTIFS([.$M$2:.$M$32];&quot;=dobra&quot;;[.$K$2:.$K$32];&quot;&gt;80&quot;)" table:style-name="ce5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52">
            <text:p>częściowa</text:p>
          </table:table-cell>
          <table:table-cell office:value-type="float" office:value="0" table:formula="of:=COUNTIFS([.$L$2:.$L$32];&quot;=częściowa&quot;;[.$K$2:.$K$32];&quot;&lt;=20&quot;)" table:style-name="ce52">
            <text:p>0</text:p>
          </table:table-cell>
          <table:table-cell office:value-type="float" office:value="0" table:formula="of:=COUNTIFS([.$L$2:.$L$32];&quot;=częściowa&quot;;[.$K$2:.$K$32];&quot;&gt;20&quot;;[.$K$2:.$K$32];&quot;&lt;=30&quot;)" table:style-name="ce52">
            <text:p>0</text:p>
          </table:table-cell>
          <table:table-cell office:value-type="float" office:value="1" table:formula="of:=COUNTIFS([.$L$2:.$L$32];&quot;=częściowa&quot;;[.$K$2:.$K$32];&quot;&gt;30&quot;;[.$K$2:.$K$32];&quot;&lt;=40&quot;)" table:style-name="ce52">
            <text:p>1</text:p>
          </table:table-cell>
          <table:table-cell office:value-type="float" office:value="1" table:formula="of:=COUNTIFS([.$L$2:.$L$32];&quot;=częściowa&quot;;[.$K$2:.$K$32];&quot;&gt;40&quot;;[.$K$2:.$K$32];&quot;&lt;=50&quot;)" table:style-name="ce52">
            <text:p>1</text:p>
          </table:table-cell>
          <table:table-cell office:value-type="float" office:value="1" table:formula="of:=COUNTIFS([.$L$2:.$L$32];&quot;=częściowa&quot;;[.$K$2:.$K$32];&quot;&gt;50&quot;;[.$K$2:.$K$32];&quot;&lt;=60&quot;)" table:style-name="ce52">
            <text:p>1</text:p>
          </table:table-cell>
          <table:table-cell office:value-type="float" office:value="2" table:formula="of:=COUNTIFS([.$L$2:.$L$32];&quot;=częściowa&quot;;[.$K$2:.$K$32];&quot;&gt;60&quot;;[.$K$2:.$K$32];&quot;&lt;=70&quot;)" table:style-name="ce52">
            <text:p>2</text:p>
          </table:table-cell>
          <table:table-cell office:value-type="float" office:value="0" table:formula="of:=COUNTIFS([.$L$2:.$L$32];&quot;=częściowa&quot;;[.$K$2:.$K$32];&quot;&gt;70&quot;;[.$K$2:.$K$32];&quot;&lt;=80&quot;)" table:style-name="ce52">
            <text:p>0</text:p>
          </table:table-cell>
          <table:table-cell office:value-type="float" office:value="1" table:formula="of:=COUNTIFS([.$L$2:.$L$32];&quot;=częściowa&quot;;[.$K$2:.$K$32];&quot;&gt;80&quot;)" table:style-name="ce52">
            <text:p>1</text:p>
          </table:table-cell>
          <table:table-cell table:style-name="ce52"/>
          <table:table-cell office:value-type="float" office:value="0" table:formula="of:=COUNTIFS([.$M$2:.$M$32];&quot;=częściowa&quot;;[.$K$2:.$K$32];&quot;&lt;=20&quot;)" table:style-name="ce52">
            <text:p>0</text:p>
          </table:table-cell>
          <table:table-cell office:value-type="float" office:value="0" table:formula="of:=COUNTIFS([.$M$2:.$M$32];&quot;=częściowa&quot;;[.$K$2:.$K$32];&quot;&gt;20&quot;;[.$K$2:.$K$32];&quot;&lt;=30&quot;)" table:style-name="ce52">
            <text:p>0</text:p>
          </table:table-cell>
          <table:table-cell office:value-type="float" office:value="0" table:formula="of:=COUNTIFS([.$M$2:.$M$32];&quot;=częściowa&quot;;[.$K$2:.$K$32];&quot;&gt;30&quot;;[.$K$2:.$K$32];&quot;&lt;=40&quot;)" table:style-name="ce52">
            <text:p>0</text:p>
          </table:table-cell>
          <table:table-cell office:value-type="float" office:value="0" table:formula="of:=COUNTIFS([.$M$2:.$M$32];&quot;=częściowa&quot;;[.$K$2:.$K$32];&quot;&gt;40&quot;;[.$K$2:.$K$32];&quot;&lt;=50&quot;)" table:style-name="ce52">
            <text:p>0</text:p>
          </table:table-cell>
          <table:table-cell office:value-type="float" office:value="0" table:formula="of:=COUNTIFS([.$M$2:.$M$32];&quot;=częściowa&quot;;[.$K$2:.$K$32];&quot;&gt;50&quot;;[.$K$2:.$K$32];&quot;&lt;=60&quot;)" table:style-name="ce52">
            <text:p>0</text:p>
          </table:table-cell>
          <table:table-cell office:value-type="float" office:value="0" table:formula="of:=COUNTIFS([.$M$2:.$M$32];&quot;=częściowa&quot;;[.$K$2:.$K$32];&quot;&gt;60&quot;;[.$K$2:.$K$32];&quot;&lt;=70&quot;)" table:style-name="ce52">
            <text:p>0</text:p>
          </table:table-cell>
          <table:table-cell office:value-type="float" office:value="0" table:formula="of:=COUNTIFS([.$M$2:.$M$32];&quot;=częściowa&quot;;[.$K$2:.$K$32];&quot;&gt;70&quot;;[.$K$2:.$K$32];&quot;&lt;=80&quot;)" table:style-name="ce52">
            <text:p>0</text:p>
          </table:table-cell>
          <table:table-cell office:value-type="float" office:value="0" table:formula="of:=COUNTIFS([.$M$2:.$M$32];&quot;=częściowa&quot;;[.$K$2:.$K$32];&quot;&gt;80&quot;)" table:style-name="ce5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2">
            <text:p>progresja</text:p>
          </table:table-cell>
          <table:table-cell office:value-type="float" office:value="0" table:formula="of:=COUNTIFS([.$L$2:.$L$32];&quot;=progresja&quot;;[.$K$2:.$K$32];&quot;&lt;=20&quot;)" table:style-name="ce52">
            <text:p>0</text:p>
          </table:table-cell>
          <table:table-cell office:value-type="float" office:value="0" table:formula="of:=COUNTIFS([.$L$2:.$L$32];&quot;=progresja&quot;;[.$K$2:.$K$32];&quot;&gt;20&quot;;[.$K$2:.$K$32];&quot;&lt;=30&quot;)" table:style-name="ce52">
            <text:p>0</text:p>
          </table:table-cell>
          <table:table-cell office:value-type="float" office:value="0" table:formula="of:=COUNTIFS([.$L$2:.$L$32];&quot;=progresja&quot;;[.$K$2:.$K$32];&quot;&gt;30&quot;;[.$K$2:.$K$32];&quot;&lt;=40&quot;)" table:style-name="ce52">
            <text:p>0</text:p>
          </table:table-cell>
          <table:table-cell office:value-type="float" office:value="0" table:formula="of:=COUNTIFS([.$L$2:.$L$32];&quot;=progresja&quot;;[.$K$2:.$K$32];&quot;&gt;40&quot;;[.$K$2:.$K$32];&quot;&lt;=50&quot;)" table:style-name="ce52">
            <text:p>0</text:p>
          </table:table-cell>
          <table:table-cell office:value-type="float" office:value="1" table:formula="of:=COUNTIFS([.$L$2:.$L$32];&quot;=progresja&quot;;[.$K$2:.$K$32];&quot;&gt;50&quot;;[.$K$2:.$K$32];&quot;&lt;=60&quot;)" table:style-name="ce52">
            <text:p>1</text:p>
          </table:table-cell>
          <table:table-cell office:value-type="float" office:value="0" table:formula="of:=COUNTIFS([.$L$2:.$L$32];&quot;=progresja&quot;;[.$K$2:.$K$32];&quot;&gt;60&quot;;[.$K$2:.$K$32];&quot;&lt;=70&quot;)" table:style-name="ce52">
            <text:p>0</text:p>
          </table:table-cell>
          <table:table-cell office:value-type="float" office:value="0" table:formula="of:=COUNTIFS([.$L$2:.$L$32];&quot;=progresja&quot;;[.$K$2:.$K$32];&quot;&gt;70&quot;;[.$K$2:.$K$32];&quot;&lt;=80&quot;)" table:style-name="ce52">
            <text:p>0</text:p>
          </table:table-cell>
          <table:table-cell office:value-type="float" office:value="0" table:formula="of:=COUNTIFS([.$L$2:.$L$32];&quot;=progresja&quot;;[.$K$2:.$K$32];&quot;&gt;80&quot;)" table:style-name="ce52">
            <text:p>0</text:p>
          </table:table-cell>
          <table:table-cell table:style-name="ce52"/>
          <table:table-cell office:value-type="float" office:value="0" table:formula="of:=COUNTIFS([.$M$2:.$M$32];&quot;=progresja&quot;;[.$K$2:.$K$32];&quot;&lt;=20&quot;)" table:style-name="ce52">
            <text:p>0</text:p>
          </table:table-cell>
          <table:table-cell office:value-type="float" office:value="0" table:formula="of:=COUNTIFS([.$M$2:.$M$32];&quot;=progresja&quot;;[.$K$2:.$K$32];&quot;&gt;20&quot;;[.$K$2:.$K$32];&quot;&lt;=30&quot;)" table:style-name="ce52">
            <text:p>0</text:p>
          </table:table-cell>
          <table:table-cell office:value-type="float" office:value="0" table:formula="of:=COUNTIFS([.$M$2:.$M$32];&quot;=progresja&quot;;[.$K$2:.$K$32];&quot;&gt;30&quot;;[.$K$2:.$K$32];&quot;&lt;=40&quot;)" table:style-name="ce52">
            <text:p>0</text:p>
          </table:table-cell>
          <table:table-cell office:value-type="float" office:value="0" table:formula="of:=COUNTIFS([.$M$2:.$M$32];&quot;=progresja&quot;;[.$K$2:.$K$32];&quot;&gt;40&quot;;[.$K$2:.$K$32];&quot;&lt;=50&quot;)" table:style-name="ce52">
            <text:p>0</text:p>
          </table:table-cell>
          <table:table-cell office:value-type="float" office:value="0" table:formula="of:=COUNTIFS([.$M$2:.$M$32];&quot;=progresja&quot;;[.$K$2:.$K$32];&quot;&gt;50&quot;;[.$K$2:.$K$32];&quot;&lt;=60&quot;)" table:style-name="ce52">
            <text:p>0</text:p>
          </table:table-cell>
          <table:table-cell office:value-type="float" office:value="1" table:formula="of:=COUNTIFS([.$M$2:.$M$32];&quot;=progresja&quot;;[.$K$2:.$K$32];&quot;&gt;60&quot;;[.$K$2:.$K$32];&quot;&lt;=70&quot;)" table:style-name="ce52">
            <text:p>1</text:p>
          </table:table-cell>
          <table:table-cell office:value-type="float" office:value="0" table:formula="of:=COUNTIFS([.$M$2:.$M$32];&quot;=progresja&quot;;[.$K$2:.$K$32];&quot;&gt;70&quot;;[.$K$2:.$K$32];&quot;&lt;=80&quot;)" table:style-name="ce52">
            <text:p>0</text:p>
          </table:table-cell>
          <table:table-cell office:value-type="float" office:value="1" table:formula="of:=COUNTIFS([.$M$2:.$M$32];&quot;=progresja&quot;;[.$K$2:.$K$32];&quot;&gt;80&quot;)" table:style-name="ce5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52">
            <text:p>wznowa</text:p>
          </table:table-cell>
          <table:table-cell office:value-type="float" office:value="0" table:formula="of:=COUNTIFS([.$L$2:.$L$32];&quot;=wznowa&quot;;[.$K$2:.$K$32];&quot;&lt;=20&quot;)" table:style-name="ce52">
            <text:p>0</text:p>
          </table:table-cell>
          <table:table-cell office:value-type="float" office:value="0" table:formula="of:=COUNTIFS([.$L$2:.$L$32];&quot;=wznowa&quot;;[.$K$2:.$K$32];&quot;&gt;20&quot;;[.$K$2:.$K$32];&quot;&lt;=30&quot;)" table:style-name="ce52">
            <text:p>0</text:p>
          </table:table-cell>
          <table:table-cell office:value-type="float" office:value="0" table:formula="of:=COUNTIFS([.$L$2:.$L$32];&quot;=wznowa&quot;;[.$K$2:.$K$32];&quot;&gt;30&quot;;[.$K$2:.$K$32];&quot;&lt;=40&quot;)" table:style-name="ce52">
            <text:p>0</text:p>
          </table:table-cell>
          <table:table-cell office:value-type="float" office:value="0" table:formula="of:=COUNTIFS([.$L$2:.$L$32];&quot;=wznowa&quot;;[.$K$2:.$K$32];&quot;&gt;40&quot;;[.$K$2:.$K$32];&quot;&lt;=50&quot;)" table:style-name="ce52">
            <text:p>0</text:p>
          </table:table-cell>
          <table:table-cell office:value-type="float" office:value="0" table:formula="of:=COUNTIFS([.$L$2:.$L$32];&quot;=wznowa&quot;;[.$K$2:.$K$32];&quot;&gt;50&quot;;[.$K$2:.$K$32];&quot;&lt;=60&quot;)" table:style-name="ce52">
            <text:p>0</text:p>
          </table:table-cell>
          <table:table-cell office:value-type="float" office:value="0" table:formula="of:=COUNTIFS([.$L$2:.$L$32];&quot;=wznowa&quot;;[.$K$2:.$K$32];&quot;&gt;60&quot;;[.$K$2:.$K$32];&quot;&lt;=70&quot;)" table:style-name="ce52">
            <text:p>0</text:p>
          </table:table-cell>
          <table:table-cell office:value-type="float" office:value="0" table:formula="of:=COUNTIFS([.$L$2:.$L$32];&quot;=wznowa&quot;;[.$K$2:.$K$32];&quot;&gt;70&quot;;[.$K$2:.$K$32];&quot;&lt;=80&quot;)" table:style-name="ce52">
            <text:p>0</text:p>
          </table:table-cell>
          <table:table-cell office:value-type="float" office:value="0" table:formula="of:=COUNTIFS([.$L$2:.$L$32];&quot;=wznowa&quot;;[.$K$2:.$K$32];&quot;&gt;80&quot;)" table:style-name="ce52">
            <text:p>0</text:p>
          </table:table-cell>
          <table:table-cell table:style-name="ce52"/>
          <table:table-cell office:value-type="float" office:value="0" table:formula="of:=COUNTIFS([.$M$2:.$M$32];&quot;=wznowa&quot;;[.$K$2:.$K$32];&quot;&lt;=20&quot;)" table:style-name="ce52">
            <text:p>0</text:p>
          </table:table-cell>
          <table:table-cell office:value-type="float" office:value="0" table:formula="of:=COUNTIFS([.$M$2:.$M$32];&quot;=wznowa&quot;;[.$K$2:.$K$32];&quot;&gt;20&quot;;[.$K$2:.$K$32];&quot;&lt;=30&quot;)" table:style-name="ce52">
            <text:p>0</text:p>
          </table:table-cell>
          <table:table-cell office:value-type="float" office:value="0" table:formula="of:=COUNTIFS([.$M$2:.$M$32];&quot;=wznowa&quot;;[.$K$2:.$K$32];&quot;&gt;30&quot;;[.$K$2:.$K$32];&quot;&lt;=40&quot;)" table:style-name="ce52">
            <text:p>0</text:p>
          </table:table-cell>
          <table:table-cell office:value-type="float" office:value="1" table:formula="of:=COUNTIFS([.$M$2:.$M$32];&quot;=wznowa&quot;;[.$K$2:.$K$32];&quot;&gt;40&quot;;[.$K$2:.$K$32];&quot;&lt;=50&quot;)" table:style-name="ce52">
            <text:p>1</text:p>
          </table:table-cell>
          <table:table-cell office:value-type="float" office:value="2" table:formula="of:=COUNTIFS([.$M$2:.$M$32];&quot;=wznowa&quot;;[.$K$2:.$K$32];&quot;&gt;50&quot;;[.$K$2:.$K$32];&quot;&lt;=60&quot;)" table:style-name="ce52">
            <text:p>2</text:p>
          </table:table-cell>
          <table:table-cell office:value-type="float" office:value="0" table:formula="of:=COUNTIFS([.$M$2:.$M$32];&quot;=wznowa&quot;;[.$K$2:.$K$32];&quot;&gt;60&quot;;[.$K$2:.$K$32];&quot;&lt;=70&quot;)" table:style-name="ce52">
            <text:p>0</text:p>
          </table:table-cell>
          <table:table-cell office:value-type="float" office:value="1" table:formula="of:=COUNTIFS([.$M$2:.$M$32];&quot;=wznowa&quot;;[.$K$2:.$K$32];&quot;&gt;70&quot;;[.$K$2:.$K$32];&quot;&lt;=80&quot;)" table:style-name="ce52">
            <text:p>1</text:p>
          </table:table-cell>
          <table:table-cell office:value-type="float" office:value="0" table:formula="of:=COUNTIFS([.$M$2:.$M$32];&quot;=wznowa&quot;;[.$K$2:.$K$32];&quot;&gt;80&quot;)" table:style-name="ce5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2">
            <text:p>suma</text:p>
          </table:table-cell>
          <table:table-cell office:value-type="float" office:value="0" table:formula="of:=SUM([.B94:.B98])" table:style-name="ce52">
            <text:p>0</text:p>
          </table:table-cell>
          <table:table-cell office:value-type="float" office:value="0" table:formula="of:=SUM([.C94:.C98])" table:style-name="ce52">
            <text:p>0</text:p>
          </table:table-cell>
          <table:table-cell office:value-type="float" office:value="3" table:formula="of:=SUM([.D94:.D98])" table:style-name="ce52">
            <text:p>3</text:p>
          </table:table-cell>
          <table:table-cell office:value-type="float" office:value="6" table:formula="of:=SUM([.E94:.E98])" table:style-name="ce52">
            <text:p>6</text:p>
          </table:table-cell>
          <table:table-cell office:value-type="float" office:value="8" table:formula="of:=SUM([.F94:.F98])" table:style-name="ce52">
            <text:p>8</text:p>
          </table:table-cell>
          <table:table-cell office:value-type="float" office:value="7" table:formula="of:=SUM([.G94:.G98])" table:style-name="ce52">
            <text:p>7</text:p>
          </table:table-cell>
          <table:table-cell office:value-type="float" office:value="5" table:formula="of:=SUM([.H94:.H98])" table:style-name="ce52">
            <text:p>5</text:p>
          </table:table-cell>
          <table:table-cell office:value-type="float" office:value="2" table:formula="of:=SUM([.I94:.I98])" table:style-name="ce52">
            <text:p>2</text:p>
          </table:table-cell>
          <table:table-cell office:value-type="float" office:value="0" table:formula="of:=SUM([.J94:.J98])" table:style-name="ce52">
            <text:p>0</text:p>
          </table:table-cell>
          <table:table-cell office:value-type="float" office:value="0" table:formula="of:=SUM([.K94:.K98])" table:style-name="ce52">
            <text:p>0</text:p>
          </table:table-cell>
          <table:table-cell office:value-type="float" office:value="0" table:formula="of:=SUM([.L94:.L98])" table:style-name="ce52">
            <text:p>0</text:p>
          </table:table-cell>
          <table:table-cell office:value-type="float" office:value="3" table:formula="of:=SUM([.M94:.M98])" table:style-name="ce52">
            <text:p>3</text:p>
          </table:table-cell>
          <table:table-cell office:value-type="float" office:value="6" table:formula="of:=SUM([.N94:.N98])" table:style-name="ce52">
            <text:p>6</text:p>
          </table:table-cell>
          <table:table-cell office:value-type="float" office:value="8" table:formula="of:=SUM([.O94:.O98])" table:style-name="ce52">
            <text:p>8</text:p>
          </table:table-cell>
          <table:table-cell office:value-type="float" office:value="7" table:formula="of:=SUM([.P94:.P98])" table:style-name="ce52">
            <text:p>7</text:p>
          </table:table-cell>
          <table:table-cell office:value-type="float" office:value="5" table:formula="of:=SUM([.Q94:.Q98])" table:style-name="ce52">
            <text:p>5</text:p>
          </table:table-cell>
          <table:table-cell office:value-type="float" office:value="2" table:formula="of:=SUM([.R94:.R98])" table:style-name="ce52">
            <text:p>2</text:p>
          </table:table-cell>
          <table:table-cell table:number-columns-repeated="16366"/>
        </table:table-row>
        <table:table-row table:style-name="ro1">
          <table:table-cell table:number-columns-repeated="8" table:style-name="ce52"/>
          <table:table-cell office:value-type="float" office:value="31" table:formula="of:=SUM([.B99:.I99])" table:style-name="ce52">
            <text:p>31</text:p>
          </table:table-cell>
          <table:table-cell table:number-columns-repeated="8" table:style-name="ce52"/>
          <table:table-cell office:value-type="float" office:value="31" table:formula="of:=SUM([.K99:.R99])" table:style-name="ce52">
            <text:p>31</text:p>
          </table:table-cell>
          <table:table-cell table:style-name="ce1">
            <draw:frame draw:z-index="6" draw:id="id7" draw:style-name="a7" draw:name="Wykres 16" svg:x="0.16354in" svg:y="0.0625in" svg:width="5in" svg:height="2.94792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string" table:style-name="ce53">
            <text:p>zależność od płci i wieku</text:p>
          </table:table-cell>
          <table:table-cell table:number-columns-repeated="17" table:style-name="ce53"/>
          <table:table-cell table:number-columns-repeated="16366"/>
        </table:table-row>
        <table:table-row table:style-name="ro1">
          <table:table-cell table:style-name="ce53"/>
          <table:table-cell office:value-type="string" table:style-name="ce53">
            <text:p>nhl w trakcie</text:p>
          </table:table-cell>
          <table:table-cell office:value-type="string" table:style-name="ce53">
            <text:p>kobiety</text:p>
          </table:table-cell>
          <table:table-cell table:number-columns-repeated="7" table:style-name="ce53"/>
          <table:table-cell office:value-type="string" table:style-name="ce53">
            <text:p>nhl po</text:p>
          </table:table-cell>
          <table:table-cell office:value-type="string" table:style-name="ce53">
            <text:p>kobiety</text:p>
          </table:table-cell>
          <table:table-cell table:number-columns-repeated="6" table:style-name="ce53"/>
          <table:table-cell table:number-columns-repeated="16366"/>
        </table:table-row>
        <table:table-row table:style-name="ro1"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bardzo dobra</text:p>
          </table:table-cell>
          <table:table-cell office:value-type="float" office:value="0" table:formula="of:=COUNTIFS([.$L$2:.$L$32];&quot;=bardzo dobra&quot;;[.$K$2:.$K$32];&quot;&lt;=20&quot;;[.$J$2:.$J$32];&quot;=Kobieta&quot;)" table:style-name="ce53">
            <text:p>0</text:p>
          </table:table-cell>
          <table:table-cell office:value-type="float" office:value="0" table:formula="of:=COUNTIFS([.$L$2:.$L$32];&quot;=bardzo dobra&quot;;[.$K$2:.$K$32];&quot;&gt;20&quot;;[.$K$2:.$K$32];&quot;&lt;=30&quot;;[.$J$2:.$J$32];&quot;=Kobieta&quot;)" table:style-name="ce53">
            <text:p>0</text:p>
          </table:table-cell>
          <table:table-cell office:value-type="float" office:value="1" table:formula="of:=COUNTIFS([.$L$2:.$L$32];&quot;=bardzo dobra&quot;;[.$K$2:.$K$32];&quot;&gt;30&quot;;[.$K$2:.$K$32];&quot;&lt;=40&quot;;[.$J$2:.$J$32];&quot;=Kobieta&quot;)" table:style-name="ce53">
            <text:p>1</text:p>
          </table:table-cell>
          <table:table-cell office:value-type="float" office:value="2" table:formula="of:=COUNTIFS([.$L$2:.$L$32];&quot;=bardzo dobra&quot;;[.$K$2:.$K$32];&quot;&gt;40&quot;;[.$K$2:.$K$32];&quot;&lt;=50&quot;;[.$J$2:.$J$32];&quot;=Kobieta&quot;)" table:style-name="ce53">
            <text:p>2</text:p>
          </table:table-cell>
          <table:table-cell office:value-type="float" office:value="2" table:formula="of:=COUNTIFS([.$L$2:.$L$32];&quot;=bardzo dobra&quot;;[.$K$2:.$K$32];&quot;&gt;50&quot;;[.$K$2:.$K$32];&quot;&lt;=60&quot;;[.$J$2:.$J$32];&quot;=Kobieta&quot;)" table:style-name="ce53">
            <text:p>2</text:p>
          </table:table-cell>
          <table:table-cell office:value-type="float" office:value="0" table:formula="of:=COUNTIFS([.$L$2:.$L$32];&quot;=bardzo dobra&quot;;[.$K$2:.$K$32];&quot;&gt;60&quot;;[.$K$2:.$K$32];&quot;&lt;=70&quot;;[.$J$2:.$J$32];&quot;=Kobieta&quot;)" table:style-name="ce53">
            <text:p>0</text:p>
          </table:table-cell>
          <table:table-cell office:value-type="float" office:value="1" table:formula="of:=COUNTIFS([.$L$2:.$L$32];&quot;=bardzo dobra&quot;;[.$K$2:.$K$32];&quot;&gt;70&quot;;[.$K$2:.$K$32];&quot;&lt;=80&quot;;[.$J$2:.$J$32];&quot;=Kobieta&quot;)" table:style-name="ce53">
            <text:p>1</text:p>
          </table:table-cell>
          <table:table-cell office:value-type="float" office:value="0" table:formula="of:=COUNTIFS([.$L$2:.$L$32];&quot;=bardzo dobra&quot;;[.$K$2:.$K$32];&quot;&gt;80&quot;;[.$J$2:.$J$32];&quot;=Kobieta&quot;)" table:style-name="ce53">
            <text:p>0</text:p>
          </table:table-cell>
          <table:table-cell table:style-name="ce53"/>
          <table:table-cell office:value-type="float" office:value="0" table:formula="of:=COUNTIFS([.$M$2:.$M$32];&quot;=bardzo dobra&quot;;[.$K$2:.$K$32];&quot;&lt;=20&quot;;[.$J$2:.$J$32];&quot;=Kobieta&quot;)" table:style-name="ce53">
            <text:p>0</text:p>
          </table:table-cell>
          <table:table-cell office:value-type="float" office:value="0" table:formula="of:=COUNTIFS([.$M$2:.$M$32];&quot;=bardzo dobra&quot;;[.$K$2:.$K$32];&quot;&gt;20&quot;;[.$K$2:.$K$32];&quot;&lt;=30&quot;;[.$J$2:.$J$32];&quot;=Kobieta&quot;)" table:style-name="ce53">
            <text:p>0</text:p>
          </table:table-cell>
          <table:table-cell office:value-type="float" office:value="1" table:formula="of:=COUNTIFS([.$M$2:.$M$32];&quot;=bardzo dobra&quot;;[.$K$2:.$K$32];&quot;&gt;30&quot;;[.$K$2:.$K$32];&quot;&lt;=40&quot;;[.$J$2:.$J$32];&quot;=Kobieta&quot;)" table:style-name="ce53">
            <text:p>1</text:p>
          </table:table-cell>
          <table:table-cell office:value-type="float" office:value="1" table:formula="of:=COUNTIFS([.$M$2:.$M$32];&quot;=bardzo dobra&quot;;[.$K$2:.$K$32];&quot;&gt;40&quot;;[.$K$2:.$K$32];&quot;&lt;=50&quot;;[.$J$2:.$J$32];&quot;=Kobieta&quot;)" table:style-name="ce53">
            <text:p>1</text:p>
          </table:table-cell>
          <table:table-cell office:value-type="float" office:value="0" table:formula="of:=COUNTIFS([.$M$2:.$M$32];&quot;=bardzo dobra&quot;;[.$K$2:.$K$32];&quot;&gt;50&quot;;[.$K$2:.$K$32];&quot;&lt;=60&quot;;[.$J$2:.$J$32];&quot;=Kobieta&quot;)" table:style-name="ce53">
            <text:p>0</text:p>
          </table:table-cell>
          <table:table-cell office:value-type="float" office:value="2" table:formula="of:=COUNTIFS([.$M$2:.$M$32];&quot;=bardzo dobra&quot;;[.$K$2:.$K$32];&quot;&gt;60&quot;;[.$K$2:.$K$32];&quot;&lt;=70&quot;;[.$J$2:.$J$32];&quot;=Kobieta&quot;)" table:style-name="ce53">
            <text:p>2</text:p>
          </table:table-cell>
          <table:table-cell office:value-type="float" office:value="0" table:formula="of:=COUNTIFS([.$M$2:.$M$32];&quot;=bardzo dobra&quot;;[.$K$2:.$K$32];&quot;&gt;70&quot;;[.$K$2:.$K$32];&quot;&lt;=80&quot;;[.$J$2:.$J$32];&quot;=Kobieta&quot;)" table:style-name="ce53">
            <text:p>0</text:p>
          </table:table-cell>
          <table:table-cell office:value-type="float" office:value="0" table:formula="of:=COUNTIFS([.$M$2:.$M$32];&quot;=bardzo dobra&quot;;[.$K$2:.$K$32];&quot;&gt;80&quot;;[.$J$2:.$J$32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dobra</text:p>
          </table:table-cell>
          <table:table-cell office:value-type="float" office:value="0" table:formula="of:=COUNTIFS([.$L$2:.$L$32];&quot;=dobra&quot;;[.$K$2:.$K$32];&quot;&lt;=20&quot;;[.$J$2:.$J$32];&quot;=Kobieta&quot;)" table:style-name="ce53">
            <text:p>0</text:p>
          </table:table-cell>
          <table:table-cell office:value-type="float" office:value="0" table:formula="of:=COUNTIFS([.$L$2:.$L$32];&quot;=dobra&quot;;[.$K$2:.$K$32];&quot;&gt;20&quot;;[.$K$2:.$K$32];&quot;&lt;=30&quot;;[.$J$2:.$J$32];&quot;=Kobieta&quot;)" table:style-name="ce53">
            <text:p>0</text:p>
          </table:table-cell>
          <table:table-cell office:value-type="float" office:value="0" table:formula="of:=COUNTIFS([.$L$2:.$L$32];&quot;=dobra&quot;;[.$K$2:.$K$32];&quot;&gt;30&quot;;[.$K$2:.$K$32];&quot;&lt;=40&quot;;[.$J$2:.$J$32];&quot;=Kobieta&quot;)" table:style-name="ce53">
            <text:p>0</text:p>
          </table:table-cell>
          <table:table-cell office:value-type="float" office:value="2" table:formula="of:=COUNTIFS([.$L$2:.$L$32];&quot;=dobra&quot;;[.$K$2:.$K$32];&quot;&gt;40&quot;;[.$K$2:.$K$32];&quot;&lt;=50&quot;;[.$J$2:.$J$32];&quot;=Kobieta&quot;)" table:style-name="ce53">
            <text:p>2</text:p>
          </table:table-cell>
          <table:table-cell office:value-type="float" office:value="1" table:formula="of:=COUNTIFS([.$L$2:.$L$32];&quot;=dobra&quot;;[.$K$2:.$K$32];&quot;&gt;50&quot;;[.$K$2:.$K$32];&quot;&lt;=60&quot;;[.$J$2:.$J$32];&quot;=Kobieta&quot;)" table:style-name="ce53">
            <text:p>1</text:p>
          </table:table-cell>
          <table:table-cell office:value-type="float" office:value="3" table:formula="of:=COUNTIFS([.$L$2:.$L$32];&quot;=dobra&quot;;[.$K$2:.$K$32];&quot;&gt;60&quot;;[.$K$2:.$K$32];&quot;&lt;=70&quot;;[.$J$2:.$J$32];&quot;=Kobieta&quot;)" table:style-name="ce53">
            <text:p>3</text:p>
          </table:table-cell>
          <table:table-cell office:value-type="float" office:value="0" table:formula="of:=COUNTIFS([.$L$2:.$L$32];&quot;=dobra&quot;;[.$K$2:.$K$32];&quot;&gt;70&quot;;[.$K$2:.$K$32];&quot;&lt;=80&quot;;[.$J$2:.$J$32];&quot;=Kobieta&quot;)" table:style-name="ce53">
            <text:p>0</text:p>
          </table:table-cell>
          <table:table-cell office:value-type="float" office:value="0" table:formula="of:=COUNTIFS([.$L$2:.$L$32];&quot;=dobra&quot;;[.$K$2:.$K$32];&quot;&gt;80&quot;;[.$J$2:.$J$32];&quot;=Kobieta&quot;)" table:style-name="ce53">
            <text:p>0</text:p>
          </table:table-cell>
          <table:table-cell table:style-name="ce53"/>
          <table:table-cell office:value-type="float" office:value="0" table:formula="of:=COUNTIFS([.$M$2:.$M$32];&quot;=dobra&quot;;[.$K$2:.$K$32];&quot;&lt;=20&quot;;[.$J$2:.$J$32];&quot;=Kobieta&quot;)" table:style-name="ce53">
            <text:p>0</text:p>
          </table:table-cell>
          <table:table-cell office:value-type="float" office:value="0" table:formula="of:=COUNTIFS([.$M$2:.$M$32];&quot;=dobra&quot;;[.$K$2:.$K$32];&quot;&gt;20&quot;;[.$K$2:.$K$32];&quot;&lt;=30&quot;;[.$J$2:.$J$32];&quot;=Kobieta&quot;)" table:style-name="ce53">
            <text:p>0</text:p>
          </table:table-cell>
          <table:table-cell office:value-type="float" office:value="1" table:formula="of:=COUNTIFS([.$M$2:.$M$32];&quot;=dobra&quot;;[.$K$2:.$K$32];&quot;&gt;30&quot;;[.$K$2:.$K$32];&quot;&lt;=40&quot;;[.$J$2:.$J$32];&quot;=Kobieta&quot;)" table:style-name="ce53">
            <text:p>1</text:p>
          </table:table-cell>
          <table:table-cell office:value-type="float" office:value="3" table:formula="of:=COUNTIFS([.$M$2:.$M$32];&quot;=dobra&quot;;[.$K$2:.$K$32];&quot;&gt;40&quot;;[.$K$2:.$K$32];&quot;&lt;=50&quot;;[.$J$2:.$J$32];&quot;=Kobieta&quot;)" table:style-name="ce53">
            <text:p>3</text:p>
          </table:table-cell>
          <table:table-cell office:value-type="float" office:value="4" table:formula="of:=COUNTIFS([.$M$2:.$M$32];&quot;=dobra&quot;;[.$K$2:.$K$32];&quot;&gt;50&quot;;[.$K$2:.$K$32];&quot;&lt;=60&quot;;[.$J$2:.$J$32];&quot;=Kobieta&quot;)" table:style-name="ce53">
            <text:p>4</text:p>
          </table:table-cell>
          <table:table-cell office:value-type="float" office:value="1" table:formula="of:=COUNTIFS([.$M$2:.$M$32];&quot;=dobra&quot;;[.$K$2:.$K$32];&quot;&gt;60&quot;;[.$K$2:.$K$32];&quot;&lt;=70&quot;;[.$J$2:.$J$32];&quot;=Kobieta&quot;)" table:style-name="ce53">
            <text:p>1</text:p>
          </table:table-cell>
          <table:table-cell office:value-type="float" office:value="1" table:formula="of:=COUNTIFS([.$M$2:.$M$32];&quot;=dobra&quot;;[.$K$2:.$K$32];&quot;&gt;70&quot;;[.$K2:.$K$32];&quot;&lt;=80&quot;;[.$J$2:.$J$32];&quot;=Kobieta&quot;)" table:style-name="ce53">
            <text:p>1</text:p>
          </table:table-cell>
          <table:table-cell office:value-type="float" office:value="1" table:formula="of:=COUNTIFS([.$M$2:.$M$32];&quot;=dobra&quot;;[.$K$2:.$K$32];&quot;&gt;80&quot;;[.$J$2:.$J$32];&quot;=Kobieta&quot;)" table:style-name="ce53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częściowa</text:p>
          </table:table-cell>
          <table:table-cell office:value-type="float" office:value="0" table:formula="of:=COUNTIFS([.$L$2:.$L$32];&quot;=częściowa&quot;;[.$K$2:.$K$32];&quot;&lt;=20&quot;;[.$J$2:.$J$32];&quot;=Kobieta&quot;)" table:style-name="ce53">
            <text:p>0</text:p>
          </table:table-cell>
          <table:table-cell office:value-type="float" office:value="0" table:formula="of:=COUNTIFS([.$L$2:.$L$32];&quot;=częściowa&quot;;[.$K$2:.$K$32];&quot;&gt;20&quot;;[.$K$2:.$K$32];&quot;&lt;=30&quot;;[.$J$2:.$J$32];&quot;=Kobieta&quot;)" table:style-name="ce53">
            <text:p>0</text:p>
          </table:table-cell>
          <table:table-cell office:value-type="float" office:value="1" table:formula="of:=COUNTIFS([.$L$2:.$L$32];&quot;=częściowa&quot;;[.$K$2:.$K$32];&quot;&gt;30&quot;;[.$K$2:.$K$32];&quot;&lt;=40&quot;;[.$J$2:.$J$32];&quot;=Kobieta&quot;)" table:style-name="ce53">
            <text:p>1</text:p>
          </table:table-cell>
          <table:table-cell office:value-type="float" office:value="1" table:formula="of:=COUNTIFS([.$L$2:.$L$32];&quot;=częściowa&quot;;[.$K$2:.$K$32];&quot;&gt;40&quot;;[.$K$2:.$K$32];&quot;&lt;=50&quot;;[.$J$2:.$J$32];&quot;=Kobieta&quot;)" table:style-name="ce53">
            <text:p>1</text:p>
          </table:table-cell>
          <table:table-cell office:value-type="float" office:value="0" table:formula="of:=COUNTIFS([.$L$2:.$L$32];&quot;=częściowa&quot;;[.$K$2:.$K$32];&quot;&gt;50&quot;;[.$K$2:.$K$32];&quot;&lt;=60&quot;;[.$J$2:.$J$32];&quot;=Kobieta&quot;)" table:style-name="ce53">
            <text:p>0</text:p>
          </table:table-cell>
          <table:table-cell office:value-type="float" office:value="0" table:formula="of:=COUNTIFS([.$L$2:.$L$32];&quot;=częściowa&quot;;[.$K$2:.$K$32];&quot;&gt;60&quot;;[.$K$2:.$K$32];&quot;&lt;=70&quot;;[.$J$2:.$J$32];&quot;=Kobieta&quot;)" table:style-name="ce53">
            <text:p>0</text:p>
          </table:table-cell>
          <table:table-cell office:value-type="float" office:value="0" table:formula="of:=COUNTIFS([.$L$2:.$L$32];&quot;=częściowa&quot;;[.$K$2:.$K$32];&quot;&gt;70&quot;;[.$K$2:.$K$32];&quot;&lt;=80&quot;;[.$J$2:.$J$32];&quot;=Kobieta&quot;)" table:style-name="ce53">
            <text:p>0</text:p>
          </table:table-cell>
          <table:table-cell office:value-type="float" office:value="1" table:formula="of:=COUNTIFS([.$L$2:.$L$32];&quot;=częściowa&quot;;[.$K$2:.$K$32];&quot;&gt;80&quot;;[.$J$2:.$J$32];&quot;=Kobieta&quot;)" table:style-name="ce53">
            <text:p>1</text:p>
          </table:table-cell>
          <table:table-cell table:style-name="ce53"/>
          <table:table-cell office:value-type="float" office:value="0" table:formula="of:=COUNTIFS([.$M$2:.$M$32];&quot;=częściowa&quot;;[.$K$2:.$K$32];&quot;&lt;=20&quot;;[.$J$2:.$J$32];&quot;=Kobieta&quot;)" table:style-name="ce53">
            <text:p>0</text:p>
          </table:table-cell>
          <table:table-cell office:value-type="float" office:value="0" table:formula="of:=COUNTIFS([.$M$2:.$M$32];&quot;=częściowa&quot;;[.$K$2:.$K$32];&quot;&gt;20&quot;;[.$K$2:.$K$32];&quot;&lt;=30&quot;;[.$J$2:.$J$32];&quot;=Kobieta&quot;)" table:style-name="ce53">
            <text:p>0</text:p>
          </table:table-cell>
          <table:table-cell office:value-type="float" office:value="0" table:formula="of:=COUNTIFS([.$M$2:.$M$32];&quot;=częściowa&quot;;[.$K$2:.$K$32];&quot;&gt;30&quot;;[.$K$2:.$K$32];&quot;&lt;=40&quot;;[.$J$2:.$J$32];&quot;=Kobieta&quot;)" table:style-name="ce53">
            <text:p>0</text:p>
          </table:table-cell>
          <table:table-cell office:value-type="float" office:value="0" table:formula="of:=COUNTIFS([.$M$2:.$M$32];&quot;=częściowa&quot;;[.$K$2:.$K$32];&quot;&gt;40&quot;;[.$K$2:.$K$32];&quot;&lt;=50&quot;;[.$J$2:.$J$32];&quot;=Kobieta&quot;)" table:style-name="ce53">
            <text:p>0</text:p>
          </table:table-cell>
          <table:table-cell office:value-type="float" office:value="0" table:formula="of:=COUNTIFS([.$M$2:.$M$32];&quot;=częściowa&quot;;[.$K$2:.$K$32];&quot;&gt;50&quot;;[.$K$2:.$K$32];&quot;&lt;=60&quot;;[.$J$2:.$J$32];&quot;=Kobieta&quot;)" table:style-name="ce53">
            <text:p>0</text:p>
          </table:table-cell>
          <table:table-cell office:value-type="float" office:value="0" table:formula="of:=COUNTIFS([.$M$2:.$M$32];&quot;=częściowa&quot;;[.$K$2:.$K$32];&quot;&gt;60&quot;;[.$K$2:.$K$32];&quot;&lt;=70&quot;;[.$J$2:.$J$32];&quot;=Kobieta&quot;)" table:style-name="ce53">
            <text:p>0</text:p>
          </table:table-cell>
          <table:table-cell office:value-type="float" office:value="0" table:formula="of:=COUNTIFS([.$M$2:.$M$32];&quot;=częściowa&quot;;[.$K$2:.$K$32];&quot;&gt;70&quot;;[.$K$2:.$K$32];&quot;&lt;=80&quot;;[.$J$2:.$J$32];&quot;=Kobieta&quot;)" table:style-name="ce53">
            <text:p>0</text:p>
          </table:table-cell>
          <table:table-cell office:value-type="float" office:value="0" table:formula="of:=COUNTIFS([.$M$2:.$M$32];&quot;=częściowa&quot;;[.$K$2:.$K$32];&quot;&gt;80&quot;;[.$J$2:.$J$32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progresja</text:p>
          </table:table-cell>
          <table:table-cell office:value-type="float" office:value="0" table:formula="of:=COUNTIFS([.$L$2:.$L$32];&quot;=progresja&quot;;[.$K$2:.$K$32];&quot;&lt;=20&quot;;[.$J$2:.$J$32];&quot;=Kobieta&quot;)" table:style-name="ce53">
            <text:p>0</text:p>
          </table:table-cell>
          <table:table-cell office:value-type="float" office:value="0" table:formula="of:=COUNTIFS([.$L$2:.$L$32];&quot;=progresja&quot;;[.$K$2:.$K$32];&quot;&gt;20&quot;;[.$K$2:.$K$32];&quot;&lt;=30&quot;;[.$J$2:.$J$32];&quot;=Kobieta&quot;)" table:style-name="ce53">
            <text:p>0</text:p>
          </table:table-cell>
          <table:table-cell office:value-type="float" office:value="0" table:formula="of:=COUNTIFS([.$L$2:.$L$32];&quot;=progresja&quot;;[.$K$2:.$K$32];&quot;&gt;30&quot;;[.$K$2:.$K$32];&quot;&lt;=40&quot;;[.$J$2:.$J$32];&quot;=Kobieta&quot;)" table:style-name="ce53">
            <text:p>0</text:p>
          </table:table-cell>
          <table:table-cell office:value-type="float" office:value="0" table:formula="of:=COUNTIFS([.$L$2:.$L$32];&quot;=progresja&quot;;[.$K$2:.$K$32];&quot;&gt;40&quot;;[.$K$2:.$K$32];&quot;&lt;=50&quot;;[.$J$2:.$J$32];&quot;=Kobieta&quot;)" table:style-name="ce53">
            <text:p>0</text:p>
          </table:table-cell>
          <table:table-cell office:value-type="float" office:value="1" table:formula="of:=COUNTIFS([.$L$2:.$L$32];&quot;=progresja&quot;;[.$K$2:.$K$32];&quot;&gt;50&quot;;[.$K$2:.$K$32];&quot;&lt;=60&quot;;[.$J$2:.$J$32];&quot;=Kobieta&quot;)" table:style-name="ce53">
            <text:p>1</text:p>
          </table:table-cell>
          <table:table-cell office:value-type="float" office:value="0" table:formula="of:=COUNTIFS([.$L$2:.$L$32];&quot;=progresja&quot;;[.$K$2:.$K$32];&quot;&gt;60&quot;;[.$K$2:.$K$32];&quot;&lt;=70&quot;;[.$J$2:.$J$32];&quot;=Kobieta&quot;)" table:style-name="ce53">
            <text:p>0</text:p>
          </table:table-cell>
          <table:table-cell office:value-type="float" office:value="0" table:formula="of:=COUNTIFS([.$L$2:.$L$32];&quot;=progresja&quot;;[.$K$2:.$K$32];&quot;&gt;70&quot;;[.$K$2:.$K$32];&quot;&lt;=80&quot;;[.$J$2:.$J$32];&quot;=Kobieta&quot;)" table:style-name="ce53">
            <text:p>0</text:p>
          </table:table-cell>
          <table:table-cell office:value-type="float" office:value="0" table:formula="of:=COUNTIFS([.$L$2:.$L$32];&quot;=progresja&quot;;[.$K$2:.$K$32];&quot;&gt;80&quot;;[.$J$2:.$J$32];&quot;=Kobieta&quot;)" table:style-name="ce53">
            <text:p>0</text:p>
          </table:table-cell>
          <table:table-cell table:style-name="ce53"/>
          <table:table-cell office:value-type="float" office:value="0" table:formula="of:=COUNTIFS([.$M$2:.$M$32];&quot;=progresja&quot;;[.$K$2:.$K$32];&quot;&lt;=20&quot;;[.$J$2:.$J$32];&quot;=Kobieta&quot;)" table:style-name="ce53">
            <text:p>0</text:p>
          </table:table-cell>
          <table:table-cell office:value-type="float" office:value="0" table:formula="of:=COUNTIFS([.$M$2:.$M$32];&quot;=progresja&quot;;[.$K$2:.$K$32];&quot;&gt;20&quot;;[.$K$2:.$K$32];&quot;&lt;=30&quot;;[.$J$2:.$J$32];&quot;=Kobieta&quot;)" table:style-name="ce53">
            <text:p>0</text:p>
          </table:table-cell>
          <table:table-cell office:value-type="float" office:value="0" table:formula="of:=COUNTIFS([.$M$2:.$M$32];&quot;=progresja&quot;;[.$K$2:.$K$32];&quot;&gt;30&quot;;[.$K$2:.$K$32];&quot;&lt;=40&quot;;[.$J$2:.$J$32];&quot;=Kobieta&quot;)" table:style-name="ce53">
            <text:p>0</text:p>
          </table:table-cell>
          <table:table-cell office:value-type="float" office:value="0" table:formula="of:=COUNTIFS([.$M$2:.$M$32];&quot;=progresja&quot;;[.$K$2:.$K$32];&quot;&gt;40&quot;;[.$K$2:.$K$32];&quot;&lt;=50&quot;;[.$J$2:.$J$32];&quot;=Kobieta&quot;)" table:style-name="ce53">
            <text:p>0</text:p>
          </table:table-cell>
          <table:table-cell office:value-type="float" office:value="0" table:formula="of:=COUNTIFS([.$M$2:.$M$32];&quot;=progresja&quot;;[.$K$2:.$K$32];&quot;&gt;50&quot;;[.$K$2:.$K$32];&quot;&lt;=60&quot;;[.$J$2:.$J$32];&quot;=Kobieta&quot;)" table:style-name="ce53">
            <text:p>0</text:p>
          </table:table-cell>
          <table:table-cell office:value-type="float" office:value="0" table:formula="of:=COUNTIFS([.$M$2:.$M$32];&quot;=progresja&quot;;[.$K$2:.$K$32];&quot;&gt;60&quot;;[.$K$2:.$K$32];&quot;&lt;=70&quot;;[.$J$2:.$J$32];&quot;=Kobieta&quot;)" table:style-name="ce53">
            <text:p>0</text:p>
          </table:table-cell>
          <table:table-cell office:value-type="float" office:value="0" table:formula="of:=COUNTIFS([.$M$2:.$M$32];&quot;=progresja&quot;;[.$K$2:.$K$32];&quot;&gt;70&quot;;[.$K$2:.$K$32];&quot;&lt;=80&quot;;[.$J$2:.$J$32];&quot;=Kobieta&quot;)" table:style-name="ce53">
            <text:p>0</text:p>
          </table:table-cell>
          <table:table-cell office:value-type="float" office:value="0" table:formula="of:=COUNTIFS([.$M$2:.$M$32];&quot;=progresja&quot;;[.$K$2:.$K$32];&quot;&gt;80&quot;;[.$J$2:.$J$32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wznowa</text:p>
          </table:table-cell>
          <table:table-cell office:value-type="float" office:value="0" table:formula="of:=COUNTIFS([.$L$2:.$L$32];&quot;=wznowa&quot;;[.$K$2:.$K$32];&quot;&lt;=20&quot;;[.$J$2:.$J$32];&quot;=Kobieta&quot;)" table:style-name="ce53">
            <text:p>0</text:p>
          </table:table-cell>
          <table:table-cell office:value-type="float" office:value="0" table:formula="of:=COUNTIFS([.$L$2:.$L$32];&quot;=wznowa&quot;;[.$K$2:.$K$32];&quot;&gt;20&quot;;[.$K$2:.$K$32];&quot;&lt;=30&quot;;[.$J$2:.$J$32];&quot;=Kobieta&quot;)" table:style-name="ce53">
            <text:p>0</text:p>
          </table:table-cell>
          <table:table-cell office:value-type="float" office:value="0" table:formula="of:=COUNTIFS([.$L$2:.$L$32];&quot;=wznowa&quot;;[.$K$2:.$K$32];&quot;&gt;30&quot;;[.$K$2:.$K$32];&quot;&lt;=40&quot;;[.$J$2:.$J$32];&quot;=Kobieta&quot;)" table:style-name="ce53">
            <text:p>0</text:p>
          </table:table-cell>
          <table:table-cell office:value-type="float" office:value="0" table:formula="of:=COUNTIFS([.$L$2:.$L$32];&quot;=wznowa&quot;;[.$K$2:.$K$32];&quot;&gt;40&quot;;[.$K$2:.$K$32];&quot;&lt;=50&quot;;[.$J$2:.$J$32];&quot;=Kobieta&quot;)" table:style-name="ce53">
            <text:p>0</text:p>
          </table:table-cell>
          <table:table-cell office:value-type="float" office:value="0" table:formula="of:=COUNTIFS([.$L$2:.$L$32];&quot;=wznowa&quot;;[.$K$2:.$K$32];&quot;&gt;50&quot;;[.$K$2:.$K$32];&quot;&lt;=60&quot;;[.$J$2:.$J$32];&quot;=Kobieta&quot;)" table:style-name="ce53">
            <text:p>0</text:p>
          </table:table-cell>
          <table:table-cell office:value-type="float" office:value="0" table:formula="of:=COUNTIFS([.$L$2:.$L$32];&quot;=wznowa&quot;;[.$K$2:.$K$32];&quot;&gt;60&quot;;[.$K$2:.$K$32];&quot;&lt;=70&quot;;[.$J$2:.$J$32];&quot;=Kobieta&quot;)" table:style-name="ce53">
            <text:p>0</text:p>
          </table:table-cell>
          <table:table-cell office:value-type="float" office:value="0" table:formula="of:=COUNTIFS([.$L$2:.$L$32];&quot;=wznowa&quot;;[.$K$2:.$K$32];&quot;&gt;70&quot;;[.$K$2:.$K$32];&quot;&lt;=80&quot;;[.$J$2:.$J$32];&quot;=Kobieta&quot;)" table:style-name="ce53">
            <text:p>0</text:p>
          </table:table-cell>
          <table:table-cell office:value-type="float" office:value="0" table:formula="of:=COUNTIFS([.$L$2:.$L$32];&quot;=wznowa&quot;;[.$K$2:.$K$32];&quot;&gt;80&quot;;[.$J$2:.$J$32];&quot;=Kobieta&quot;)" table:style-name="ce53">
            <text:p>0</text:p>
          </table:table-cell>
          <table:table-cell table:style-name="ce53"/>
          <table:table-cell office:value-type="float" office:value="0" table:formula="of:=COUNTIFS([.$M$2:.$M$32];&quot;=wznowa&quot;;[.$K$2:.$K$32];&quot;&lt;=20&quot;;[.$J$2:.$J$32];&quot;=Kobieta&quot;)" table:style-name="ce53">
            <text:p>0</text:p>
          </table:table-cell>
          <table:table-cell office:value-type="float" office:value="0" table:formula="of:=COUNTIFS([.$M$2:.$M$32];&quot;=wznowa&quot;;[.$K$2:.$K$32];&quot;&gt;20&quot;;[.$K$2:.$K$32];&quot;&lt;=30&quot;;[.$J$2:.$J$32];&quot;=Kobieta&quot;)" table:style-name="ce53">
            <text:p>0</text:p>
          </table:table-cell>
          <table:table-cell office:value-type="float" office:value="0" table:formula="of:=COUNTIFS([.$M$2:.$M$32];&quot;=wznowa&quot;;[.$K$2:.$K$32];&quot;&gt;30&quot;;[.$K$2:.$K$32];&quot;&lt;=40&quot;;[.$J$2:.$J$32];&quot;=Kobieta&quot;)" table:style-name="ce53">
            <text:p>0</text:p>
          </table:table-cell>
          <table:table-cell office:value-type="float" office:value="1" table:formula="of:=COUNTIFS([.$M$2:.$M$32];&quot;=wznowa&quot;;[.$K$2:.$K$32];&quot;&gt;40&quot;;[.$K$2:.$K$32];&quot;&lt;=50&quot;;[.$J$2:.$J$32];&quot;=Kobieta&quot;)" table:style-name="ce53">
            <text:p>1</text:p>
          </table:table-cell>
          <table:table-cell office:value-type="float" office:value="0" table:formula="of:=COUNTIFS([.$M$2:.$M$32];&quot;=wznowa&quot;;[.$K$2:.$K$32];&quot;&gt;50&quot;;[.$K$2:.$K$32];&quot;&lt;=60&quot;;[.$J$2:.$J$32];&quot;=Kobieta&quot;)" table:style-name="ce53">
            <text:p>0</text:p>
          </table:table-cell>
          <table:table-cell office:value-type="float" office:value="0" table:formula="of:=COUNTIFS([.$M$2:.$M$32];&quot;=wznowa&quot;;[.$K$2:.$K$32];&quot;&gt;60&quot;;[.$K$2:.$K$32];&quot;&lt;=70&quot;;[.$J$2:.$J$32];&quot;=Kobieta&quot;)" table:style-name="ce53">
            <text:p>0</text:p>
          </table:table-cell>
          <table:table-cell office:value-type="float" office:value="0" table:formula="of:=COUNTIFS([.$M$2:.$M$32];&quot;=wznowa&quot;;[.$K$2:.$K$32];&quot;&gt;70&quot;;[.$K$2:.$K$32];&quot;&lt;=80&quot;;[.$J$2:.$J$32];&quot;=Kobieta&quot;)" table:style-name="ce53">
            <text:p>0</text:p>
          </table:table-cell>
          <table:table-cell office:value-type="float" office:value="0" table:formula="of:=COUNTIFS([.$M$2:.$M$32];&quot;=wznowa&quot;;[.$K$2:.$K$32];&quot;&gt;80&quot;;[.$J$2:.$J$32];&quot;=Kobiet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suma</text:p>
          </table:table-cell>
          <table:table-cell office:value-type="float" office:value="0" table:formula="of:=SUM([.B104:.B108])" table:style-name="ce53">
            <text:p>0</text:p>
          </table:table-cell>
          <table:table-cell office:value-type="float" office:value="0" table:formula="of:=SUM([.C104:.C108])" table:style-name="ce53">
            <text:p>0</text:p>
          </table:table-cell>
          <table:table-cell office:value-type="float" office:value="2" table:formula="of:=SUM([.D104:.D108])" table:style-name="ce53">
            <text:p>2</text:p>
          </table:table-cell>
          <table:table-cell office:value-type="float" office:value="5" table:formula="of:=SUM([.E104:.E108])" table:style-name="ce53">
            <text:p>5</text:p>
          </table:table-cell>
          <table:table-cell office:value-type="float" office:value="4" table:formula="of:=SUM([.F104:.F108])" table:style-name="ce53">
            <text:p>4</text:p>
          </table:table-cell>
          <table:table-cell office:value-type="float" office:value="3" table:formula="of:=SUM([.G104:.G108])" table:style-name="ce53">
            <text:p>3</text:p>
          </table:table-cell>
          <table:table-cell office:value-type="float" office:value="1" table:formula="of:=SUM([.H104:.H108])" table:style-name="ce53">
            <text:p>1</text:p>
          </table:table-cell>
          <table:table-cell office:value-type="float" office:value="1" table:formula="of:=SUM([.I104:.I108])" table:style-name="ce53">
            <text:p>1</text:p>
          </table:table-cell>
          <table:table-cell office:value-type="float" office:value="0" table:formula="of:=SUM([.J104:.J108])" table:style-name="ce53">
            <text:p>0</text:p>
          </table:table-cell>
          <table:table-cell office:value-type="float" office:value="0" table:formula="of:=SUM([.K104:.K108])" table:style-name="ce53">
            <text:p>0</text:p>
          </table:table-cell>
          <table:table-cell office:value-type="float" office:value="0" table:formula="of:=SUM([.L104:.L108])" table:style-name="ce53">
            <text:p>0</text:p>
          </table:table-cell>
          <table:table-cell office:value-type="float" office:value="2" table:formula="of:=SUM([.M104:.M108])" table:style-name="ce53">
            <text:p>2</text:p>
          </table:table-cell>
          <table:table-cell office:value-type="float" office:value="5" table:formula="of:=SUM([.N104:.N108])" table:style-name="ce53">
            <text:p>5</text:p>
          </table:table-cell>
          <table:table-cell office:value-type="float" office:value="4" table:formula="of:=SUM([.O104:.O108])" table:style-name="ce53">
            <text:p>4</text:p>
          </table:table-cell>
          <table:table-cell office:value-type="float" office:value="3" table:formula="of:=SUM([.P104:.P108])" table:style-name="ce53">
            <text:p>3</text:p>
          </table:table-cell>
          <table:table-cell office:value-type="float" office:value="1" table:formula="of:=SUM([.Q104:.Q108])" table:style-name="ce53">
            <text:p>1</text:p>
          </table:table-cell>
          <table:table-cell office:value-type="float" office:value="1" table:formula="of:=SUM([.R104:.R108])" table:style-name="ce53">
            <text:p>1</text:p>
          </table:table-cell>
          <table:table-cell table:number-columns-repeated="16366"/>
        </table:table-row>
        <table:table-row table:style-name="ro1">
          <table:table-cell table:style-name="ce53"/>
          <table:table-cell office:value-type="string" table:style-name="ce53">
            <text:p>nhl w trakcie</text:p>
          </table:table-cell>
          <table:table-cell office:value-type="string" table:style-name="ce53">
            <text:p>mężczyżni</text:p>
          </table:table-cell>
          <table:table-cell table:number-columns-repeated="7" table:style-name="ce53"/>
          <table:table-cell office:value-type="string" table:style-name="ce53">
            <text:p>nhl po</text:p>
          </table:table-cell>
          <table:table-cell office:value-type="string" table:style-name="ce53">
            <text:p>męzczyzni</text:p>
          </table:table-cell>
          <table:table-cell table:number-columns-repeated="6" table:style-name="ce53"/>
          <table:table-cell table:number-columns-repeated="16366"/>
        </table:table-row>
        <table:table-row table:style-name="ro1"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style-name="ce53"/>
          <table:table-cell office:value-type="string" table:style-name="ce53">
            <text:p>&lt;21</text:p>
          </table:table-cell>
          <table:table-cell office:value-type="string" table:style-name="ce53">
            <text:p>21-30</text:p>
          </table:table-cell>
          <table:table-cell office:value-type="string" table:style-name="ce53">
            <text:p>31-40</text:p>
          </table:table-cell>
          <table:table-cell office:value-type="string" table:style-name="ce53">
            <text:p>41-50</text:p>
          </table:table-cell>
          <table:table-cell office:value-type="string" table:style-name="ce53">
            <text:p>51-60</text:p>
          </table:table-cell>
          <table:table-cell office:value-type="string" table:style-name="ce53">
            <text:p>61-70</text:p>
          </table:table-cell>
          <table:table-cell office:value-type="string" table:style-name="ce53">
            <text:p>71-80</text:p>
          </table:table-cell>
          <table:table-cell office:value-type="string" table:style-name="ce53">
            <text:p>&gt;8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bardzo dobra</text:p>
          </table:table-cell>
          <table:table-cell office:value-type="float" office:value="0" table:formula="of:=COUNTIFS([.$L$2:.$L$32];&quot;=bardzo dobra&quot;;[.$K$2:.$K$32];&quot;&lt;=20&quot;;[.$J$2:.$J$32];&quot;=Mężczyzna&quot;)" table:style-name="ce53">
            <text:p>0</text:p>
          </table:table-cell>
          <table:table-cell office:value-type="float" office:value="0" table:formula="of:=COUNTIFS([.$L$2:.$L$32];&quot;=bardzo dobr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L$2:.$L$32];&quot;=bardzo dobra&quot;;[.$K$2:.$K$32];&quot;&gt;30&quot;;[.$K$2:.$K$32];&quot;&lt;=40&quot;;[.$J$2:.$J$32];&quot;=Mężczyzna&quot;)" table:style-name="ce53">
            <text:p>0</text:p>
          </table:table-cell>
          <table:table-cell office:value-type="float" office:value="0" table:formula="of:=COUNTIFS([.$L$2:.$L$32];&quot;=bardzo dobra&quot;;[.$K$2:.$K$32];&quot;&gt;40&quot;;[.$K$2:.$K$32];&quot;&lt;=50&quot;;[.$J$2:.$J$32];&quot;=Mężczyzna&quot;)" table:style-name="ce53">
            <text:p>0</text:p>
          </table:table-cell>
          <table:table-cell office:value-type="float" office:value="0" table:formula="of:=COUNTIFS([.$L$2:.$L$32];&quot;=bardzo dobra&quot;;[.$K$2:.$K$32];&quot;&gt;50&quot;;[.$K$2:.$K$32];&quot;&lt;=60&quot;;[.$J$2:.$J$32];&quot;=Mężczyzna&quot;)" table:style-name="ce53">
            <text:p>0</text:p>
          </table:table-cell>
          <table:table-cell office:value-type="float" office:value="0" table:formula="of:=COUNTIFS([.$L$2:.$L$32];&quot;=bardzo dobra&quot;;[.$K$2:.$K$32];&quot;&gt;60&quot;;[.$K$2:.$K$32];&quot;&lt;=70&quot;;[.$J$2:.$J$32];&quot;=Mężczyzna&quot;)" table:style-name="ce53">
            <text:p>0</text:p>
          </table:table-cell>
          <table:table-cell office:value-type="float" office:value="1" table:formula="of:=COUNTIFS([.$L$2:.$L$32];&quot;=bardzo dobra&quot;;[.$K$2:.$K$32];&quot;&gt;70&quot;;[.$K$2:.$K$32];&quot;&lt;=80&quot;;[.$J$2:.$J$32];&quot;=Mężczyzna&quot;)" table:style-name="ce53">
            <text:p>1</text:p>
          </table:table-cell>
          <table:table-cell office:value-type="float" office:value="0" table:formula="of:=COUNTIFS([.$L$2:.$L$32];&quot;=bardzo dobra&quot;;[.$K$2:.$K$32];&quot;&gt;80&quot;;[.$J$2:.$J$32];&quot;=Mężczyzna&quot;)" table:style-name="ce53">
            <text:p>0</text:p>
          </table:table-cell>
          <table:table-cell table:style-name="ce53"/>
          <table:table-cell office:value-type="float" office:value="0" table:formula="of:=COUNTIFS([.$M$2:.$M$32];&quot;=bardzo dobra&quot;;[.$K$2:.$K$32];&quot;&lt;=20&quot;;[.$J$2:.$J$32];&quot;=Mężczyzna&quot;)" table:style-name="ce53">
            <text:p>0</text:p>
          </table:table-cell>
          <table:table-cell office:value-type="float" office:value="0" table:formula="of:=COUNTIFS([.$M$2:.$M$32];&quot;=bardzo dobr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M$2:.$M$32];&quot;=bardzo dobra&quot;;[.$K$2:.$K$32];&quot;&gt;30&quot;;[.$K$2:.$K$32];&quot;&lt;=40&quot;;[.$J$2:.$J$32];&quot;=Mężczyzna&quot;)" table:style-name="ce53">
            <text:p>0</text:p>
          </table:table-cell>
          <table:table-cell office:value-type="float" office:value="1" table:formula="of:=COUNTIFS([.$M$2:.$M$32];&quot;=bardzo dobra&quot;;[.$K$2:.$K$32];&quot;&gt;40&quot;;[.$K$2:.$K$32];&quot;&lt;=50&quot;;[.$J$2:.$J$32];&quot;=Mężczyzna&quot;)" table:style-name="ce53">
            <text:p>1</text:p>
          </table:table-cell>
          <table:table-cell office:value-type="float" office:value="0" table:formula="of:=COUNTIFS([.$M$2:.$M$32];&quot;=bardzo dobra&quot;;[.$K$2:.$K$32];&quot;&gt;50&quot;;[.$K$2:.$K$32];&quot;&lt;=60&quot;;[.$J$2:.$J$32];&quot;=Mężczyzna&quot;)" table:style-name="ce53">
            <text:p>0</text:p>
          </table:table-cell>
          <table:table-cell office:value-type="float" office:value="0" table:formula="of:=COUNTIFS([.$M$2:.$M$32];&quot;=bardzo dobra&quot;;[.$K$2:.$K$32];&quot;&gt;60&quot;;[.$K$2:.$K$32];&quot;&lt;=70&quot;;[.$J$2:.$J$32];&quot;=Mężczyzna&quot;)" table:style-name="ce53">
            <text:p>0</text:p>
          </table:table-cell>
          <table:table-cell office:value-type="float" office:value="0" table:formula="of:=COUNTIFS([.$M$2:.$M$32];&quot;=bardzo dobra&quot;;[.$K$2:.$K$32];&quot;&gt;70&quot;;[.$K$2:.$K$32];&quot;&lt;=80&quot;;[.$J$2:.$J$32];&quot;=Mężczyzna&quot;)" table:style-name="ce53">
            <text:p>0</text:p>
          </table:table-cell>
          <table:table-cell office:value-type="float" office:value="0" table:formula="of:=COUNTIFS([.$M$2:.$M$32];&quot;=bardzo dobra&quot;;[.$K$2:.$K$32];&quot;&gt;80&quot;;[.$J$2:.$J$32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dobra</text:p>
          </table:table-cell>
          <table:table-cell office:value-type="float" office:value="0" table:formula="of:=COUNTIFS([.$L$2:.$L$32];&quot;=dobra&quot;;[.$K$2:.$K$32];&quot;&lt;=20&quot;;[.$J$2:.$J$32];&quot;=Mężczyzna&quot;)" table:style-name="ce53">
            <text:p>0</text:p>
          </table:table-cell>
          <table:table-cell office:value-type="float" office:value="0" table:formula="of:=COUNTIFS([.$L$2:.$L$32];&quot;=dobra&quot;;[.$K$2:.$K$32];&quot;&gt;20&quot;;[.$K$2:.$K$32];&quot;&lt;=30&quot;;[.$J$2:.$J$32];&quot;=Mężczyzna&quot;)" table:style-name="ce53">
            <text:p>0</text:p>
          </table:table-cell>
          <table:table-cell office:value-type="float" office:value="1" table:formula="of:=COUNTIFS([.$L$2:.$L$32];&quot;=dobra&quot;;[.$K$2:.$K$32];&quot;&gt;30&quot;;[.$K$2:.$K$32];&quot;&lt;=40&quot;;[.$J$2:.$J$32];&quot;=Mężczyzna&quot;)" table:style-name="ce53">
            <text:p>1</text:p>
          </table:table-cell>
          <table:table-cell office:value-type="float" office:value="1" table:formula="of:=COUNTIFS([.$L$2:.$L$32];&quot;=dobra&quot;;[.$K$2:.$K$32];&quot;&gt;40&quot;;[.$K$2:.$K$32];&quot;&lt;=50&quot;;[.$J$2:.$J$32];&quot;=Mężczyzna&quot;)" table:style-name="ce53">
            <text:p>1</text:p>
          </table:table-cell>
          <table:table-cell office:value-type="float" office:value="3" table:formula="of:=COUNTIFS([.$L$2:.$L$32];&quot;=dobra&quot;;[.$K$2:.$K$32];&quot;&gt;50&quot;;[.$K$2:.$K$32];&quot;&lt;=60&quot;;[.$J$2:.$J$32];&quot;=Mężczyzna&quot;)" table:style-name="ce53">
            <text:p>3</text:p>
          </table:table-cell>
          <table:table-cell office:value-type="float" office:value="2" table:formula="of:=COUNTIFS([.$L$2:.$L$32];&quot;=dobra&quot;;[.$K$2:.$K$32];&quot;&gt;60&quot;;[.$K$2:.$K$32];&quot;&lt;=70&quot;;[.$J$2:.$J$32];&quot;=Mężczyzna&quot;)" table:style-name="ce53">
            <text:p>2</text:p>
          </table:table-cell>
          <table:table-cell office:value-type="float" office:value="3" table:formula="of:=COUNTIFS([.$L$2:.$L$32];&quot;=dobra&quot;;[.$K$2:.$K$32];&quot;&gt;70&quot;;[.$K$2:.$K$32];&quot;&lt;=80&quot;;[.$J$2:.$J$32];&quot;=Mężczyzna&quot;)" table:style-name="ce53">
            <text:p>3</text:p>
          </table:table-cell>
          <table:table-cell office:value-type="float" office:value="1" table:formula="of:=COUNTIFS([.$L$2:.$L$32];&quot;=dobra&quot;;[.$K$2:.$K$32];&quot;&gt;80&quot;;[.$J$2:.$J$32];&quot;=Mężczyzna&quot;)" table:style-name="ce53">
            <text:p>1</text:p>
          </table:table-cell>
          <table:table-cell table:style-name="ce53"/>
          <table:table-cell office:value-type="float" office:value="0" table:formula="of:=COUNTIFS([.$M$2:.$M$32];&quot;=dobra&quot;;[.$K$2:.$K$32];&quot;&lt;=20&quot;;[.$J$2:.$J$32];&quot;=Mężczyzna&quot;)" table:style-name="ce53">
            <text:p>0</text:p>
          </table:table-cell>
          <table:table-cell office:value-type="float" office:value="0" table:formula="of:=COUNTIFS([.$M$2:.$M$32];&quot;=dobra&quot;;[.$K$2:.$K$32];&quot;&gt;20&quot;;[.$K$2:.$K$32];&quot;&lt;=30&quot;;[.$J$2:.$J$32];&quot;=Mężczyzna&quot;)" table:style-name="ce53">
            <text:p>0</text:p>
          </table:table-cell>
          <table:table-cell office:value-type="float" office:value="1" table:formula="of:=COUNTIFS([.$M$2:.$M$32];&quot;=dobra&quot;;[.$K$2:.$K$32];&quot;&gt;30&quot;;[.$K$2:.$K$32];&quot;&lt;=40&quot;;[.$J$2:.$J$32];&quot;=Mężczyzna&quot;)" table:style-name="ce53">
            <text:p>1</text:p>
          </table:table-cell>
          <table:table-cell office:value-type="float" office:value="0" table:formula="of:=COUNTIFS([.$M$2:.$M$32];&quot;=dobra&quot;;[.$K$2:.$K$32];&quot;&gt;40&quot;;[.$K$2:.$K$32];&quot;&lt;=50&quot;;[.$J$2:.$J$32];&quot;=Mężczyzna&quot;)" table:style-name="ce53">
            <text:p>0</text:p>
          </table:table-cell>
          <table:table-cell office:value-type="float" office:value="2" table:formula="of:=COUNTIFS([.$M$2:.$M$32];&quot;=dobra&quot;;[.$K$2:.$K$32];&quot;&gt;50&quot;;[.$K$2:.$K$32];&quot;&lt;=60&quot;;[.$J$2:.$J$32];&quot;=Mężczyzna&quot;)" table:style-name="ce53">
            <text:p>2</text:p>
          </table:table-cell>
          <table:table-cell office:value-type="float" office:value="3" table:formula="of:=COUNTIFS([.$M$2:.$M$32];&quot;=dobra&quot;;[.$K$2:.$K$32];&quot;&gt;60&quot;;[.$K$2:.$K$32];&quot;&lt;=70&quot;;[.$J$2:.$J$32];&quot;=Mężczyzna&quot;)" table:style-name="ce53">
            <text:p>3</text:p>
          </table:table-cell>
          <table:table-cell office:value-type="float" office:value="3" table:formula="of:=COUNTIFS([.$M$2:.$M$32];&quot;=dobra&quot;;[.$K$2:.$K$32];&quot;&gt;70&quot;;[.$K2:.$K$32];&quot;&lt;=80&quot;;[.$J$2:.$J$32];&quot;=Mężczyzna&quot;)" table:style-name="ce53">
            <text:p>3</text:p>
          </table:table-cell>
          <table:table-cell office:value-type="float" office:value="0" table:formula="of:=COUNTIFS([.$M$2:.$M$32];&quot;=dobra&quot;;[.$K$2:.$K$32];&quot;&gt;80&quot;;[.$J$2:.$J$32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częściowa</text:p>
          </table:table-cell>
          <table:table-cell office:value-type="float" office:value="0" table:formula="of:=COUNTIFS([.$L$2:.$L$32];&quot;=częściowa&quot;;[.$K$2:.$K$32];&quot;&lt;=20&quot;;[.$J$2:.$J$32];&quot;=Mężczyzna&quot;)" table:style-name="ce53">
            <text:p>0</text:p>
          </table:table-cell>
          <table:table-cell office:value-type="float" office:value="0" table:formula="of:=COUNTIFS([.$L$2:.$L$32];&quot;=częściow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L$2:.$L$32];&quot;=częściowa&quot;;[.$K$2:.$K$32];&quot;&gt;30&quot;;[.$K$2:.$K$32];&quot;&lt;=40&quot;;[.$J$2:.$J$32];&quot;=Mężczyzna&quot;)" table:style-name="ce53">
            <text:p>0</text:p>
          </table:table-cell>
          <table:table-cell office:value-type="float" office:value="0" table:formula="of:=COUNTIFS([.$L$2:.$L$32];&quot;=częściowa&quot;;[.$K$2:.$K$32];&quot;&gt;40&quot;;[.$K$2:.$K$32];&quot;&lt;=50&quot;;[.$J$2:.$J$32];&quot;=Mężczyzna&quot;)" table:style-name="ce53">
            <text:p>0</text:p>
          </table:table-cell>
          <table:table-cell office:value-type="float" office:value="1" table:formula="of:=COUNTIFS([.$L$2:.$L$32];&quot;=częściowa&quot;;[.$K$2:.$K$32];&quot;&gt;50&quot;;[.$K$2:.$K$32];&quot;&lt;=60&quot;;[.$J$2:.$J$32];&quot;=Mężczyzna&quot;)" table:style-name="ce53">
            <text:p>1</text:p>
          </table:table-cell>
          <table:table-cell office:value-type="float" office:value="2" table:formula="of:=COUNTIFS([.$L$2:.$L$32];&quot;=częściowa&quot;;[.$K$2:.$K$32];&quot;&gt;60&quot;;[.$K$2:.$K$32];&quot;&lt;=70&quot;;[.$J$2:.$J$32];&quot;=Mężczyzna&quot;)" table:style-name="ce53">
            <text:p>2</text:p>
          </table:table-cell>
          <table:table-cell office:value-type="float" office:value="0" table:formula="of:=COUNTIFS([.$L$2:.$L$32];&quot;=częściowa&quot;;[.$K$2:.$K$32];&quot;&gt;70&quot;;[.$K$2:.$K$32];&quot;&lt;=80&quot;;[.$J$2:.$J$32];&quot;=Mężczyzna&quot;)" table:style-name="ce53">
            <text:p>0</text:p>
          </table:table-cell>
          <table:table-cell office:value-type="float" office:value="0" table:formula="of:=COUNTIFS([.$L$2:.$L$32];&quot;=częściowa&quot;;[.$K$2:.$K$32];&quot;&gt;80&quot;;[.$J$2:.$J$32];&quot;=Mężczyzna&quot;)" table:style-name="ce53">
            <text:p>0</text:p>
          </table:table-cell>
          <table:table-cell table:style-name="ce53"/>
          <table:table-cell office:value-type="float" office:value="0" table:formula="of:=COUNTIFS([.$M$2:.$M$32];&quot;=częściowa&quot;;[.$K$2:.$K$32];&quot;&lt;=20&quot;;[.$J$2:.$J$32];&quot;=Mężczyzna&quot;)" table:style-name="ce53">
            <text:p>0</text:p>
          </table:table-cell>
          <table:table-cell office:value-type="float" office:value="0" table:formula="of:=COUNTIFS([.$M$2:.$M$32];&quot;=częściow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M$2:.$M$32];&quot;=częściowa&quot;;[.$K$2:.$K$32];&quot;&gt;30&quot;;[.$K$2:.$K$32];&quot;&lt;=40&quot;;[.$J$2:.$J$32];&quot;=Mężczyzna&quot;)" table:style-name="ce53">
            <text:p>0</text:p>
          </table:table-cell>
          <table:table-cell office:value-type="float" office:value="0" table:formula="of:=COUNTIFS([.$M$2:.$M$32];&quot;=częściowa&quot;;[.$K$2:.$K$32];&quot;&gt;40&quot;;[.$K$2:.$K$32];&quot;&lt;=50&quot;;[.$J$2:.$J$32];&quot;=Mężczyzna&quot;)" table:style-name="ce53">
            <text:p>0</text:p>
          </table:table-cell>
          <table:table-cell office:value-type="float" office:value="0" table:formula="of:=COUNTIFS([.$M$2:.$M$32];&quot;=częściowa&quot;;[.$K$2:.$K$32];&quot;&gt;50&quot;;[.$K$2:.$K$32];&quot;&lt;=60&quot;;[.$J$2:.$J$32];&quot;=Mężczyzna&quot;)" table:style-name="ce53">
            <text:p>0</text:p>
          </table:table-cell>
          <table:table-cell office:value-type="float" office:value="0" table:formula="of:=COUNTIFS([.$M$2:.$M$32];&quot;=częściowa&quot;;[.$K$2:.$K$32];&quot;&gt;60&quot;;[.$K$2:.$K$32];&quot;&lt;=70&quot;;[.$J$2:.$J$32];&quot;=Mężczyzna&quot;)" table:style-name="ce53">
            <text:p>0</text:p>
          </table:table-cell>
          <table:table-cell office:value-type="float" office:value="0" table:formula="of:=COUNTIFS([.$M$2:.$M$32];&quot;=częściowa&quot;;[.$K$2:.$K$32];&quot;&gt;70&quot;;[.$K$2:.$K$32];&quot;&lt;=80&quot;;[.$J$2:.$J$32];&quot;=Mężczyzna&quot;)" table:style-name="ce53">
            <text:p>0</text:p>
          </table:table-cell>
          <table:table-cell office:value-type="float" office:value="0" table:formula="of:=COUNTIFS([.$M$2:.$M$32];&quot;=częściowa&quot;;[.$K$2:.$K$32];&quot;&gt;80&quot;;[.$J$2:.$J$32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progresja</text:p>
          </table:table-cell>
          <table:table-cell office:value-type="float" office:value="0" table:formula="of:=COUNTIFS([.$L$2:.$L$32];&quot;=progresja&quot;;[.$K$2:.$K$32];&quot;&lt;=20&quot;;[.$J$2:.$J$32];&quot;=Mężczyzna&quot;)" table:style-name="ce53">
            <text:p>0</text:p>
          </table:table-cell>
          <table:table-cell office:value-type="float" office:value="0" table:formula="of:=COUNTIFS([.$L$2:.$L$32];&quot;=progresj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L$2:.$L$32];&quot;=progresja&quot;;[.$K$2:.$K$32];&quot;&gt;30&quot;;[.$K$2:.$K$32];&quot;&lt;=40&quot;;[.$J$2:.$J$32];&quot;=Mężczyzna&quot;)" table:style-name="ce53">
            <text:p>0</text:p>
          </table:table-cell>
          <table:table-cell office:value-type="float" office:value="0" table:formula="of:=COUNTIFS([.$L$2:.$L$32];&quot;=progresja&quot;;[.$K$2:.$K$32];&quot;&gt;40&quot;;[.$K$2:.$K$32];&quot;&lt;=50&quot;;[.$J$2:.$J$32];&quot;=Mężczyzna&quot;)" table:style-name="ce53">
            <text:p>0</text:p>
          </table:table-cell>
          <table:table-cell office:value-type="float" office:value="0" table:formula="of:=COUNTIFS([.$L$2:.$L$32];&quot;=progresja&quot;;[.$K$2:.$K$32];&quot;&gt;50&quot;;[.$K$2:.$K$32];&quot;&lt;=60&quot;;[.$J$2:.$J$32];&quot;=Mężczyzna&quot;)" table:style-name="ce53">
            <text:p>0</text:p>
          </table:table-cell>
          <table:table-cell office:value-type="float" office:value="0" table:formula="of:=COUNTIFS([.$L$2:.$L$32];&quot;=progresja&quot;;[.$K$2:.$K$32];&quot;&gt;60&quot;;[.$K$2:.$K$32];&quot;&lt;=70&quot;;[.$J$2:.$J$32];&quot;=Mężczyzna&quot;)" table:style-name="ce53">
            <text:p>0</text:p>
          </table:table-cell>
          <table:table-cell office:value-type="float" office:value="0" table:formula="of:=COUNTIFS([.$L$2:.$L$32];&quot;=progresja&quot;;[.$K$2:.$K$32];&quot;&gt;70&quot;;[.$K$2:.$K$32];&quot;&lt;=80&quot;;[.$J$2:.$J$32];&quot;=Mężczyzna&quot;)" table:style-name="ce53">
            <text:p>0</text:p>
          </table:table-cell>
          <table:table-cell office:value-type="float" office:value="0" table:formula="of:=COUNTIFS([.$L$2:.$L$32];&quot;=progresja&quot;;[.$K$2:.$K$32];&quot;&gt;80&quot;;[.$J$2:.$J$32];&quot;=Mężczyzna&quot;)" table:style-name="ce53">
            <text:p>0</text:p>
          </table:table-cell>
          <table:table-cell table:style-name="ce53"/>
          <table:table-cell office:value-type="float" office:value="0" table:formula="of:=COUNTIFS([.$M$2:.$M$32];&quot;=progresja&quot;;[.$K$2:.$K$32];&quot;&lt;=20&quot;;[.$J$2:.$J$32];&quot;=Mężczyzna&quot;)" table:style-name="ce53">
            <text:p>0</text:p>
          </table:table-cell>
          <table:table-cell office:value-type="float" office:value="0" table:formula="of:=COUNTIFS([.$M$2:.$M$32];&quot;=progresj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M$2:.$M$32];&quot;=progresja&quot;;[.$K$2:.$K$32];&quot;&gt;30&quot;;[.$K$2:.$K$32];&quot;&lt;=40&quot;;[.$J$2:.$J$32];&quot;=Mężczyzna&quot;)" table:style-name="ce53">
            <text:p>0</text:p>
          </table:table-cell>
          <table:table-cell office:value-type="float" office:value="0" table:formula="of:=COUNTIFS([.$M$2:.$M$32];&quot;=progresja&quot;;[.$K$2:.$K$32];&quot;&gt;40&quot;;[.$K$2:.$K$32];&quot;&lt;=50&quot;;[.$J$2:.$J$32];&quot;=Mężczyzna&quot;)" table:style-name="ce53">
            <text:p>0</text:p>
          </table:table-cell>
          <table:table-cell office:value-type="float" office:value="0" table:formula="of:=COUNTIFS([.$M$2:.$M$32];&quot;=progresja&quot;;[.$K$2:.$K$32];&quot;&gt;50&quot;;[.$K$2:.$K$32];&quot;&lt;=60&quot;;[.$J$2:.$J$32];&quot;=Mężczyzna&quot;)" table:style-name="ce53">
            <text:p>0</text:p>
          </table:table-cell>
          <table:table-cell office:value-type="float" office:value="1" table:formula="of:=COUNTIFS([.$M$2:.$M$32];&quot;=progresja&quot;;[.$K$2:.$K$32];&quot;&gt;60&quot;;[.$K$2:.$K$32];&quot;&lt;=70&quot;;[.$J$2:.$J$32];&quot;=Mężczyzna&quot;)" table:style-name="ce53">
            <text:p>1</text:p>
          </table:table-cell>
          <table:table-cell office:value-type="float" office:value="0" table:formula="of:=COUNTIFS([.$M$2:.$M$32];&quot;=progresja&quot;;[.$K$2:.$K$32];&quot;&gt;70&quot;;[.$K$2:.$K$32];&quot;&lt;=80&quot;;[.$J$2:.$J$32];&quot;=Mężczyzna&quot;)" table:style-name="ce53">
            <text:p>0</text:p>
          </table:table-cell>
          <table:table-cell office:value-type="float" office:value="1" table:formula="of:=COUNTIFS([.$M$2:.$M$32];&quot;=progresja&quot;;[.$K$2:.$K$32];&quot;&gt;80&quot;;[.$J$2:.$J$32];&quot;=Mężczyzna&quot;)" table:style-name="ce53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wznowa</text:p>
          </table:table-cell>
          <table:table-cell office:value-type="float" office:value="0" table:formula="of:=COUNTIFS([.$L$2:.$L$32];&quot;=wznowa&quot;;[.$K$2:.$K$32];&quot;&lt;=20&quot;;[.$J$2:.$J$32];&quot;=Mężczyzna&quot;)" table:style-name="ce53">
            <text:p>0</text:p>
          </table:table-cell>
          <table:table-cell office:value-type="float" office:value="0" table:formula="of:=COUNTIFS([.$L$2:.$L$32];&quot;=wznow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L$2:.$L$32];&quot;=wznowa&quot;;[.$K$2:.$K$32];&quot;&gt;30&quot;;[.$K$2:.$K$32];&quot;&lt;=40&quot;;[.$J$2:.$J$32];&quot;=Mężczyzna&quot;)" table:style-name="ce53">
            <text:p>0</text:p>
          </table:table-cell>
          <table:table-cell office:value-type="float" office:value="0" table:formula="of:=COUNTIFS([.$L$2:.$L$32];&quot;=wznowa&quot;;[.$K$2:.$K$32];&quot;&gt;40&quot;;[.$K$2:.$K$32];&quot;&lt;=50&quot;;[.$J$2:.$J$32];&quot;=Mężczyzna&quot;)" table:style-name="ce53">
            <text:p>0</text:p>
          </table:table-cell>
          <table:table-cell office:value-type="float" office:value="0" table:formula="of:=COUNTIFS([.$L$2:.$L$32];&quot;=wznowa&quot;;[.$K$2:.$K$32];&quot;&gt;50&quot;;[.$K$2:.$K$32];&quot;&lt;=60&quot;;[.$J$2:.$J$32];&quot;=Mężczyzna&quot;)" table:style-name="ce53">
            <text:p>0</text:p>
          </table:table-cell>
          <table:table-cell office:value-type="float" office:value="0" table:formula="of:=COUNTIFS([.$L$2:.$L$32];&quot;=wznowa&quot;;[.$K$2:.$K$32];&quot;&gt;60&quot;;[.$K$2:.$K$32];&quot;&lt;=70&quot;;[.$J$2:.$J$32];&quot;=Mężczyzna&quot;)" table:style-name="ce53">
            <text:p>0</text:p>
          </table:table-cell>
          <table:table-cell office:value-type="float" office:value="0" table:formula="of:=COUNTIFS([.$L$2:.$L$32];&quot;=wznowa&quot;;[.$K$2:.$K$32];&quot;&gt;70&quot;;[.$K$2:.$K$32];&quot;&lt;=80&quot;;[.$J$2:.$J$32];&quot;=Mężczyzna&quot;)" table:style-name="ce53">
            <text:p>0</text:p>
          </table:table-cell>
          <table:table-cell office:value-type="float" office:value="0" table:formula="of:=COUNTIFS([.$L$2:.$L$32];&quot;=wznowa&quot;;[.$K$2:.$K$32];&quot;&gt;80&quot;;[.$J$2:.$J$32];&quot;=Mężczyzna&quot;)" table:style-name="ce53">
            <text:p>0</text:p>
          </table:table-cell>
          <table:table-cell table:style-name="ce53"/>
          <table:table-cell office:value-type="float" office:value="0" table:formula="of:=COUNTIFS([.$M$2:.$M$32];&quot;=wznowa&quot;;[.$K$2:.$K$32];&quot;&lt;=20&quot;;[.$J$2:.$J$32];&quot;=Mężczyzna&quot;)" table:style-name="ce53">
            <text:p>0</text:p>
          </table:table-cell>
          <table:table-cell office:value-type="float" office:value="0" table:formula="of:=COUNTIFS([.$M$2:.$M$32];&quot;=wznowa&quot;;[.$K$2:.$K$32];&quot;&gt;20&quot;;[.$K$2:.$K$32];&quot;&lt;=30&quot;;[.$J$2:.$J$32];&quot;=Mężczyzna&quot;)" table:style-name="ce53">
            <text:p>0</text:p>
          </table:table-cell>
          <table:table-cell office:value-type="float" office:value="0" table:formula="of:=COUNTIFS([.$M$2:.$M$32];&quot;=wznowa&quot;;[.$K$2:.$K$32];&quot;&gt;30&quot;;[.$K$2:.$K$32];&quot;&lt;=40&quot;;[.$J$2:.$J$32];&quot;=Mężczyzna&quot;)" table:style-name="ce53">
            <text:p>0</text:p>
          </table:table-cell>
          <table:table-cell office:value-type="float" office:value="0" table:formula="of:=COUNTIFS([.$M$2:.$M$32];&quot;=wznowa&quot;;[.$K$2:.$K$32];&quot;&gt;40&quot;;[.$K$2:.$K$32];&quot;&lt;=50&quot;;[.$J$2:.$J$32];&quot;=Mężczyzna&quot;)" table:style-name="ce53">
            <text:p>0</text:p>
          </table:table-cell>
          <table:table-cell office:value-type="float" office:value="2" table:formula="of:=COUNTIFS([.$M$2:.$M$32];&quot;=wznowa&quot;;[.$K$2:.$K$32];&quot;&gt;50&quot;;[.$K$2:.$K$32];&quot;&lt;=60&quot;;[.$J$2:.$J$32];&quot;=Mężczyzna&quot;)" table:style-name="ce53">
            <text:p>2</text:p>
          </table:table-cell>
          <table:table-cell office:value-type="float" office:value="0" table:formula="of:=COUNTIFS([.$M$2:.$M$32];&quot;=wznowa&quot;;[.$K$2:.$K$32];&quot;&gt;60&quot;;[.$K$2:.$K$32];&quot;&lt;=70&quot;;[.$J$2:.$J$32];&quot;=Mężczyzna&quot;)" table:style-name="ce53">
            <text:p>0</text:p>
          </table:table-cell>
          <table:table-cell office:value-type="float" office:value="1" table:formula="of:=COUNTIFS([.$M$2:.$M$32];&quot;=wznowa&quot;;[.$K$2:.$K$32];&quot;&gt;70&quot;;[.$K$2:.$K$32];&quot;&lt;=80&quot;;[.$J$2:.$J$32];&quot;=Mężczyzna&quot;)" table:style-name="ce53">
            <text:p>1</text:p>
          </table:table-cell>
          <table:table-cell office:value-type="float" office:value="0" table:formula="of:=COUNTIFS([.$M$2:.$M$32];&quot;=wznowa&quot;;[.$K$2:.$K$32];&quot;&gt;80&quot;;[.$J$2:.$J$32];&quot;=Mężczyzna&quot;)" table:style-name="ce5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3">
            <text:p>suma</text:p>
          </table:table-cell>
          <table:table-cell office:value-type="float" office:value="0" table:formula="of:=SUM([.B112:.B116])" table:style-name="ce53">
            <text:p>0</text:p>
          </table:table-cell>
          <table:table-cell office:value-type="float" office:value="0" table:formula="of:=SUM([.C112:.C116])" table:style-name="ce53">
            <text:p>0</text:p>
          </table:table-cell>
          <table:table-cell office:value-type="float" office:value="1" table:formula="of:=SUM([.D112:.D116])" table:style-name="ce53">
            <text:p>1</text:p>
          </table:table-cell>
          <table:table-cell office:value-type="float" office:value="1" table:formula="of:=SUM([.E112:.E116])" table:style-name="ce53">
            <text:p>1</text:p>
          </table:table-cell>
          <table:table-cell office:value-type="float" office:value="4" table:formula="of:=SUM([.F112:.F116])" table:style-name="ce53">
            <text:p>4</text:p>
          </table:table-cell>
          <table:table-cell office:value-type="float" office:value="4" table:formula="of:=SUM([.G112:.G116])" table:style-name="ce53">
            <text:p>4</text:p>
          </table:table-cell>
          <table:table-cell office:value-type="float" office:value="4" table:formula="of:=SUM([.H112:.H116])" table:style-name="ce53">
            <text:p>4</text:p>
          </table:table-cell>
          <table:table-cell office:value-type="float" office:value="1" table:formula="of:=SUM([.I112:.I116])" table:style-name="ce53">
            <text:p>1</text:p>
          </table:table-cell>
          <table:table-cell office:value-type="float" office:value="0" table:formula="of:=SUM([.J112:.J116])" table:style-name="ce53">
            <text:p>0</text:p>
          </table:table-cell>
          <table:table-cell office:value-type="float" office:value="0" table:formula="of:=SUM([.K112:.K116])" table:style-name="ce53">
            <text:p>0</text:p>
          </table:table-cell>
          <table:table-cell office:value-type="float" office:value="0" table:formula="of:=SUM([.L112:.L116])" table:style-name="ce53">
            <text:p>0</text:p>
          </table:table-cell>
          <table:table-cell office:value-type="float" office:value="1" table:formula="of:=SUM([.M112:.M116])" table:style-name="ce53">
            <text:p>1</text:p>
          </table:table-cell>
          <table:table-cell office:value-type="float" office:value="1" table:formula="of:=SUM([.N112:.N116])" table:style-name="ce53">
            <text:p>1</text:p>
          </table:table-cell>
          <table:table-cell office:value-type="float" office:value="4" table:formula="of:=SUM([.O112:.O116])" table:style-name="ce53">
            <text:p>4</text:p>
          </table:table-cell>
          <table:table-cell office:value-type="float" office:value="4" table:formula="of:=SUM([.P112:.P116])" table:style-name="ce53">
            <text:p>4</text:p>
          </table:table-cell>
          <table:table-cell office:value-type="float" office:value="4" table:formula="of:=SUM([.Q112:.Q116])" table:style-name="ce53">
            <text:p>4</text:p>
          </table:table-cell>
          <table:table-cell office:value-type="float" office:value="1" table:formula="of:=SUM([.R112:.R116])" table:style-name="ce53">
            <text:p>1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3">
            <text:p>SUMA</text:p>
          </table:table-cell>
          <table:table-cell office:value-type="float" office:value="31" table:formula="of:=SUM([.B104:.I108];[.B112:.I116])" table:style-name="ce1">
            <text:p>31</text:p>
          </table:table-cell>
          <table:table-cell table:number-columns-repeated="8" table:style-name="ce1"/>
          <table:table-cell office:value-type="string" table:style-name="ce53">
            <text:p>SUMA</text:p>
          </table:table-cell>
          <table:table-cell office:value-type="float" office:value="31" table:formula="of:=SUM([.K104:.R108];[.K112:.R116])" table:style-name="ce1">
            <text:p>31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0" draw:id="id11" draw:style-name="a11" draw:name="Wykres 12" svg:x="0.07813in" svg:y="0.125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11" draw:id="id12" draw:style-name="a12" draw:name="Wykres 22" svg:x="0.02604in" svg:y="0.05208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 table:style-name="ce1">
            <draw:frame draw:z-index="3" draw:id="id4" draw:style-name="a4" draw:name="Wykres 5" svg:x="0.04583in" svg:y="0.01667in" svg:width="4.98889in" svg:height="2.9166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04843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081" table:formula="of:=SUM([.D2:.D1048559])" table:style-name="ce1">
            <text:p>1081</text:p>
          </table:table-cell>
          <table:table-cell table:number-columns-repeated="16380"/>
        </table:table-row>
        <table:table-row table:number-rows-repeated="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textual="true"/>
    </number:date-style>
    <style:style style:name="Dane_32_wej_347_ciowe" style:display-name="Dane wejściowe" style:family="table-cell" style:data-style-name="N0">
      <style:table-cell-properties fo:border="thin solid #7F7F7F" fo:background-color="#FFCC99"/>
      <style:text-properties fo:color="#3F3F76"/>
    </style:style>
    <style:style style:name="Dobry" style:family="table-cell" style:data-style-name="N0">
      <style:table-cell-properties fo:background-color="#C6EFCE"/>
      <style:text-properties fo:color="#006100"/>
    </style:style>
    <style:style style:name="Neutralny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Joanna Marek</meta:initial-creator>
    <dc:creator>Joanna Marek</dc:creator>
    <meta:creation-date>2023-08-18T16:28:58Z</meta:creation-date>
    <dc:date>2026-06-07T11:32:22Z</dc:date>
    <meta:print-date>2023-08-23T18:24:0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vertical="false" chart:connect-bars="fals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8.8109448818898pt" svg:width="732.621968503937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Arkusz1.$H$2" chart:values-cell-range-address="Arkusz1.$H$3" chart:class="chart:bar" chart:attached-axis="primary-y" chart:style-name="G0S0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93.4pt" svg:width="643.8002362204724pt" chart:style-name="Crt0">
        <chart:title svg:x="58.77pt" svg:y="8.40299212598425pt" chart:style-name="CT00">
          <text:p text:style-name="a0" text:class-names="" text:cond-style-name="">Wykres zalężności odpowiedzi w trakcie leczenie od płci i wieku [chłoniak Hodgkina]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svg:x="485.0002362204725pt" svg:y="243.505905511811pt" chart:style-name="AT00">
              <text:p text:style-name="a1" text:class-names="" text:cond-style-name="">Mężczyźni</text:p>
            </chart:title>
            <chart:grid chart:class="major" chart:style-name="GMa0"/>
          </chart:axis>
          <chart:axis chart:dimension="x" chart:name="primary-x" chart:style-name="Axs1">
            <chart:title svg:x="188.5070078740158pt" svg:y="248.7762204724409pt" chart:style-name="AT01">
              <text:p text:style-name="a2" text:class-names="" text:cond-style-name="">Kobiety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point chart:repeated="8"/>
          </chart:series>
          <chart:series chart:label-cell-address="local-table.$F$1" chart:values-cell-range-address="local-table.$F$2:.$F$9" chart:class="chart:bar" chart:attached-axis="primary-y" chart:style-name="G0S4">
            <chart:data-point chart:repeated="8"/>
          </chart:series>
          <chart:series chart:label-cell-address="local-table.$G$1" chart:values-cell-range-address="local-table.$G$2:.$G$9" chart:class="chart:bar" chart:attached-axis="primary-y" chart:style-name="G0S5">
            <chart:data-point chart:repeated="8"/>
          </chart:series>
          <chart:series chart:label-cell-address="local-table.$H$1" chart:values-cell-range-address="local-table.$H$2:.$H$9" chart:class="chart:bar" chart:attached-axis="primary-y" chart:style-name="G0S6">
            <chart:data-point chart:repeated="8"/>
          </chart:series>
          <chart:series chart:label-cell-address="local-table.$I$1" chart:values-cell-range-address="local-table.$I$2:.$I$9" chart:class="chart:bar" chart:attached-axis="primary-y" chart:style-name="G0S7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&lt;21</text:p>
              </table:table-cell>
              <table:table-cell office:value-type="string">
                <text:p>21-30</text:p>
              </table:table-cell>
              <table:table-cell office:value-type="string">
                <text:p>31-40</text:p>
              </table:table-cell>
              <table:table-cell office:value-type="string">
                <text:p>41-50</text:p>
              </table:table-cell>
              <table:table-cell office:value-type="string">
                <text:p>51-60</text:p>
              </table:table-cell>
              <table:table-cell office:value-type="string">
                <text:p>61-70</text:p>
              </table:table-cell>
              <table:table-cell office:value-type="string">
                <text:p>71-80</text:p>
              </table:table-cell>
              <table:table-cell office:value-type="string">
                <text:p>&gt;80</text:p>
              </table:table-cell>
            </table:table-row>
          </table:table-header-rows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0"/>
            <table:table-cell office:value-type="float" office:value="1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zęściowa</text:p>
            </table:table-cell>
            <table:table-cell office:value-type="float" office:value="1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rogresja</text:p>
            </table:table-cell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/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częściowa</text:p>
            </table:table-cell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7496850393701pt" svg:width="396.3751181102362pt" chart:style-name="Crt0">
        <chart:title svg:x="90.33pt" svg:y="9.0pt" chart:style-name="CT00">
          <text:p text:style-name="a0" text:class-names="" text:cond-style-name="">Zależność odpowiedz po zakończeniu leczenia od płci oraz wieku [chłoniak Hodgkina]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svg:x="274.1594488188976pt" svg:y="201.6434645669291pt" chart:style-name="AT00">
              <text:p text:style-name="a1" text:class-names="" text:cond-style-name="">Mężczyźni</text:p>
            </chart:title>
            <chart:grid chart:class="major" chart:style-name="GMa0"/>
          </chart:axis>
          <chart:axis chart:dimension="x" chart:name="primary-x" chart:style-name="Axs1">
            <chart:title svg:x="84.88976377952755pt" svg:y="201.1896062992126pt" chart:style-name="AT01">
              <text:p text:style-name="a2" text:class-names="" text:cond-style-name="">Kobiety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point chart:repeated="8"/>
          </chart:series>
          <chart:series chart:label-cell-address="local-table.$F$1" chart:values-cell-range-address="local-table.$F$2:.$F$9" chart:class="chart:bar" chart:attached-axis="primary-y" chart:style-name="G0S4">
            <chart:data-point chart:repeated="8"/>
          </chart:series>
          <chart:series chart:label-cell-address="local-table.$G$1" chart:values-cell-range-address="local-table.$G$2:.$G$9" chart:class="chart:bar" chart:attached-axis="primary-y" chart:style-name="G0S5">
            <chart:data-point chart:repeated="8"/>
          </chart:series>
          <chart:series chart:label-cell-address="local-table.$H$1" chart:values-cell-range-address="local-table.$H$2:.$H$9" chart:class="chart:bar" chart:attached-axis="primary-y" chart:style-name="G0S6">
            <chart:data-point chart:repeated="8"/>
          </chart:series>
          <chart:series chart:label-cell-address="local-table.$I$1" chart:values-cell-range-address="local-table.$I$2:.$I$9" chart:class="chart:bar" chart:attached-axis="primary-y" chart:style-name="G0S7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&lt;21</text:p>
              </table:table-cell>
              <table:table-cell office:value-type="string">
                <text:p>21-30</text:p>
              </table:table-cell>
              <table:table-cell office:value-type="string">
                <text:p>31-40</text:p>
              </table:table-cell>
              <table:table-cell office:value-type="string">
                <text:p>41-50</text:p>
              </table:table-cell>
              <table:table-cell office:value-type="string">
                <text:p>51-60</text:p>
              </table:table-cell>
              <table:table-cell office:value-type="string">
                <text:p>61-70</text:p>
              </table:table-cell>
              <table:table-cell office:value-type="string">
                <text:p>71-80</text:p>
              </table:table-cell>
              <table:table-cell office:value-type="string">
                <text:p>&gt;80</text:p>
              </table:table-cell>
            </table:table-row>
          </table:table-header-rows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zęściowa</text:p>
            </table:table-cell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/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rogresja</text:p>
            </table:table-cell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wznowa</text:p>
            </table:table-cell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Zależność odpowiedzi w trakcie leczenia od płci oraz wieku<text:s text:c="1"/></text:p>
        </chart:title>
        <chart:legend chart:legend-position="bottom" chart:legend-align="center" chart:style-name="Lgnd"/>
        <chart:plot-area svg:x="24.22pt" svg:y="48.68732283464567pt" svg:width="316.1047244094488pt" svg:height="131.2322047244095pt" chart:style-name="Plt0" chart:data-source-has-labels="both">
          <chart:axis chart:dimension="y" chart:name="primary-y" chart:style-name="Axs0">
            <chart:title svg:x="281.0pt" svg:y="168.8482677165354pt" chart:style-name="AT00">
              <text:p text:style-name="a1" text:class-names="" text:cond-style-name="">Tytuł osi</text:p>
            </chart:title>
            <chart:grid chart:class="major" chart:style-name="GMa0"/>
          </chart:axis>
          <chart:axis chart:dimension="x" chart:name="primary-x" chart:style-name="Axs1">
            <chart:title svg:x="87.0996062992126pt" svg:y="167.9195275590551pt" chart:style-name="AT01">
              <text:p text:style-name="a2" text:class-names="" text:cond-style-name="">Tytuł osi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point chart:repeated="8"/>
          </chart:series>
          <chart:series chart:label-cell-address="local-table.$F$1" chart:values-cell-range-address="local-table.$F$2:.$F$9" chart:class="chart:bar" chart:attached-axis="primary-y" chart:style-name="G0S4">
            <chart:data-point chart:repeated="8"/>
          </chart:series>
          <chart:series chart:label-cell-address="local-table.$G$1" chart:values-cell-range-address="local-table.$G$2:.$G$9" chart:class="chart:bar" chart:attached-axis="primary-y" chart:style-name="G0S5">
            <chart:data-point chart:repeated="8"/>
          </chart:series>
          <chart:series chart:label-cell-address="local-table.$H$1" chart:values-cell-range-address="local-table.$H$2:.$H$9" chart:class="chart:bar" chart:attached-axis="primary-y" chart:style-name="G0S6">
            <chart:data-point chart:repeated="8"/>
          </chart:series>
          <chart:series chart:label-cell-address="local-table.$I$1" chart:values-cell-range-address="local-table.$I$2:.$I$9" chart:class="chart:bar" chart:attached-axis="primary-y" chart:style-name="G0S7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&lt;21</text:p>
              </table:table-cell>
              <table:table-cell office:value-type="string">
                <text:p>21-30</text:p>
              </table:table-cell>
              <table:table-cell office:value-type="string">
                <text:p>31-40</text:p>
              </table:table-cell>
              <table:table-cell office:value-type="string">
                <text:p>41-50</text:p>
              </table:table-cell>
              <table:table-cell office:value-type="string">
                <text:p>51-60</text:p>
              </table:table-cell>
              <table:table-cell office:value-type="string">
                <text:p>61-70</text:p>
              </table:table-cell>
              <table:table-cell office:value-type="string">
                <text:p>71-80</text:p>
              </table:table-cell>
              <table:table-cell office:value-type="string">
                <text:p>&gt;80</text:p>
              </table:table-cell>
            </table:table-row>
          </table:table-header-rows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0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zęściowa</text:p>
            </table:table-cell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progresj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/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2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częściow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2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Zależność odpowiedzi po leczeniu od płci oraz wieku [chłoniak nie Hodgkina]</text:p>
        </chart:title>
        <chart:legend chart:legend-position="bottom" chart:legend-align="center" chart:style-name="Lgnd"/>
        <chart:plot-area svg:x="26.87496062992126pt" svg:y="48.68732283464567pt" svg:width="313.1730708661418pt" svg:height="127.232125984252pt" chart:style-name="Plt0" chart:data-source-has-labels="both">
          <chart:axis chart:dimension="y" chart:name="primary-y" chart:style-name="Axs0">
            <chart:title svg:x="266.0pt" svg:y="168.32pt" chart:style-name="AT00">
              <text:p text:style-name="a1" text:class-names="" text:cond-style-name="">Mężczyżni</text:p>
            </chart:title>
            <chart:grid chart:class="major" chart:style-name="GMa0"/>
          </chart:axis>
          <chart:axis chart:dimension="x" chart:name="primary-x" chart:style-name="Axs1">
            <chart:title svg:x="84.37196850393701pt" svg:y="166.9195275590551pt" chart:style-name="AT01">
              <text:p text:style-name="a2" text:class-names="" text:cond-style-name="">Kobiety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point chart:repeated="8"/>
          </chart:series>
          <chart:series chart:label-cell-address="local-table.$F$1" chart:values-cell-range-address="local-table.$F$2:.$F$9" chart:class="chart:bar" chart:attached-axis="primary-y" chart:style-name="G0S4">
            <chart:data-point chart:repeated="8"/>
          </chart:series>
          <chart:series chart:label-cell-address="local-table.$G$1" chart:values-cell-range-address="local-table.$G$2:.$G$9" chart:class="chart:bar" chart:attached-axis="primary-y" chart:style-name="G0S5">
            <chart:data-point chart:repeated="8"/>
          </chart:series>
          <chart:series chart:label-cell-address="local-table.$H$1" chart:values-cell-range-address="local-table.$H$2:.$H$9" chart:class="chart:bar" chart:attached-axis="primary-y" chart:style-name="G0S6">
            <chart:data-point chart:repeated="8"/>
          </chart:series>
          <chart:series chart:label-cell-address="local-table.$I$1" chart:values-cell-range-address="local-table.$I$2:.$I$9" chart:class="chart:bar" chart:attached-axis="primary-y" chart:style-name="G0S7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&lt;21</text:p>
              </table:table-cell>
              <table:table-cell office:value-type="string">
                <text:p>21-30</text:p>
              </table:table-cell>
              <table:table-cell office:value-type="string">
                <text:p>31-40</text:p>
              </table:table-cell>
              <table:table-cell office:value-type="string">
                <text:p>41-50</text:p>
              </table:table-cell>
              <table:table-cell office:value-type="string">
                <text:p>51-60</text:p>
              </table:table-cell>
              <table:table-cell office:value-type="string">
                <text:p>61-70</text:p>
              </table:table-cell>
              <table:table-cell office:value-type="string">
                <text:p>71-80</text:p>
              </table:table-cell>
              <table:table-cell office:value-type="string">
                <text:p>&gt;80</text:p>
              </table:table-cell>
            </table:table-row>
          </table:table-header-rows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3"/>
            <table:table-cell office:value-type="float" office:value="4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wznow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/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bardzo dobr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obra</text:p>
            </table:table-cell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2"/>
            <table:table-cell office:value-type="float" office:value="3"/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progresj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wznowa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DANE DEMOGRAFICZN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LOŚĆ OSÓB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WIEK</text:p>
            </chart:title>
          </chart:axis>
          <chart:series chart:label-cell-address="Arkusz1.$D$60" chart:values-cell-range-address="Arkusz1.$D$61:.$D$68" chart:class="chart:bar" chart:attached-axis="primary-y" chart:style-name="G0S0">
            <chart:data-point chart:repeated="8"/>
          </chart:series>
          <chart:series chart:label-cell-address="Arkusz1.$E$60" chart:values-cell-range-address="Arkusz1.$E$61:.$E$68" chart:class="chart:bar" chart:attached-axis="primary-y" chart:style-name="G0S1"/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0.0002362204724pt" svg:width="360.0pt" chart:style-name="Crt0">
        <chart:title chart:style-name="CT00">
          <text:p text:style-name="a0" text:class-names="" text:cond-style-name="">Odpowiedź na leczeni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A$36:.$A$40"/>
          </chart:axis>
          <chart:series chart:label-cell-address="Arkusz2.$B$34" chart:values-cell-range-address="Arkusz2.$B$36:.$B$40" chart:class="chart:bar" chart:attached-axis="primary-y" chart:style-name="G0S0">
            <chart:data-point chart:repeated="5"/>
          </chart:series>
          <chart:series chart:label-cell-address="Arkusz2.$C$34" chart:values-cell-range-address="Arkusz2.$C$36:.$C$40" chart:class="chart:bar" chart:attached-axis="primary-y" chart:style-name="G0S1">
            <chart:data-point chart:repeated="5"/>
          </chart:series>
          <chart:series chart:label-cell-address="Arkusz2.$D$34" chart:values-cell-range-address="Arkusz2.$D$36:.$D$40" chart:class="chart:bar" chart:attached-axis="primary-y" chart:style-name="G0S2">
            <chart:data-point chart:repeated="5"/>
          </chart:series>
          <chart:series chart:label-cell-address="Arkusz2.$E$34" chart:values-cell-range-address="Arkusz2.$E$36:.$E$40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00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1f4e79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2e75b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0.0002362204724pt" svg:width="359.5996062992126pt" chart:style-name="Crt0">
        <chart:title svg:x="76.58228346456693pt" svg:y="0.0pt" chart:style-name="CT00">
          <text:p text:style-name="a0" text:class-names="" text:cond-style-name="">ależność odpowiedzi na leczenie od płci pacjenta [chłoniak Hodgkina]<text:s text:c="1"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A$47:.$A$51"/>
          </chart:axis>
          <chart:series chart:values-cell-range-address="Arkusz2.$B$47:.$B$51" chart:class="chart:bar" chart:attached-axis="primary-y" chart:style-name="G0S0">
            <chart:data-point chart:repeated="5"/>
          </chart:series>
          <chart:series chart:values-cell-range-address="Arkusz2.$C$47:.$C$51" chart:class="chart:bar" chart:attached-axis="primary-y" chart:style-name="G0S1">
            <chart:data-point chart:repeated="5"/>
          </chart:series>
          <chart:series chart:values-cell-range-address="Arkusz2.$D$47:.$D$51" chart:class="chart:bar" chart:attached-axis="primary-y" chart:style-name="G0S2">
            <chart:data-point chart:repeated="5"/>
          </chart:series>
          <chart:series chart:values-cell-range-address="Arkusz2.$E$47:.$E$51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be5d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ebf7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c55a11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2e75b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0.0002362204724pt" svg:width="359.2000787401575pt" chart:style-name="Crt0">
        <chart:title chart:style-name="CT00">
          <text:p text:style-name="a0" text:class-names="" text:cond-style-name="">Zależność odpowiedzi na leczenie od płci pacjenta [chłoniak nie Hodgkina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A$85:.$A$89"/>
          </chart:axis>
          <chart:series chart:values-cell-range-address="Arkusz2.$B$85:.$B$89" chart:class="chart:bar" chart:attached-axis="primary-y" chart:style-name="G0S0">
            <chart:data-point chart:repeated="5"/>
          </chart:series>
          <chart:series chart:values-cell-range-address="Arkusz2.$C$85:.$C$89" chart:class="chart:bar" chart:attached-axis="primary-y" chart:style-name="G0S1">
            <chart:data-point chart:repeated="5"/>
          </chart:series>
          <chart:series chart:values-cell-range-address="Arkusz2.$D$85:.$D$89" chart:class="chart:bar" chart:attached-axis="primary-y" chart:style-name="G0S2">
            <chart:data-point chart:repeated="5"/>
          </chart:series>
          <chart:series chart:values-cell-range-address="Arkusz2.$E$85:.$E$89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6.0499212598425pt" svg:width="338.09968503937pt" chart:style-name="Crt0">
        <chart:title chart:style-name="CT00">
          <text:p text:style-name="a0" text:class-names="" text:cond-style-name="">Zależność odpowiedzi pacjenta na zastosowane leczenie od <text:s text:c="1"/>wieku pacjent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B$55:.$I$55"/>
          </chart:axis>
          <chart:series chart:label-cell-address="Arkusz2.$A$56" chart:values-cell-range-address="Arkusz2.$B$56:.$I$56" chart:class="chart:bar" chart:attached-axis="primary-y" chart:style-name="G0S0">
            <chart:data-point chart:repeated="8"/>
          </chart:series>
          <chart:series chart:label-cell-address="Arkusz2.$A$57" chart:values-cell-range-address="Arkusz2.$B$57:.$I$57" chart:class="chart:bar" chart:attached-axis="primary-y" chart:style-name="G0S1">
            <chart:data-point chart:repeated="8"/>
          </chart:series>
          <chart:series chart:label-cell-address="Arkusz2.$A$58" chart:values-cell-range-address="Arkusz2.$B$58:.$I$58" chart:class="chart:bar" chart:attached-axis="primary-y" chart:style-name="G0S2">
            <chart:data-point chart:repeated="8"/>
          </chart:series>
          <chart:series chart:label-cell-address="Arkusz2.$A$59" chart:values-cell-range-address="Arkusz2.$B$59:.$I$59" chart:class="chart:bar" chart:attached-axis="primary-y" chart:style-name="G0S3">
            <chart:data-point chart:repeated="8"/>
          </chart:series>
          <chart:series chart:label-cell-address="Arkusz2.$A$60" chart:values-cell-range-address="Arkusz2.$B$60:.$I$60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2.2502362204724pt" svg:width="360.2497637795275pt" chart:style-name="Crt0">
        <chart:title chart:style-name="CT00">
          <text:p text:style-name="a0" text:class-names="" text:cond-style-name="">Tytuł wykresu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J$55:.$Q$55"/>
          </chart:axis>
          <chart:series chart:label-cell-address="Arkusz2.$A$56" chart:values-cell-range-address="Arkusz2.$J$56:.$Q$56" chart:class="chart:bar" chart:attached-axis="primary-y" chart:style-name="G0S0">
            <chart:data-point chart:repeated="8"/>
          </chart:series>
          <chart:series chart:label-cell-address="Arkusz2.$A$57" chart:values-cell-range-address="Arkusz2.$J$57:.$Q$57" chart:class="chart:bar" chart:attached-axis="primary-y" chart:style-name="G0S1">
            <chart:data-point chart:repeated="8"/>
          </chart:series>
          <chart:series chart:label-cell-address="Arkusz2.$A$58" chart:values-cell-range-address="Arkusz2.$J$58:.$Q$58" chart:class="chart:bar" chart:attached-axis="primary-y" chart:style-name="G0S2">
            <chart:data-point chart:repeated="8"/>
          </chart:series>
          <chart:series chart:label-cell-address="Arkusz2.$A$59" chart:values-cell-range-address="Arkusz2.$J$59:.$Q$59" chart:class="chart:bar" chart:attached-axis="primary-y" chart:style-name="G0S3">
            <chart:data-point chart:repeated="8"/>
          </chart:series>
          <chart:series chart:label-cell-address="Arkusz2.$A$60" chart:values-cell-range-address="Arkusz2.$J$60:.$Q$60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2.2502362204724pt" svg:width="360.0pt" chart:style-name="Crt0">
        <chart:title svg:x="201.7274803149606pt" svg:y="192.0002362204724pt" chart:style-name="CT00">
          <text:p text:style-name="a0" text:class-names="" text:cond-style-name="">Tytuł wykresu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B$93:.$I$93"/>
          </chart:axis>
          <chart:series chart:label-cell-address="Arkusz2.$A$94" chart:values-cell-range-address="Arkusz2.$B$94:.$I$94" chart:class="chart:bar" chart:attached-axis="primary-y" chart:style-name="G0S0">
            <chart:data-point chart:repeated="8"/>
          </chart:series>
          <chart:series chart:label-cell-address="Arkusz2.$A$95" chart:values-cell-range-address="Arkusz2.$B$95:.$I$95" chart:class="chart:bar" chart:attached-axis="primary-y" chart:style-name="G0S1">
            <chart:data-point chart:repeated="8"/>
          </chart:series>
          <chart:series chart:label-cell-address="Arkusz2.$A$96" chart:values-cell-range-address="Arkusz2.$B$96:.$I$96" chart:class="chart:bar" chart:attached-axis="primary-y" chart:style-name="G0S2">
            <chart:data-point chart:repeated="8"/>
          </chart:series>
          <chart:series chart:label-cell-address="Arkusz2.$A$97" chart:values-cell-range-address="Arkusz2.$B$97:.$I$97" chart:class="chart:bar" chart:attached-axis="primary-y" chart:style-name="G0S3">
            <chart:data-point chart:repeated="8"/>
          </chart:series>
          <chart:series chart:label-cell-address="Arkusz2.$A$98" chart:values-cell-range-address="Arkusz2.$B$98:.$I$98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ytuł wykresu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K$93:.$R$93"/>
          </chart:axis>
          <chart:series chart:label-cell-address="Arkusz2.$A$94" chart:values-cell-range-address="Arkusz2.$K$94:.$R$94" chart:class="chart:bar" chart:attached-axis="primary-y" chart:style-name="G0S0">
            <chart:data-point chart:repeated="8"/>
          </chart:series>
          <chart:series chart:label-cell-address="Arkusz2.$A$95" chart:values-cell-range-address="Arkusz2.$K$95:.$R$95" chart:class="chart:bar" chart:attached-axis="primary-y" chart:style-name="G0S1">
            <chart:data-point chart:repeated="8"/>
          </chart:series>
          <chart:series chart:label-cell-address="Arkusz2.$A$96" chart:values-cell-range-address="Arkusz2.$K$96:.$R$96" chart:class="chart:bar" chart:attached-axis="primary-y" chart:style-name="G0S2">
            <chart:data-point chart:repeated="8"/>
          </chart:series>
          <chart:series chart:label-cell-address="Arkusz2.$A$97" chart:values-cell-range-address="Arkusz2.$K$97:.$R$97" chart:class="chart:bar" chart:attached-axis="primary-y" chart:style-name="G0S3">
            <chart:data-point chart:repeated="8"/>
          </chart:series>
          <chart:series chart:label-cell-address="Arkusz2.$A$98" chart:values-cell-range-address="Arkusz2.$K$98:.$R$98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